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3100000030799953BA47BC3AEF.png" manifest:media-type="image/png"/>
  <manifest:file-entry manifest:full-path="Pictures/1000000000000029000000255ECB02AA61D963CA.jpg" manifest:media-type="image/jpeg"/>
  <manifest:file-entry manifest:full-path="Pictures/100000000000022D000001614FFC3D18938308FB.jpg" manifest:media-type="image/jpeg"/>
  <manifest:file-entry manifest:full-path="Pictures/100002010000018D000000E595FF5FF407A266AF.png" manifest:media-type="image/png"/>
  <manifest:file-entry manifest:full-path="Pictures/100002010000003F0000003FC083061140349883.png" manifest:media-type="image/png"/>
  <manifest:file-entry manifest:full-path="Pictures/1000020100000253000001A797DEC117FF5EB4B2.png" manifest:media-type="image/png"/>
  <manifest:file-entry manifest:full-path="Pictures/1000020100000023000000228FAF0F20B5A8A9D0.png" manifest:media-type="image/png"/>
  <manifest:file-entry manifest:full-path="Pictures/10000201000000E8000000D0320F05451DE8BCD3.png" manifest:media-type="image/png"/>
  <manifest:file-entry manifest:full-path="Pictures/1000020100000022000000224C8FB4CE2551D3F3.png" manifest:media-type="image/png"/>
  <manifest:file-entry manifest:full-path="Pictures/100002010000018C000000E69CFF27259B6910F0.png" manifest:media-type="image/png"/>
  <manifest:file-entry manifest:full-path="Pictures/10000000000000290000002556F349483E791F50.jpg" manifest:media-type="image/jpeg"/>
  <manifest:file-entry manifest:full-path="Pictures/100002010000018C000000E5973DA5FFA692BB86.png" manifest:media-type="image/png"/>
  <manifest:file-entry manifest:full-path="Pictures/10000201000000E8000000D00863E18EB1D404C0.png" manifest:media-type="image/png"/>
  <manifest:file-entry manifest:full-path="Pictures/10000201000000E8000000D02A6FB31F89D91DB7.png" manifest:media-type="image/png"/>
  <manifest:file-entry manifest:full-path="Pictures/1000020100000022000000235FA12EC9C9262694.png" manifest:media-type="image/png"/>
  <manifest:file-entry manifest:full-path="Pictures/100002010000002300000023C10FC24A8946E192.png" manifest:media-type="image/png"/>
  <manifest:file-entry manifest:full-path="Pictures/1000020100000022000000230CBD5E804D0EEBDA.png" manifest:media-type="image/png"/>
  <manifest:file-entry manifest:full-path="Pictures/100002010000002300000022356EF75497B074CC.png" manifest:media-type="image/png"/>
  <manifest:file-entry manifest:full-path="Pictures/100002010000018D000000E6872C925E832F9E09.png" manifest:media-type="image/png"/>
  <manifest:file-entry manifest:full-path="Pictures/1000020100000022000000221A9E8EB0D83DA613.png" manifest:media-type="image/png"/>
  <manifest:file-entry manifest:full-path="Pictures/100000000000033200000278F0C85AF2ADF5E289.png" manifest:media-type="image/png"/>
  <manifest:file-entry manifest:full-path="Pictures/100002010000002200000022CB4A9F87B2B139EE.png" manifest:media-type="image/png"/>
  <manifest:file-entry manifest:full-path="Pictures/100002010000018C000000E54EE7C7D727813B0F.png" manifest:media-type="image/png"/>
  <manifest:file-entry manifest:full-path="Pictures/1000020100000032000000306ECE15EFA1B21160.png" manifest:media-type="image/png"/>
  <manifest:file-entry manifest:full-path="Pictures/100002010000018D000000E5C3D7C9FAE8665355.png" manifest:media-type="image/png"/>
  <manifest:file-entry manifest:full-path="Pictures/100002010000001F0000001F6A9D2BEA589666A3.png" manifest:media-type="image/png"/>
  <manifest:file-entry manifest:full-path="Pictures/100002010000001F0000001F72DF3870E259D011.png" manifest:media-type="image/png"/>
  <manifest:file-entry manifest:full-path="Pictures/10000201000002FE000001F80766FA3893421725.png" manifest:media-type="image/png"/>
  <manifest:file-entry manifest:full-path="Pictures/100002010000012400000223DBDEDDAEE9503B6F.png" manifest:media-type="image/png"/>
  <manifest:file-entry manifest:full-path="Pictures/1000020100000292000001F8B167D5B375BEFA21.png" manifest:media-type="image/png"/>
  <manifest:file-entry manifest:full-path="Pictures/10000201000002870000030567F8B85DA05B88A8.png" manifest:media-type="image/png"/>
  <manifest:file-entry manifest:full-path="Pictures/100002010000001F00000020BE28D0A9BC05BBAE.png" manifest:media-type="image/png"/>
  <manifest:file-entry manifest:full-path="Pictures/10000201000002CA0000030572AE7A638E58620F.png" manifest:media-type="image/png"/>
  <manifest:file-entry manifest:full-path="Pictures/100000000000034C000002485DD6E1A8C4571770.png" manifest:media-type="image/png"/>
  <manifest:file-entry manifest:full-path="Pictures/10000201000000220000002263DF5BD417C4D4AE.png" manifest:media-type="image/png"/>
  <manifest:file-entry manifest:full-path="Pictures/100002010000003F00000044D18F54BC6E508A01.png" manifest:media-type="image/png"/>
  <manifest:file-entry manifest:full-path="Pictures/1000020100000123000002231A04A91A9D0593C1.png" manifest:media-type="image/png"/>
  <manifest:file-entry manifest:full-path="Pictures/10000201000000300000003028EB4D4927DA6EC3.png" manifest:media-type="image/png"/>
  <manifest:file-entry manifest:full-path="Pictures/1000020100000043000000444527CCCDA054220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mbria1" svg:font-family="Cambria"/>
    <style:font-face style:name="Courier New1" svg:font-family="'Courier New'"/>
    <style:font-face style:name="Calibri" svg:font-family="Calibri" style:font-pitch="variable"/>
    <style:font-face style:name="Cambria" svg:font-family="Cambria" style:font-pitch="variable"/>
    <style:font-face style:name="Courier New" svg:font-family="'Courier New'"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a493c"/>
    </style:style>
    <style:style style:name="gr3" style:family="graphic" style:parent-style-name="standard">
      <style:graphic-properties draw:stroke="none" draw:fill="solid" draw:fill-color="#125749"/>
    </style:style>
    <style:style style:name="gr4" style:family="graphic" style:parent-style-name="standard">
      <style:graphic-properties draw:stroke="none" draw:fill="solid" draw:fill-color="#0d4338"/>
    </style:style>
    <style:style style:name="gr5" style:family="graphic" style:parent-style-name="standard">
      <style:graphic-properties draw:stroke="none" draw:fill="solid" draw:fill-color="#169f85"/>
    </style:style>
    <style:style style:name="gr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7" style:family="graphic" style:parent-style-name="standard">
      <style:graphic-properties draw:stroke="none" draw:fill="none" draw:textarea-horizontal-align="left" draw:textarea-vertical-align="top" draw:auto-grow-height="true" draw:auto-grow-width="true" fo:min-height="1.905cm" fo:min-width="1.905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703cm" fo:min-width="0.70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39cm" fo:min-width="0.43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4cm" fo:min-width="0.44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388cm" fo:min-width="0.388cm" fo:padding-top="0cm" fo:padding-bottom="0cm" fo:padding-left="0cm" fo:padding-right="0cm"/>
    </style:style>
    <style:style style:name="gr12" style:family="graphic" style:parent-style-name="standard">
      <style:graphic-properties draw:stroke="none" draw:fill="solid" draw:fill-color="#fafcfb"/>
    </style:style>
    <style:style style:name="gr13" style:family="graphic" style:parent-style-name="standard">
      <style:graphic-properties draw:stroke="none" draw:fill="solid" draw:fill-color="#e3f3ee"/>
    </style:style>
    <style:style style:name="gr14" style:family="graphic" style:parent-style-name="standard">
      <style:graphic-properties draw:stroke="none" draw:fill="none" draw:textarea-horizontal-align="left" draw:textarea-vertical-align="top" draw:auto-grow-height="true" draw:auto-grow-width="true" fo:min-height="1.99cm" fo:min-width="1.99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1.304cm" fo:min-width="1.304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533cm" fo:min-width="0.533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2.049cm" fo:min-width="2.049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3cm" fo:min-width="0.423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1.126cm" fo:min-width="1.126cm" fo:padding-top="0cm" fo:padding-bottom="0cm" fo:padding-left="0cm" fo:padding-right="0cm"/>
    </style:style>
    <style:style style:name="gr22" style:family="graphic" style:parent-style-name="standard">
      <style:graphic-properties draw:stroke="none" draw:fill="solid" draw:fill-color="#0d6d5a"/>
    </style:style>
    <style:style style:name="gr23" style:family="graphic" style:parent-style-name="standard">
      <style:graphic-properties draw:stroke="none" draw:fill="none" draw:textarea-horizontal-align="left" draw:textarea-vertical-align="top" draw:auto-grow-height="true" draw:auto-grow-width="true" fo:min-height="0.49cm" fo:min-width="0.49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321cm" fo:min-width="0.321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91cm" fo:min-width="0.491cm" fo:padding-top="0cm" fo:padding-bottom="0cm" fo:padding-left="0cm" fo:padding-right="0cm"/>
    </style:style>
    <style:style style:name="gr26" style:family="graphic" style:parent-style-name="standard">
      <style:graphic-properties draw:stroke="solid" svg:stroke-width="0.033cm" svg:stroke-color="#d7e8e2" draw:stroke-linejoin="round" svg:stroke-linecap="butt" draw:fill="none" fo:padding-top="0.016cm" fo:padding-bottom="0.016cm" fo:padding-left="0.016cm" fo:padding-right="0.016cm"/>
    </style:style>
    <style:style style:name="gr27" style:family="graphic" style:parent-style-name="standard">
      <style:graphic-properties draw:stroke="none" draw:fill="none" draw:textarea-horizontal-align="left" draw:textarea-vertical-align="top" draw:auto-grow-height="true" draw:auto-grow-width="true" fo:min-height="1.058cm" fo:min-width="1.058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372cm" fo:min-width="0.372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549cm" fo:min-width="0.549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1.125cm" fo:min-width="1.125cm" fo:padding-top="0cm" fo:padding-bottom="0cm" fo:padding-left="0cm" fo:padding-right="0cm"/>
    </style:style>
    <style:style style:name="gr31" style:family="graphic" style:parent-style-name="standard">
      <style:graphic-properties draw:stroke="none" draw:fill="solid" draw:fill-color="#f1f8f7"/>
    </style:style>
    <style:style style:name="gr32" style:family="graphic" style:parent-style-name="standard">
      <style:graphic-properties draw:stroke="none" draw:fill="none" draw:textarea-horizontal-align="left" draw:textarea-vertical-align="top" draw:auto-grow-height="true" draw:auto-grow-width="true" fo:min-height="0.338cm" fo:min-width="0.338cm" fo:padding-top="0cm" fo:padding-bottom="0cm" fo:padding-left="0cm" fo:padding-right="0cm"/>
    </style:style>
    <style:style style:name="gr33" style:family="graphic" style:parent-style-name="standard">
      <style:graphic-properties draw:stroke="none" draw:fill="solid" draw:fill-color="#0e2d27"/>
    </style:style>
    <style:style style:name="gr34" style:family="graphic" style:parent-style-name="standard">
      <style:graphic-properties draw:stroke="none" draw:fill="none" draw:textarea-horizontal-align="left" draw:textarea-vertical-align="top" draw:auto-grow-height="true" draw:auto-grow-width="true" fo:min-height="0.389cm" fo:min-width="0.389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339cm" fo:min-width="0.339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601cm" fo:min-width="0.601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1.338cm" fo:min-width="1.338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73cm" fo:min-width="0.473cm" fo:padding-top="0cm" fo:padding-bottom="0cm" fo:padding-left="0cm" fo:padding-right="0cm"/>
    </style:style>
    <style:style style:name="gr39" style:family="graphic" style:parent-style-name="standard">
      <style:graphic-properties draw:stroke="none" draw:fill="solid" draw:fill-color="#5b6b67"/>
    </style:style>
    <style:style style:name="gr40" style:family="graphic" style:parent-style-name="standard">
      <style:graphic-properties draw:stroke="none" draw:fill="none" draw:textarea-horizontal-align="left" draw:textarea-vertical-align="top" draw:auto-grow-height="true" draw:auto-grow-width="true" fo:min-height="0.635cm" fo:min-width="0.635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1.609cm" fo:min-width="1.609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0a493c"/>
    </style:style>
    <style:style style:name="P3" style:family="paragraph">
      <loext:graphic-properties draw:fill="solid" draw:fill-color="#125749"/>
    </style:style>
    <style:style style:name="P4" style:family="paragraph">
      <loext:graphic-properties draw:fill="solid" draw:fill-color="#0d4338"/>
    </style:style>
    <style:style style:name="P5" style:family="paragraph">
      <loext:graphic-properties draw:fill="solid" draw:fill-color="#169f85"/>
    </style:style>
    <style:style style:name="P6" style:family="paragraph">
      <loext:graphic-properties draw:fill="none"/>
    </style:style>
    <style:style style:name="P7" style:family="paragraph">
      <style:paragraph-properties fo:text-align="start" style:writing-mode="lr-tb"/>
    </style:style>
    <style:style style:name="P8" style:family="paragraph">
      <loext:graphic-properties draw:fill="none"/>
      <style:text-properties fo:font-size="54pt" style:font-size-asian="54pt" style:font-size-complex="54pt"/>
    </style:style>
    <style:style style:name="P9" style:family="paragraph">
      <loext:graphic-properties draw:fill="none"/>
      <style:text-properties fo:font-size="20pt" style:font-size-asian="20pt" style:font-size-complex="20pt"/>
    </style:style>
    <style:style style:name="P10" style:family="paragraph">
      <loext:graphic-properties draw:fill="none"/>
      <style:text-properties fo:font-size="12.5pt" style:font-size-asian="12.5pt" style:font-size-complex="12.5pt"/>
    </style:style>
    <style:style style:name="P11" style:family="paragraph">
      <loext:graphic-properties draw:fill="none"/>
      <style:text-properties fo:font-size="11.1000003814697pt" style:font-size-asian="11.1000003814697pt" style:font-size-complex="11.1000003814697pt"/>
    </style:style>
    <style:style style:name="P12" style:family="paragraph">
      <loext:graphic-properties draw:fill="solid" draw:fill-color="#fafcfb"/>
    </style:style>
    <style:style style:name="P13" style:family="paragraph">
      <loext:graphic-properties draw:fill="solid" draw:fill-color="#e3f3ee"/>
    </style:style>
    <style:style style:name="P14" style:family="paragraph">
      <loext:graphic-properties draw:fill="none"/>
      <style:text-properties fo:font-size="56.4000015258789pt" style:font-size-asian="56.4000015258789pt" style:font-size-complex="56.4000015258789pt"/>
    </style:style>
    <style:style style:name="P15" style:family="paragraph">
      <loext:graphic-properties draw:fill="none"/>
      <style:text-properties fo:font-size="37pt" style:font-size-asian="37pt" style:font-size-complex="37pt"/>
    </style:style>
    <style:style style:name="P16" style:family="paragraph">
      <loext:graphic-properties draw:fill="none"/>
      <style:text-properties fo:font-size="15.1000003814697pt" style:font-size-asian="15.1000003814697pt" style:font-size-complex="15.1000003814697pt"/>
    </style:style>
    <style:style style:name="P17" style:family="paragraph">
      <loext:graphic-properties draw:fill="none"/>
      <style:text-properties fo:font-size="15.1999998092651pt" style:font-size-asian="15.1999998092651pt" style:font-size-complex="15.1999998092651pt"/>
    </style:style>
    <style:style style:name="P18" style:family="paragraph">
      <loext:graphic-properties draw:fill="none"/>
      <style:text-properties fo:font-size="58.0999984741211pt" style:font-size-asian="58.0999984741211pt" style:font-size-complex="58.0999984741211pt"/>
    </style:style>
    <style:style style:name="P19" style:family="paragraph">
      <loext:graphic-properties draw:fill="none"/>
      <style:text-properties fo:font-size="12pt" style:font-size-asian="12pt" style:font-size-complex="12pt"/>
    </style:style>
    <style:style style:name="P20" style:family="paragraph">
      <loext:graphic-properties draw:fill="none"/>
      <style:text-properties fo:font-size="32pt" style:font-size-asian="32pt" style:font-size-complex="32pt"/>
    </style:style>
    <style:style style:name="P21" style:family="paragraph">
      <loext:graphic-properties draw:fill="solid" draw:fill-color="#0d6d5a"/>
    </style:style>
    <style:style style:name="P22" style:family="paragraph">
      <loext:graphic-properties draw:fill="none"/>
      <style:text-properties fo:font-size="13.8999996185303pt" style:font-size-asian="13.8999996185303pt" style:font-size-complex="13.8999996185303pt"/>
    </style:style>
    <style:style style:name="P23" style:family="paragraph">
      <loext:graphic-properties draw:fill="none"/>
      <style:text-properties fo:font-size="9.10000038146973pt" style:font-size-asian="9.10000038146973pt" style:font-size-complex="9.10000038146973pt"/>
    </style:style>
    <style:style style:name="P24" style:family="paragraph">
      <loext:graphic-properties draw:fill="none"/>
      <style:text-properties fo:font-size="14pt" style:font-size-asian="14pt" style:font-size-complex="14pt"/>
    </style:style>
    <style:style style:name="P25" style:family="paragraph">
      <loext:graphic-properties draw:fill="none"/>
      <style:text-properties fo:font-size="30pt" style:font-size-asian="30pt" style:font-size-complex="30pt"/>
    </style:style>
    <style:style style:name="P26" style:family="paragraph">
      <loext:graphic-properties draw:fill="none"/>
      <style:text-properties fo:font-size="10.6000003814697pt" style:font-size-asian="10.6000003814697pt" style:font-size-complex="10.6000003814697pt"/>
    </style:style>
    <style:style style:name="P27" style:family="paragraph">
      <loext:graphic-properties draw:fill="none"/>
      <style:text-properties fo:font-size="15.6000003814697pt" style:font-size-asian="15.6000003814697pt" style:font-size-complex="15.6000003814697pt"/>
    </style:style>
    <style:style style:name="P28" style:family="paragraph">
      <loext:graphic-properties draw:fill="none"/>
      <style:text-properties fo:font-size="31.8999996185303pt" style:font-size-asian="31.8999996185303pt" style:font-size-complex="31.8999996185303pt"/>
    </style:style>
    <style:style style:name="P29" style:family="paragraph">
      <loext:graphic-properties draw:fill="solid" draw:fill-color="#f1f8f7"/>
    </style:style>
    <style:style style:name="P30" style:family="paragraph">
      <loext:graphic-properties draw:fill="none"/>
      <style:text-properties fo:font-size="9.60000038146973pt" style:font-size-asian="9.60000038146973pt" style:font-size-complex="9.60000038146973pt"/>
    </style:style>
    <style:style style:name="P31" style:family="paragraph">
      <loext:graphic-properties draw:fill="solid" draw:fill-color="#0e2d27"/>
    </style:style>
    <style:style style:name="P32" style:family="paragraph">
      <loext:graphic-properties draw:fill="none"/>
      <style:text-properties fo:font-size="17.1000003814697pt" style:font-size-asian="17.1000003814697pt" style:font-size-complex="17.1000003814697pt"/>
    </style:style>
    <style:style style:name="P33" style:family="paragraph">
      <loext:graphic-properties draw:fill="none"/>
      <style:text-properties fo:font-size="38pt" style:font-size-asian="38pt" style:font-size-complex="38pt"/>
    </style:style>
    <style:style style:name="P34" style:family="paragraph">
      <loext:graphic-properties draw:fill="none"/>
      <style:text-properties fo:font-size="13.5pt" style:font-size-asian="13.5pt" style:font-size-complex="13.5pt"/>
    </style:style>
    <style:style style:name="P35" style:family="paragraph">
      <loext:graphic-properties draw:fill="solid" draw:fill-color="#5b6b67"/>
    </style:style>
    <style:style style:name="P36" style:family="paragraph">
      <loext:graphic-properties draw:fill="none"/>
      <style:text-properties fo:font-size="18pt" style:font-size-asian="18pt" style:font-size-complex="18pt"/>
    </style:style>
    <style:style style:name="P37" style:family="paragraph">
      <loext:graphic-properties draw:fill="none"/>
      <style:text-properties fo:font-size="45.5999984741211pt" style:font-size-asian="45.5999984741211pt" style:font-size-complex="45.5999984741211pt"/>
    </style:style>
    <style:style style:name="T1" style:family="text">
      <style:text-properties fo:color="#ffffff" style:font-name="Cambria1" fo:font-size="54pt" fo:font-weight="bold" style:font-size-asian="54pt" style:font-name-complex="Cambria1" style:font-size-complex="54pt" style:font-weight-complex="bold"/>
    </style:style>
    <style:style style:name="T2" style:family="text">
      <style:text-properties fo:color="#bee2d7" style:font-name="Calibri1" fo:font-size="20pt" style:font-size-asian="20pt" style:font-name-complex="Calibri1" style:font-size-complex="20pt"/>
    </style:style>
    <style:style style:name="T3" style:family="text">
      <style:text-properties fo:color="#8fc4b5" style:font-name="Calibri1" fo:font-size="12.5pt" style:font-size-asian="12.5pt" style:font-name-complex="Calibri1" style:font-size-complex="12.5pt"/>
    </style:style>
    <style:style style:name="T4" style:family="text">
      <style:text-properties fo:color="#bee2d7" style:font-name="Calibri1" fo:font-size="12.5pt" style:font-size-asian="12.5pt" style:font-name-complex="Calibri1" style:font-size-complex="12.5pt"/>
    </style:style>
    <style:style style:name="T5" style:family="text">
      <style:text-properties fo:color="#6ea999" style:font-name="Calibri1" fo:font-size="11.1000003814697pt" fo:font-style="italic" style:font-size-asian="11.1000003814697pt" style:font-name-complex="Calibri1" style:font-size-complex="11.1000003814697pt" style:font-style-complex="italic"/>
    </style:style>
    <style:style style:name="T6" style:family="text">
      <style:text-properties fo:color="#115b5b" style:font-name="Calibri1" fo:font-size="56.4000015258789pt" style:font-size-asian="56.4000015258789pt" style:font-name-complex="Calibri1" style:font-size-complex="56.4000015258789pt"/>
    </style:style>
    <style:style style:name="T7" style:family="text">
      <style:text-properties fo:color="#135b5b" style:font-name="Calibri1" fo:font-size="56.4000015258789pt" style:font-size-asian="56.4000015258789pt" style:font-name-complex="Calibri1" style:font-size-complex="56.4000015258789pt"/>
    </style:style>
    <style:style style:name="T8" style:family="text">
      <style:text-properties fo:color="#115d5b" style:font-name="Calibri1" fo:font-size="56.4000015258789pt" style:font-size-asian="56.4000015258789pt" style:font-name-complex="Calibri1" style:font-size-complex="56.4000015258789pt"/>
    </style:style>
    <style:style style:name="T9" style:family="text">
      <style:text-properties fo:color="#01524b" style:font-name="Calibri1" fo:font-size="37pt" style:font-size-asian="37pt" style:font-name-complex="Calibri1" style:font-size-complex="37pt"/>
    </style:style>
    <style:style style:name="T10" style:family="text">
      <style:text-properties fo:color="#155b52" style:font-name="Calibri1" fo:font-size="37pt" style:font-size-asian="37pt" style:font-name-complex="Calibri1" style:font-size-complex="37pt"/>
    </style:style>
    <style:style style:name="T11" style:family="text">
      <style:text-properties fo:color="#0a645b" style:font-name="Calibri1" fo:font-size="37pt" style:font-size-asian="37pt" style:font-name-complex="Calibri1" style:font-size-complex="37pt"/>
    </style:style>
    <style:style style:name="T12" style:family="text">
      <style:text-properties fo:color="#086257" style:font-name="Calibri1" fo:font-size="37pt" style:font-size-asian="37pt" style:font-name-complex="Calibri1" style:font-size-complex="37pt"/>
    </style:style>
    <style:style style:name="T13" style:family="text">
      <style:text-properties fo:color="#333333" style:font-name="Calibri1" fo:font-size="15.1000003814697pt" style:font-size-asian="15.1000003814697pt" style:font-name-complex="Calibri1" style:font-size-complex="15.1000003814697pt"/>
    </style:style>
    <style:style style:name="T14" style:family="text">
      <style:text-properties fo:color="#343434" style:font-name="Calibri1" fo:font-size="15.1000003814697pt" style:font-size-asian="15.1000003814697pt" style:font-name-complex="Calibri1" style:font-size-complex="15.1000003814697pt"/>
    </style:style>
    <style:style style:name="T15" style:family="text">
      <style:text-properties fo:color="#384d5d" style:font-name="Calibri1" fo:font-size="15.1000003814697pt" style:font-size-asian="15.1000003814697pt" style:font-name-complex="Calibri1" style:font-size-complex="15.1000003814697pt"/>
    </style:style>
    <style:style style:name="T16" style:family="text">
      <style:text-properties fo:color="#313131" style:font-name="Calibri1" fo:font-size="15.1000003814697pt" style:font-size-asian="15.1000003814697pt" style:font-name-complex="Calibri1" style:font-size-complex="15.1000003814697pt"/>
    </style:style>
    <style:style style:name="T17" style:family="text">
      <style:text-properties fo:color="#2f2f2f" style:font-name="Calibri1" fo:font-size="15.1000003814697pt" style:font-size-asian="15.1000003814697pt" style:font-name-complex="Calibri1" style:font-size-complex="15.1000003814697pt"/>
    </style:style>
    <style:style style:name="T18" style:family="text">
      <style:text-properties fo:color="#2b2b2b" style:font-name="Calibri1" fo:font-size="15.1000003814697pt" style:font-size-asian="15.1000003814697pt" style:font-name-complex="Calibri1" style:font-size-complex="15.1000003814697pt"/>
    </style:style>
    <style:style style:name="T19" style:family="text">
      <style:text-properties fo:color="#2a2a2a" style:font-name="Calibri1" fo:font-size="15.1000003814697pt" style:font-size-asian="15.1000003814697pt" style:font-name-complex="Calibri1" style:font-size-complex="15.1000003814697pt"/>
    </style:style>
    <style:style style:name="T20" style:family="text">
      <style:text-properties fo:color="#383838" style:font-name="Calibri1" fo:font-size="15.1999998092651pt" style:font-size-asian="15.1999998092651pt" style:font-name-complex="Calibri1" style:font-size-complex="15.1999998092651pt"/>
    </style:style>
    <style:style style:name="T21" style:family="text">
      <style:text-properties fo:color="#2d2d2d" style:font-name="Calibri1" fo:font-size="15.1999998092651pt" style:font-size-asian="15.1999998092651pt" style:font-name-complex="Calibri1" style:font-size-complex="15.1999998092651pt"/>
    </style:style>
    <style:style style:name="T22" style:family="text">
      <style:text-properties fo:color="#313131" style:font-name="Calibri1" fo:font-size="15.1999998092651pt" style:font-size-asian="15.1999998092651pt" style:font-name-complex="Calibri1" style:font-size-complex="15.1999998092651pt"/>
    </style:style>
    <style:style style:name="T23" style:family="text">
      <style:text-properties fo:color="#3a3a3a" style:font-name="Calibri1" fo:font-size="15.1999998092651pt" style:font-size-asian="15.1999998092651pt" style:font-name-complex="Calibri1" style:font-size-complex="15.1999998092651pt"/>
    </style:style>
    <style:style style:name="T24" style:family="text">
      <style:text-properties fo:color="#1f1f1f" style:font-name="Calibri1" fo:font-size="15.1999998092651pt" style:font-size-asian="15.1999998092651pt" style:font-name-complex="Calibri1" style:font-size-complex="15.1999998092651pt"/>
    </style:style>
    <style:style style:name="T25" style:family="text">
      <style:text-properties fo:color="#2b2b2b" style:font-name="Calibri1" fo:font-size="15.1999998092651pt" style:font-size-asian="15.1999998092651pt" style:font-name-complex="Calibri1" style:font-size-complex="15.1999998092651pt"/>
    </style:style>
    <style:style style:name="T26" style:family="text">
      <style:text-properties fo:color="#2f2f2f" style:font-name="Calibri1" fo:font-size="15.1999998092651pt" style:font-size-asian="15.1999998092651pt" style:font-name-complex="Calibri1" style:font-size-complex="15.1999998092651pt"/>
    </style:style>
    <style:style style:name="T27" style:family="text">
      <style:text-properties fo:color="#343434" style:font-name="Calibri1" fo:font-size="15.1999998092651pt" style:font-size-asian="15.1999998092651pt" style:font-name-complex="Calibri1" style:font-size-complex="15.1999998092651pt"/>
    </style:style>
    <style:style style:name="T28" style:family="text">
      <style:text-properties fo:color="#363636" style:font-name="Calibri1" fo:font-size="15.1000003814697pt" style:font-size-asian="15.1000003814697pt" style:font-name-complex="Calibri1" style:font-size-complex="15.1000003814697pt"/>
    </style:style>
    <style:style style:name="T29" style:family="text">
      <style:text-properties fo:color="#2d2d2d" style:font-name="Calibri1" fo:font-size="15.1000003814697pt" style:font-size-asian="15.1000003814697pt" style:font-name-complex="Calibri1" style:font-size-complex="15.1000003814697pt"/>
    </style:style>
    <style:style style:name="T30" style:family="text">
      <style:text-properties fo:color="#383838" style:font-name="Calibri1" fo:font-size="15.1000003814697pt" style:font-size-asian="15.1000003814697pt" style:font-name-complex="Calibri1" style:font-size-complex="15.1000003814697pt"/>
    </style:style>
    <style:style style:name="T31" style:family="text">
      <style:text-properties fo:color="#282828" style:font-name="Calibri1" fo:font-size="15.1999998092651pt" style:font-size-asian="15.1999998092651pt" style:font-name-complex="Calibri1" style:font-size-complex="15.1999998092651pt"/>
    </style:style>
    <style:style style:name="T32" style:family="text">
      <style:text-properties fo:color="#3b3b3b" style:font-name="Calibri1" fo:font-size="15.1999998092651pt" style:font-size-asian="15.1999998092651pt" style:font-name-complex="Calibri1" style:font-size-complex="15.1999998092651pt"/>
    </style:style>
    <style:style style:name="T33" style:family="text">
      <style:text-properties fo:color="#3b3b3b" style:font-name="Calibri1" fo:font-size="15.1000003814697pt" style:font-size-asian="15.1000003814697pt" style:font-name-complex="Calibri1" style:font-size-complex="15.1000003814697pt"/>
    </style:style>
    <style:style style:name="T34" style:family="text">
      <style:text-properties fo:color="#115d5b" style:font-name="Calibri1" fo:font-size="58.0999984741211pt" fo:font-weight="bold" style:font-size-asian="58.0999984741211pt" style:font-name-complex="Calibri1" style:font-size-complex="58.0999984741211pt" style:font-weight-complex="bold"/>
    </style:style>
    <style:style style:name="T35" style:family="text">
      <style:text-properties fo:color="#0e5e59" style:font-name="Calibri1" fo:font-size="58.0999984741211pt" fo:font-weight="bold" style:font-size-asian="58.0999984741211pt" style:font-name-complex="Calibri1" style:font-size-complex="58.0999984741211pt" style:font-weight-complex="bold"/>
    </style:style>
    <style:style style:name="T36" style:family="text">
      <style:text-properties fo:color="#0c5e5d" style:font-name="Calibri1" fo:font-size="58.0999984741211pt" fo:font-weight="bold" style:font-size-asian="58.0999984741211pt" style:font-name-complex="Calibri1" style:font-size-complex="58.0999984741211pt" style:font-weight-complex="bold"/>
    </style:style>
    <style:style style:name="T37" style:family="text">
      <style:text-properties fo:color="#0c5d56" style:font-name="Calibri1" fo:font-size="37pt" fo:font-weight="bold" style:font-size-asian="37pt" style:font-name-complex="Calibri1" style:font-size-complex="37pt" style:font-weight-complex="bold"/>
    </style:style>
    <style:style style:name="T38" style:family="text">
      <style:text-properties fo:color="#16665b" style:font-name="Calibri1" fo:font-size="37pt" fo:font-weight="bold" style:font-size-asian="37pt" style:font-name-complex="Calibri1" style:font-size-complex="37pt" style:font-weight-complex="bold"/>
    </style:style>
    <style:style style:name="T39" style:family="text">
      <style:text-properties fo:color="#2b445d" style:font-name="Calibri1" fo:font-size="12pt" style:font-size-asian="12pt" style:font-name-complex="Calibri1" style:font-size-complex="12pt"/>
    </style:style>
    <style:style style:name="T40" style:family="text">
      <style:text-properties fo:color="#3b3b3b" style:font-name="Calibri1" fo:font-size="12pt" style:font-size-asian="12pt" style:font-name-complex="Calibri1" style:font-size-complex="12pt"/>
    </style:style>
    <style:style style:name="T41" style:family="text">
      <style:text-properties fo:color="#363636" style:font-name="Calibri1" fo:font-size="12pt" style:font-size-asian="12pt" style:font-name-complex="Calibri1" style:font-size-complex="12pt"/>
    </style:style>
    <style:style style:name="T42" style:family="text">
      <style:text-properties fo:color="#383838" style:font-name="Calibri1" fo:font-size="12pt" style:font-size-asian="12pt" style:font-name-complex="Calibri1" style:font-size-complex="12pt"/>
    </style:style>
    <style:style style:name="T43" style:family="text">
      <style:text-properties fo:color="#333333" style:font-name="Calibri1" fo:font-size="12pt" style:font-size-asian="12pt" style:font-name-complex="Calibri1" style:font-size-complex="12pt"/>
    </style:style>
    <style:style style:name="T44" style:family="text">
      <style:text-properties fo:color="#282828" style:font-name="Calibri1" fo:font-size="12pt" style:font-size-asian="12pt" style:font-name-complex="Calibri1" style:font-size-complex="12pt"/>
    </style:style>
    <style:style style:name="T45" style:family="text">
      <style:text-properties fo:color="#28496d" style:font-name="Calibri1" fo:font-size="12pt" style:font-size-asian="12pt" style:font-name-complex="Calibri1" style:font-size-complex="12pt"/>
    </style:style>
    <style:style style:name="T46" style:family="text">
      <style:text-properties fo:color="#343434" style:font-name="Calibri1" fo:font-size="12pt" style:font-size-asian="12pt" style:font-name-complex="Calibri1" style:font-size-complex="12pt"/>
    </style:style>
    <style:style style:name="T47" style:family="text">
      <style:text-properties fo:color="#2b2b2b" style:font-name="Calibri1" fo:font-size="12pt" style:font-size-asian="12pt" style:font-name-complex="Calibri1" style:font-size-complex="12pt"/>
    </style:style>
    <style:style style:name="T48" style:family="text">
      <style:text-properties fo:color="#2a2a2a" style:font-name="Calibri1" fo:font-size="12pt" style:font-size-asian="12pt" style:font-name-complex="Calibri1" style:font-size-complex="12pt"/>
    </style:style>
    <style:style style:name="T49" style:family="text">
      <style:text-properties fo:color="#2d2d2d" style:font-name="Calibri1" fo:font-size="12pt" style:font-size-asian="12pt" style:font-name-complex="Calibri1" style:font-size-complex="12pt"/>
    </style:style>
    <style:style style:name="T50" style:family="text">
      <style:text-properties fo:color="#3b445d" style:font-name="Calibri1" fo:font-size="12pt" style:font-size-asian="12pt" style:font-name-complex="Calibri1" style:font-size-complex="12pt"/>
    </style:style>
    <style:style style:name="T51" style:family="text">
      <style:text-properties fo:color="#2f2f2f" style:font-name="Calibri1" fo:font-size="12pt" style:font-size-asian="12pt" style:font-name-complex="Calibri1" style:font-size-complex="12pt"/>
    </style:style>
    <style:style style:name="T52" style:family="text">
      <style:text-properties fo:color="#313131" style:font-name="Calibri1" fo:font-size="12pt" style:font-size-asian="12pt" style:font-name-complex="Calibri1" style:font-size-complex="12pt"/>
    </style:style>
    <style:style style:name="T53" style:family="text">
      <style:text-properties fo:color="#0c5d59" style:font-name="Calibri1" fo:font-size="37pt" fo:font-weight="bold" style:font-size-asian="37pt" style:font-name-complex="Calibri1" style:font-size-complex="37pt" style:font-weight-complex="bold"/>
    </style:style>
    <style:style style:name="T54" style:family="text">
      <style:text-properties fo:color="#115957" style:font-name="Calibri1" fo:font-size="37pt" fo:font-weight="bold" style:font-size-asian="37pt" style:font-name-complex="Calibri1" style:font-size-complex="37pt" style:font-weight-complex="bold"/>
    </style:style>
    <style:style style:name="T55" style:family="text">
      <style:text-properties fo:color="#3a3a3a" style:font-name="Calibri1" fo:font-size="12pt" style:font-size-asian="12pt" style:font-name-complex="Calibri1" style:font-size-complex="12pt"/>
    </style:style>
    <style:style style:name="T56" style:family="text">
      <style:text-properties fo:color="#384d57" style:font-name="Calibri1" fo:font-size="12pt" style:font-size-asian="12pt" style:font-name-complex="Calibri1" style:font-size-complex="12pt"/>
    </style:style>
    <style:style style:name="T57" style:family="text">
      <style:text-properties fo:color="#214469" style:font-name="Calibri1" fo:font-size="12pt" style:font-size-asian="12pt" style:font-name-complex="Calibri1" style:font-size-complex="12pt"/>
    </style:style>
    <style:style style:name="T58" style:family="text">
      <style:text-properties fo:color="#333f54" style:font-name="Calibri1" fo:font-size="12pt" style:font-size-asian="12pt" style:font-name-complex="Calibri1" style:font-size-complex="12pt"/>
    </style:style>
    <style:style style:name="T59" style:family="text">
      <style:text-properties fo:color="#232323" style:font-name="Calibri1" fo:font-size="12pt" style:font-size-asian="12pt" style:font-name-complex="Calibri1" style:font-size-complex="12pt"/>
    </style:style>
    <style:style style:name="T60" style:family="text">
      <style:text-properties fo:color="#3f3f3f" style:font-name="Calibri1" fo:font-size="12pt" style:font-size-asian="12pt" style:font-name-complex="Calibri1" style:font-size-complex="12pt"/>
    </style:style>
    <style:style style:name="T61" style:family="text">
      <style:text-properties fo:color="#414141" style:font-name="Calibri1" fo:font-size="12pt" style:font-size-asian="12pt" style:font-name-complex="Calibri1" style:font-size-complex="12pt"/>
    </style:style>
    <style:style style:name="T62" style:family="text">
      <style:text-properties fo:color="#263d4d" style:font-name="Calibri1" fo:font-size="12pt" style:font-size-asian="12pt" style:font-name-complex="Calibri1" style:font-size-complex="12pt"/>
    </style:style>
    <style:style style:name="T63" style:family="text">
      <style:text-properties fo:color="#0d6d5a" style:font-name="Calibri1" fo:font-size="11.1000003814697pt" fo:font-weight="bold" style:font-size-asian="11.1000003814697pt" style:font-name-complex="Calibri1" style:font-size-complex="11.1000003814697pt" style:font-weight-complex="bold"/>
    </style:style>
    <style:style style:name="T64" style:family="text">
      <style:text-properties fo:color="#1b2b27" style:font-name="Cambria1" fo:font-size="32pt" fo:font-weight="bold" style:font-size-asian="32pt" style:font-name-complex="Cambria1" style:font-size-complex="32pt" style:font-weight-complex="bold"/>
    </style:style>
    <style:style style:name="T65" style:family="text">
      <style:text-properties fo:color="#5b6b67" style:font-name="Calibri1" fo:font-size="13.8999996185303pt" style:font-size-asian="13.8999996185303pt" style:font-name-complex="Calibri1" style:font-size-complex="13.8999996185303pt"/>
    </style:style>
    <style:style style:name="T66" style:family="text">
      <style:text-properties fo:color="#ffffff" style:font-name="Calibri1" fo:font-size="13.8999996185303pt" fo:font-weight="bold" style:font-size-asian="13.8999996185303pt" style:font-name-complex="Calibri1" style:font-size-complex="13.8999996185303pt" style:font-weight-complex="bold"/>
    </style:style>
    <style:style style:name="T67" style:family="text">
      <style:text-properties fo:color="#1b2b27" style:font-name="Calibri1" fo:font-size="15.1000003814697pt" fo:font-weight="bold" style:font-size-asian="15.1000003814697pt" style:font-name-complex="Calibri1" style:font-size-complex="15.1000003814697pt" style:font-weight-complex="bold"/>
    </style:style>
    <style:style style:name="T68" style:family="text">
      <style:text-properties fo:color="#5b6b67" style:font-name="Calibri1" fo:font-size="12pt" style:font-size-asian="12pt" style:font-name-complex="Calibri1" style:font-size-complex="12pt"/>
    </style:style>
    <style:style style:name="T69" style:family="text">
      <style:text-properties fo:color="#5b6b67" style:font-name="Calibri1" fo:font-size="9.10000038146973pt" style:font-size-asian="9.10000038146973pt" style:font-name-complex="Calibri1" style:font-size-complex="9.10000038146973pt"/>
    </style:style>
    <style:style style:name="T70" style:family="text">
      <style:text-properties fo:color="#1b2b27" style:font-name="Calibri1" fo:font-size="14pt" style:font-size-asian="14pt" style:font-name-complex="Calibri1" style:font-size-complex="14pt"/>
    </style:style>
    <style:style style:name="T71" style:family="text">
      <style:text-properties fo:color="#1b2b27" style:font-name="Calibri1" fo:font-size="13.8999996185303pt" style:font-size-asian="13.8999996185303pt" style:font-name-complex="Calibri1" style:font-size-complex="13.8999996185303pt"/>
    </style:style>
    <style:style style:name="T72" style:family="text">
      <style:text-properties fo:color="#0d6d5a" style:font-name="Calibri1" fo:font-size="12.5pt" fo:font-style="italic" style:font-size-asian="12.5pt" style:font-name-complex="Calibri1" style:font-size-complex="12.5pt" style:font-style-complex="italic"/>
    </style:style>
    <style:style style:name="T73" style:family="text">
      <style:text-properties fo:color="#0d6d5a" style:font-name="Cambria1" fo:font-size="30pt" fo:font-weight="bold" style:font-size-asian="30pt" style:font-name-complex="Cambria1" style:font-size-complex="30pt" style:font-weight-complex="bold"/>
    </style:style>
    <style:style style:name="T74" style:family="text">
      <style:text-properties fo:color="#5b6b67" style:font-name="Calibri1" fo:font-size="10.6000003814697pt" style:font-size-asian="10.6000003814697pt" style:font-name-complex="Calibri1" style:font-size-complex="10.6000003814697pt"/>
    </style:style>
    <style:style style:name="T75" style:family="text">
      <style:text-properties fo:color="#1b2b27" style:font-name="Cambria1" fo:font-size="15.6000003814697pt" fo:font-weight="bold" style:font-size-asian="15.6000003814697pt" style:font-name-complex="Cambria1" style:font-size-complex="15.6000003814697pt" style:font-weight-complex="bold"/>
    </style:style>
    <style:style style:name="T76" style:family="text">
      <style:text-properties fo:color="#0d6d5a" style:font-name="Courier New1" fo:font-size="12.5pt" fo:font-weight="bold" style:font-size-asian="12.5pt" style:font-name-complex="Courier New1" style:font-size-complex="12.5pt" style:font-weight-complex="bold"/>
    </style:style>
    <style:style style:name="T77" style:family="text">
      <style:text-properties fo:color="#1b2b27" style:font-name="Cambria1" fo:font-size="31.8999996185303pt" fo:font-weight="bold" style:font-size-asian="31.8999996185303pt" style:font-name-complex="Cambria1" style:font-size-complex="31.8999996185303pt" style:font-weight-complex="bold"/>
    </style:style>
    <style:style style:name="T78" style:family="text">
      <style:text-properties fo:color="#1b2b27" style:font-name="Courier New1" fo:font-size="11.1000003814697pt" fo:font-weight="bold" style:font-size-asian="11.1000003814697pt" style:font-name-complex="Courier New1" style:font-size-complex="11.1000003814697pt" style:font-weight-complex="bold"/>
    </style:style>
    <style:style style:name="T79" style:family="text">
      <style:text-properties fo:color="#0d6d5a" style:font-name="Calibri1" fo:font-size="12.5pt" fo:font-weight="bold" style:font-size-asian="12.5pt" style:font-name-complex="Calibri1" style:font-size-complex="12.5pt" style:font-weight-complex="bold"/>
    </style:style>
    <style:style style:name="T80" style:family="text">
      <style:text-properties fo:color="#1b2b27" style:font-name="Calibri1" fo:font-size="12.5pt" style:font-size-asian="12.5pt" style:font-name-complex="Calibri1" style:font-size-complex="12.5pt"/>
    </style:style>
    <style:style style:name="T81" style:family="text">
      <style:text-properties fo:color="#0d6d5a" style:font-name="Calibri1" fo:font-size="9.60000038146973pt" fo:font-weight="bold" style:font-size-asian="9.60000038146973pt" style:font-name-complex="Calibri1" style:font-size-complex="9.60000038146973pt" style:font-weight-complex="bold"/>
    </style:style>
    <style:style style:name="T82" style:family="text">
      <style:text-properties fo:color="#1b2b27" style:font-name="Courier New1" fo:font-size="11.1000003814697pt" style:font-size-asian="11.1000003814697pt" style:font-name-complex="Courier New1" style:font-size-complex="11.1000003814697pt"/>
    </style:style>
    <style:style style:name="T83" style:family="text">
      <style:text-properties fo:color="#5b6b67" style:font-name="Calibri1" fo:font-size="11.1000003814697pt" style:font-size-asian="11.1000003814697pt" style:font-name-complex="Calibri1" style:font-size-complex="11.1000003814697pt"/>
    </style:style>
    <style:style style:name="T84" style:family="text">
      <style:text-properties fo:color="#1b2b27" style:font-name="Cambria1" fo:font-size="15.1999998092651pt" fo:font-weight="bold" style:font-size-asian="15.1999998092651pt" style:font-name-complex="Cambria1" style:font-size-complex="15.1999998092651pt" style:font-weight-complex="bold"/>
    </style:style>
    <style:style style:name="T85" style:family="text">
      <style:text-properties fo:color="#1b2b27" style:font-name="Calibri1" fo:font-size="11.1000003814697pt" style:font-size-asian="11.1000003814697pt" style:font-name-complex="Calibri1" style:font-size-complex="11.1000003814697pt"/>
    </style:style>
    <style:style style:name="T86" style:family="text">
      <style:text-properties fo:color="#d5efe8" style:font-name="Courier New1" fo:font-size="11.1000003814697pt" style:font-size-asian="11.1000003814697pt" style:font-name-complex="Courier New1" style:font-size-complex="11.1000003814697pt"/>
    </style:style>
    <style:style style:name="T87" style:family="text">
      <style:text-properties fo:color="#0d6d5a" style:font-name="Calibri1" fo:font-size="12pt" fo:font-weight="bold" style:font-size-asian="12pt" style:font-name-complex="Calibri1" style:font-size-complex="12pt" style:font-weight-complex="bold"/>
    </style:style>
    <style:style style:name="T88" style:family="text">
      <style:text-properties fo:color="#d5efe8" style:font-name="Courier New1" fo:font-size="10.6000003814697pt" style:font-size-asian="10.6000003814697pt" style:font-name-complex="Courier New1" style:font-size-complex="10.6000003814697pt"/>
    </style:style>
    <style:style style:name="T89" style:family="text">
      <style:text-properties fo:color="#1b2b27" style:font-name="Calibri1" fo:font-size="10.6000003814697pt" style:font-size-asian="10.6000003814697pt" style:font-name-complex="Calibri1" style:font-size-complex="10.6000003814697pt"/>
    </style:style>
    <style:style style:name="T90" style:family="text">
      <style:text-properties fo:color="#5b6b67" style:font-name="Calibri1" fo:font-size="9.60000038146973pt" fo:font-style="italic" style:font-size-asian="9.60000038146973pt" style:font-name-complex="Calibri1" style:font-size-complex="9.60000038146973pt" style:font-style-complex="italic"/>
    </style:style>
    <style:style style:name="T91" style:family="text">
      <style:text-properties fo:color="#1b2b27" style:font-name="Cambria1" fo:font-size="17.1000003814697pt" fo:font-weight="bold" style:font-size-asian="17.1000003814697pt" style:font-name-complex="Cambria1" style:font-size-complex="17.1000003814697pt" style:font-weight-complex="bold"/>
    </style:style>
    <style:style style:name="T92" style:family="text">
      <style:text-properties fo:color="#5b6b67" style:font-name="Calibri1" fo:font-size="12.5pt" style:font-size-asian="12.5pt" style:font-name-complex="Calibri1" style:font-size-complex="12.5pt"/>
    </style:style>
    <style:style style:name="T93" style:family="text">
      <style:text-properties fo:color="#ffffff" style:font-name="Cambria1" fo:font-size="38pt" fo:font-weight="bold" style:font-size-asian="38pt" style:font-name-complex="Cambria1" style:font-size-complex="38pt" style:font-weight-complex="bold"/>
    </style:style>
    <style:style style:name="T94" style:family="text">
      <style:text-properties fo:color="#bee2d7" style:font-name="Calibri1" fo:font-size="15.6000003814697pt" style:font-size-asian="15.6000003814697pt" style:font-name-complex="Calibri1" style:font-size-complex="15.6000003814697pt"/>
    </style:style>
    <style:style style:name="T95" style:family="text">
      <style:text-properties fo:color="#ffffff" style:font-name="Calibri1" fo:font-size="12.5pt" fo:font-weight="bold" style:font-size-asian="12.5pt" style:font-name-complex="Calibri1" style:font-size-complex="12.5pt" style:font-weight-complex="bold"/>
    </style:style>
    <style:style style:name="T96" style:family="text">
      <style:text-properties fo:color="#1b2b27" style:font-name="Calibri1" fo:font-size="13.5pt" fo:font-weight="bold" style:font-size-asian="13.5pt" style:font-name-complex="Calibri1" style:font-size-complex="13.5pt" style:font-weight-complex="bold"/>
    </style:style>
    <style:style style:name="T97" style:family="text">
      <style:text-properties fo:color="#1b2b27" style:font-name="Cambria1" fo:font-size="15.1000003814697pt" fo:font-weight="bold" style:font-size-asian="15.1000003814697pt" style:font-name-complex="Cambria1" style:font-size-complex="15.1000003814697pt" style:font-weight-complex="bold"/>
    </style:style>
    <style:style style:name="T98" style:family="text">
      <style:text-properties fo:color="#169f85" style:font-name="Calibri1" fo:font-size="18pt" fo:font-weight="bold" style:font-size-asian="18pt" style:font-name-complex="Calibri1" style:font-size-complex="18pt" style:font-weight-complex="bold"/>
    </style:style>
    <style:style style:name="T99" style:family="text">
      <style:text-properties fo:color="#ffffff" style:font-name="Cambria1" fo:font-size="45.5999984741211pt" fo:font-weight="bold" style:font-size-asian="45.5999984741211pt" style:font-name-complex="Cambria1" style:font-size-complex="45.5999984741211pt" style:font-weight-complex="bold"/>
    </style:style>
    <style:style style:name="T100" style:family="text">
      <style:text-properties fo:color="#6ea999" style:font-name="Calibri1" fo:font-size="11.1000003814697pt" style:font-size-asian="11.1000003814697pt" style:font-name-complex="Calibri1" style:font-size-complex="11.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3.866cm" svg:height="19.05cm" svg:x="0cm" svg:y="-0.001cm" svg:viewBox="0 0 33867 19051" draw:points="0,19051 33867,19051 33867,0 0,0">
          <text:p/>
        </draw:polygon>
        <draw:polygon draw:style-name="gr2" draw:text-style-name="P2" draw:layer="layout" svg:width="33.867cm" svg:height="19.05cm" svg:x="-0.365cm" svg:y="-0.051cm" svg:viewBox="0 0 33868 19051" draw:points="0,19051 33868,19051 33868,0 0,0">
          <text:p/>
        </draw:polygon>
        <draw:polygon draw:style-name="gr3" draw:text-style-name="P3" draw:layer="layout" svg:width="6.934cm" svg:height="7.112cm" svg:x="26.932cm" svg:y="0cm" svg:viewBox="0 0 6935 7113" draw:points="6935,0 307,0 305,4 264,124 226,245 190,368 158,491 128,616 102,742 78,869 58,997 40,1126 26,1255 14,1386 6,1518 2,1651 0,1784 2,1917 6,2050 14,2181 26,2312 40,2442 58,2571 78,2699 102,2826 128,2952 158,3077 190,3200 226,3323 264,3444 305,3565 349,3684 395,3801 444,3916 496,4031 550,4144 607,4255 666,4365 728,4474 792,4581 859,4686 928,4789 1000,4891 1073,4991 1149,5089 1228,5186 1308,5280 1391,5373 1475,5464 1562,5552 1651,5639 1741,5723 1834,5806 1929,5886 2025,5964 2124,6040 2224,6114 2325,6185 2429,6254 2534,6321 2641,6385 2750,6447 2860,6506 2972,6563 3085,6617 3199,6669 3315,6718 3433,6764 3551,6808 3671,6849 3793,6887 3915,6922 4039,6954 4164,6984 4291,7011 4418,7034 4546,7055 4675,7072 4805,7087 4936,7098 5068,7106 5201,7111 5334,7113 5468,7111 5600,7106 5732,7098 5863,7087 5993,7072 6122,7055 6250,7034 6377,7011 6503,6984 6628,6954 6752,6922 6874,6887 6935,6868">
          <text:p/>
        </draw:polygon>
        <draw:polygon draw:style-name="gr4" draw:text-style-name="P4" draw:layer="layout" svg:width="5.08cm" svg:height="7.357cm" svg:x="0cm" svg:y="11.692cm" svg:viewBox="0 0 5081 7358" draw:points="502,0 367,2 233,8 100,17 0,27 0,7358 4124,7358 4152,7323 4227,7222 4299,7119 4368,7014 4434,6907 4497,6798 4558,6686 4615,6573 4670,6459 4721,6342 4769,6225 4814,6105 4855,5984 4894,5862 4928,5738 4959,5612 4987,5485 5012,5357 5033,5228 5050,5098 5063,4966 5073,4834 5078,4700 5081,4565 5078,4431 5073,4297 5063,4164 5050,4033 5033,3902 5012,3773 4987,3645 4959,3519 4928,3393 4894,3269 4855,3147 4814,3026 4769,2906 4721,2788 4670,2672 4615,2558 4558,2445 4497,2334 4434,2225 4368,2118 4299,2013 4227,1910 4152,1809 4075,1710 3995,1613 3912,1519 3827,1427 3740,1337 3650,1250 3558,1165 3463,1083 3366,1003 3267,926 3166,851 3062,780 2957,711 2850,644 2740,581 2629,521 2515,464 2400,410 2284,359 2166,311 2046,266 1925,225 1802,187 1677,152 1552,121 1425,93 1296,68 1167,48 1036,31 904,17 771,8 637,2">
          <text:p/>
        </draw:polygon>
        <draw:polygon draw:style-name="gr5" draw:text-style-name="P5" draw:layer="layout" svg:width="2.295cm" svg:height="2.303cm" svg:x="2.277cm" svg:y="4.309cm" svg:viewBox="0 0 2296 2304" draw:points="1147,0 1013,8 884,30 760,67 643,117 532,179 430,253 336,337 252,431 179,534 117,645 67,763 30,887 8,1017 0,1151 8,1286 30,1415 67,1541 117,1659 179,1770 252,1873 336,1967 430,2051 532,2125 643,2187 760,2237 884,2274 1013,2296 1147,2304 1282,2296 1411,2274 1535,2237 1653,2187 1763,2125 1866,2051 1959,1967 2043,1873 2117,1770 2179,1659 2228,1541 2265,1415 2288,1286 2296,1151 2288,1017 2265,887 2228,763 2179,645 2117,534 2043,431 1959,337 1866,253 1763,179 1653,117 1535,67 1411,30 1282,8">
          <text:p/>
        </draw:polygon>
        <draw:frame draw:style-name="gr6" draw:text-style-name="P6" draw:layer="layout" svg:width="1.692cm" svg:height="1.692cm" svg:x="2.591cm" svg:y="4.606cm">
          <draw:image xlink:href="Pictures/100002010000003F0000003FC083061140349883.png" xlink:type="simple" xlink:show="embed" xlink:actuate="onLoad" loext:mime-type="image/png">
            <text:p/>
          </draw:image>
        </draw:frame>
        <draw:frame draw:style-name="gr7" draw:text-style-name="P8" draw:layer="layout" svg:width="10.941cm" svg:height="2.236cm" svg:x="5.535cm" svg:y="4.414cm">
          <draw:text-box>
            <text:p text:style-name="P7"><text:span text:style-name="T1">MediControl</text:span></text:p>
          </draw:text-box>
        </draw:frame>
        <draw:frame draw:style-name="gr8" draw:text-style-name="P9" draw:layer="layout" svg:width="11.5cm" svg:height="0.708cm" svg:x="2.287cm" svg:y="10.297cm">
          <draw:text-box>
            <text:p text:style-name="P7"><text:span text:style-name="T2">Aplicación de Gestión de Medicamentos</text:span></text:p>
          </draw:text-box>
        </draw:frame>
        <draw:frame draw:style-name="gr9" draw:text-style-name="P10" draw:layer="layout" svg:width="10.526cm" svg:height="0.441cm" svg:x="2.409cm" svg:y="13.135cm">
          <draw:text-box>
            <text:p text:style-name="P7"><text:span text:style-name="T3">Trabajo Práctico de Python — Introducción a la Algoritmia,</text:span></text:p>
          </draw:text-box>
        </draw:frame>
        <draw:frame draw:style-name="gr9" draw:text-style-name="P10" draw:layer="layout" svg:width="1.026cm" svg:height="0.441cm" svg:x="13.266cm" svg:y="13.135cm">
          <draw:text-box>
            <text:p text:style-name="P7"><text:span text:style-name="T3">UADE</text:span></text:p>
          </draw:text-box>
        </draw:frame>
        <draw:frame draw:style-name="gr10" draw:text-style-name="P10" draw:layer="layout" svg:width="3.664cm" svg:height="0.441cm" svg:x="2.287cm" svg:y="16.724cm">
          <draw:text-box>
            <text:p text:style-name="P7"><text:span text:style-name="T4">Cristian Aostri Lopez</text:span></text:p>
          </draw:text-box>
        </draw:frame>
        <draw:frame draw:style-name="gr10" draw:text-style-name="P10" draw:layer="layout" svg:width="0.44cm" svg:height="0.441cm" svg:x="6.25cm" svg:y="16.724cm">
          <draw:text-box>
            <text:p text:style-name="P7"><text:span text:style-name="T4">·</text:span></text:p>
          </draw:text-box>
        </draw:frame>
        <draw:frame draw:style-name="gr10" draw:text-style-name="P10" draw:layer="layout" svg:width="2.694cm" svg:height="0.441cm" svg:x="6.64cm" svg:y="16.724cm">
          <draw:text-box>
            <text:p text:style-name="P7"><text:span text:style-name="T4">David Espinosa</text:span></text:p>
          </draw:text-box>
        </draw:frame>
        <draw:frame draw:style-name="gr10" draw:text-style-name="P10" draw:layer="layout" svg:width="0.44cm" svg:height="0.441cm" svg:x="9.57cm" svg:y="16.724cm">
          <draw:text-box>
            <text:p text:style-name="P7"><text:span text:style-name="T4">·</text:span></text:p>
          </draw:text-box>
        </draw:frame>
        <draw:frame draw:style-name="gr10" draw:text-style-name="P10" draw:layer="layout" svg:width="3.605cm" svg:height="0.441cm" svg:x="9.985cm" svg:y="16.724cm">
          <draw:text-box>
            <text:p text:style-name="P7"><text:span text:style-name="T4">Facundo Balmacena</text:span></text:p>
          </draw:text-box>
        </draw:frame>
        <draw:frame draw:style-name="gr10" draw:text-style-name="P10" draw:layer="layout" svg:width="0.44cm" svg:height="0.441cm" svg:x="13.804cm" svg:y="16.724cm">
          <draw:text-box>
            <text:p text:style-name="P7"><text:span text:style-name="T4">·</text:span></text:p>
          </draw:text-box>
        </draw:frame>
        <draw:frame draw:style-name="gr10" draw:text-style-name="P10" draw:layer="layout" svg:width="2.631cm" svg:height="0.441cm" svg:x="14.211cm" svg:y="16.724cm">
          <draw:text-box>
            <text:p text:style-name="P7"><text:span text:style-name="T4">Patricio Zermo</text:span></text:p>
          </draw:text-box>
        </draw:frame>
        <draw:frame draw:style-name="gr11" draw:text-style-name="P11" draw:layer="layout" svg:width="6.627cm" svg:height="0.39cm" svg:x="2.287cm" svg:y="17.703cm">
          <draw:text-box>
            <text:p text:style-name="P7"><text:span text:style-name="T5">Python | OpenAI GPT-5.5 | python-dotenv</text:span></text:p>
          </draw:text-box>
        </draw:frame>
      </draw:page>
      <draw:page draw:name="page2" draw:style-name="dp1" draw:master-page-name="master-page3">
        <draw:polygon draw:style-name="gr1" draw:text-style-name="P1" draw:layer="layout" svg:width="33.866cm" svg:height="19.05cm" svg:x="0cm" svg:y="-0.001cm" svg:viewBox="0 0 33867 19051" draw:points="0,19051 33867,19051 33867,0 0,0">
          <text:p/>
        </draw:polygon>
        <draw:polygon draw:style-name="gr12" draw:text-style-name="P12" draw:layer="layout" svg:width="33.866cm" svg:height="19.05cm" svg:x="0cm" svg:y="-0.001cm" svg:viewBox="0 0 33867 19051" draw:points="0,19051 33867,19051 33867,0 0,0">
          <text:p/>
        </draw:polygon>
        <draw:polygon draw:style-name="gr13" draw:text-style-name="P13" draw:layer="layout" svg:width="6.612cm" svg:height="0.931cm" svg:x="1.27cm" svg:y="1.134cm" svg:viewBox="0 0 6613 932" draw:points="6150,0 462,0 339,17 229,64 135,137 63,231 16,343 0,466 16,590 63,702 135,796 229,869 339,916 462,932 6150,932 6273,916 6384,869 6477,796 6550,702 6596,590 6613,466 6596,343 6550,231 6477,137 6384,64 6273,17">
          <text:p/>
        </draw:polygon>
        <draw:frame draw:style-name="gr6" draw:text-style-name="P6" draw:layer="layout" svg:width="14.756cm" svg:height="9.355cm" svg:x="17.492cm" svg:y="6.147cm">
          <draw:image xlink:href="Pictures/100000000000022D000001614FFC3D18938308FB.jpg" xlink:type="simple" xlink:show="embed" xlink:actuate="onLoad" loext:mime-type="image/jpeg">
            <text:p/>
          </draw:image>
        </draw:frame>
        <draw:frame draw:style-name="gr14" draw:text-style-name="P14" draw:layer="layout" svg:width="12.372cm" svg:height="1.995cm" svg:x="1.841cm" svg:y="1.863cm">
          <draw:text-box>
            <text:p text:style-name="P7"><text:span text:style-name="T6">Descripción</text:span><text:span text:style-name="T7"> del</text:span></text:p>
          </draw:text-box>
        </draw:frame>
        <draw:frame draw:style-name="gr14" draw:text-style-name="P14" draw:layer="layout" svg:width="7.808cm" svg:height="1.995cm" svg:x="1.519cm" svg:y="4.26cm">
          <draw:text-box>
            <text:p text:style-name="P7"><text:span text:style-name="T8">Problema</text:span></text:p>
          </draw:text-box>
        </draw:frame>
        <draw:frame draw:style-name="gr15" draw:text-style-name="P15" draw:layer="layout" svg:width="10.868cm" svg:height="1.305cm" svg:x="1.588cm" svg:y="6.292cm">
          <draw:text-box>
            <text:p text:style-name="P7"><text:span text:style-name="T9">Olvidos </text:span><text:span text:style-name="T10">y</text:span><text:span text:style-name="T11"> Descontrol</text:span></text:p>
          </draw:text-box>
        </draw:frame>
        <draw:frame draw:style-name="gr15" draw:text-style-name="P15" draw:layer="layout" svg:width="3.169cm" svg:height="1.305cm" svg:x="1.588cm" svg:y="7.876cm">
          <draw:text-box>
            <text:p text:style-name="P7"><text:span text:style-name="T12">Diario</text:span></text:p>
          </draw:text-box>
        </draw:frame>
        <draw:frame draw:style-name="gr16" draw:text-style-name="P16" draw:layer="layout" svg:width="15.619cm" svg:height="0.539cm" svg:x="1.614cm" svg:y="9.92cm">
          <draw:text-box>
            <text:p text:style-name="P7"><text:span text:style-name="T13">Gran </text:span><text:span text:style-name="T14">parte de </text:span><text:span text:style-name="T15">la </text:span><text:span text:style-name="T16">población </text:span><text:span text:style-name="T17">debe </text:span><text:span text:style-name="T16">ingerir</text:span><text:span text:style-name="T18"> medicamentos</text:span><text:span text:style-name="T19"> periódicamente. </text:span></text:p>
          </draw:text-box>
        </draw:frame>
        <draw:frame draw:style-name="gr17" draw:text-style-name="P17" draw:layer="layout" svg:width="16.067cm" svg:height="0.539cm" svg:x="1.597cm" svg:y="10.639cm">
          <draw:text-box>
            <text:p text:style-name="P7"><text:span text:style-name="T20">Sin </text:span><text:span text:style-name="T21">embargo,</text:span><text:span text:style-name="T22">carecen</text:span><text:span text:style-name="T23"> de </text:span><text:span text:style-name="T24">herramientas</text:span><text:span text:style-name="T25"> sencillas</text:span><text:span text:style-name="T23"> de </text:span><text:span text:style-name="T26">uso </text:span><text:span text:style-name="T27">local </text:span><text:span text:style-name="T20">para organizar</text:span></text:p>
          </draw:text-box>
        </draw:frame>
        <draw:frame draw:style-name="gr16" draw:text-style-name="P16" draw:layer="layout" svg:width="13.689cm" svg:height="0.539cm" svg:x="1.597cm" svg:y="11.36cm">
          <draw:text-box>
            <text:p text:style-name="P7"><text:span text:style-name="T28">Sus dosis,</text:span><text:span text:style-name="T29"> vigilar</text:span><text:span text:style-name="T14"> su </text:span><text:span text:style-name="T30">stock </text:span><text:span text:style-name="T28">y </text:span><text:span text:style-name="T14">prevenir accidentes de vencimiento.</text:span></text:p>
          </draw:text-box>
        </draw:frame>
        <draw:frame draw:style-name="gr17" draw:text-style-name="P17" draw:layer="layout" svg:width="15.216cm" svg:height="0.539cm" svg:x="1.597cm" svg:y="12.604cm">
          <draw:text-box>
            <text:p text:style-name="P7"><text:span text:style-name="T27">Este </text:span><text:span text:style-name="T22">escenario</text:span><text:span text:style-name="T31"> golpea </text:span><text:span text:style-name="T22">fuertemente</text:span><text:span text:style-name="T32"> a </text:span><text:span text:style-name="T26">adultos</text:span><text:span text:style-name="T27"> mayores</text:span><text:span text:style-name="T25"> y </text:span><text:span text:style-name="T27">pacientes</text:span><text:span text:style-name="T32"> con </text:span></text:p>
          </draw:text-box>
        </draw:frame>
        <draw:frame draw:style-name="gr16" draw:text-style-name="P16" draw:layer="layout" svg:width="13.121cm" svg:height="0.539cm" svg:x="1.588cm" svg:y="13.325cm">
          <draw:text-box>
            <text:p text:style-name="P7"><text:span text:style-name="T13">enfermedades</text:span><text:span text:style-name="T14"> crónicas,</text:span><text:span text:style-name="T17">exponiéndolos</text:span><text:span text:style-name="T33"> a </text:span><text:span text:style-name="T14">tomas duplicadas</text:span><text:span text:style-name="T30"> o </text:span></text:p>
          </draw:text-box>
        </draw:frame>
        <draw:frame draw:style-name="gr16" draw:text-style-name="P16" draw:layer="layout" svg:width="12.605cm" svg:height="0.539cm" svg:x="1.588cm" svg:y="14.045cm">
          <draw:text-box>
            <text:p text:style-name="P7"><text:span text:style-name="T16">Desabastecimiento </text:span><text:span text:style-name="T14">repentino de </text:span><text:span text:style-name="T29">fármacos indispensables.</text:span></text:p>
          </draw:text-box>
        </draw:frame>
      </draw:page>
      <draw:page draw:name="page3" draw:style-name="dp1" draw:master-page-name="master-page3">
        <draw:polygon draw:style-name="gr1" draw:text-style-name="P1" draw:layer="layout" svg:width="33.866cm" svg:height="19.05cm" svg:x="0cm" svg:y="-0.001cm" svg:viewBox="0 0 33867 19051" draw:points="0,19051 33867,19051 33867,0 0,0">
          <text:p/>
        </draw:polygon>
        <draw:polygon draw:style-name="gr12" draw:text-style-name="P12" draw:layer="layout" svg:width="33.866cm" svg:height="19.05cm" svg:x="0cm" svg:y="-0.001cm" svg:viewBox="0 0 33867 19051" draw:points="0,19051 33867,19051 33867,0 0,0">
          <text:p/>
        </draw:polygon>
        <draw:polygon draw:style-name="gr13" draw:text-style-name="P13" draw:layer="layout" svg:width="6.612cm" svg:height="0.931cm" svg:x="1.27cm" svg:y="1.134cm" svg:viewBox="0 0 6613 932" draw:points="6150,0 462,0 339,17 229,64 135,137 63,231 16,343 0,466 16,590 63,702 135,796 229,869 339,916 462,932 6150,932 6273,916 6384,869 6477,796 6550,702 6596,590 6613,466 6596,343 6550,231 6477,137 6384,64 6273,17">
          <text:p/>
        </draw:polygon>
        <draw:frame draw:style-name="gr6" draw:text-style-name="P6" draw:layer="layout" svg:width="1.108cm" svg:height="0.981cm" svg:x="16.375cm" svg:y="7.747cm">
          <draw:image xlink:href="Pictures/1000000000000029000000255ECB02AA61D963CA.jpg" xlink:type="simple" xlink:show="embed" xlink:actuate="onLoad" loext:mime-type="image/jpeg">
            <text:p/>
          </draw:image>
        </draw:frame>
        <draw:frame draw:style-name="gr6" draw:text-style-name="P6" draw:layer="layout" svg:width="1.108cm" svg:height="0.981cm" svg:x="5.927cm" svg:y="7.747cm">
          <draw:image xlink:href="Pictures/10000000000000290000002556F349483E791F50.jpg" xlink:type="simple" xlink:show="embed" xlink:actuate="onLoad" loext:mime-type="image/jpeg">
            <text:p/>
          </draw:image>
        </draw:frame>
        <draw:frame draw:style-name="gr18" draw:text-style-name="P18" draw:layer="layout" svg:width="10.611cm" svg:height="2.05cm" svg:x="1.527cm" svg:y="1.863cm">
          <draw:text-box>
            <text:p text:style-name="P7"><text:span text:style-name="T34">Relevancia</text:span><text:span text:style-name="T35"> y</text:span></text:p>
          </draw:text-box>
        </draw:frame>
        <draw:frame draw:style-name="gr18" draw:text-style-name="P18" draw:layer="layout" svg:width="10.365cm" svg:height="2.05cm" svg:x="1.527cm" svg:y="4.319cm">
          <draw:text-box>
            <text:p text:style-name="P7"><text:span text:style-name="T36">Justificación</text:span></text:p>
          </draw:text-box>
        </draw:frame>
        <draw:frame draw:style-name="gr15" draw:text-style-name="P15" draw:layer="layout" svg:width="4.455cm" svg:height="1.305cm" svg:x="4.054cm" svg:y="9.459cm">
          <draw:text-box>
            <text:p text:style-name="P7"><text:span text:style-name="T37">Impacto</text:span></text:p>
          </draw:text-box>
        </draw:frame>
        <draw:frame draw:style-name="gr15" draw:text-style-name="P15" draw:layer="layout" svg:width="3.156cm" svg:height="1.305cm" svg:x="4.824cm" svg:y="11.043cm">
          <draw:text-box>
            <text:p text:style-name="P7"><text:span text:style-name="T38">Social</text:span></text:p>
          </draw:text-box>
        </draw:frame>
        <draw:frame draw:style-name="gr19" draw:text-style-name="P19" draw:layer="layout" svg:width="7.711cm" svg:height="0.425cm" svg:x="3.147cm" svg:y="13.068cm">
          <draw:text-box>
            <text:p text:style-name="P7"><text:span text:style-name="T39">Mitiga </text:span><text:span text:style-name="T40">el </text:span><text:span text:style-name="T41">riesgo</text:span><text:span text:style-name="T40"> sanitario </text:span><text:span text:style-name="T42">directo</text:span><text:span text:style-name="T40"> en el </text:span><text:span text:style-name="T43">hogar,</text:span></text:p>
          </draw:text-box>
        </draw:frame>
        <draw:frame draw:style-name="gr20" draw:text-style-name="P19" draw:layer="layout" svg:width="8.629cm" svg:height="0.425cm" svg:x="2.656cm" svg:y="13.635cm">
          <draw:text-box>
            <text:p text:style-name="P7"><text:span text:style-name="T44">protegiendo</text:span><text:span text:style-name="T45"> la </text:span><text:span text:style-name="T41">salud </text:span><text:span text:style-name="T46">de </text:span><text:span text:style-name="T47">poblaciones</text:span><text:span text:style-name="T48"> vulnerables</text:span><text:span text:style-name="T46"> y</text:span></text:p>
          </draw:text-box>
        </draw:frame>
        <draw:frame draw:style-name="gr19" draw:text-style-name="P19" draw:layer="layout" svg:width="7.643cm" svg:height="0.425cm" svg:x="3.071cm" svg:y="14.212cm">
          <draw:text-box>
            <text:p text:style-name="P7"><text:span text:style-name="T49">facilitando</text:span><text:span text:style-name="T50"> la </text:span><text:span text:style-name="T51">labor </text:span><text:span text:style-name="T43">de </text:span><text:span text:style-name="T52">cuidadores</text:span><text:span text:style-name="T49"> familiares.</text:span></text:p>
          </draw:text-box>
        </draw:frame>
        <draw:frame draw:style-name="gr15" draw:text-style-name="P15" draw:layer="layout" svg:width="6.056cm" svg:height="1.305cm" svg:x="14.26cm" svg:y="9.459cm">
          <draw:text-box>
            <text:p text:style-name="P7"><text:span text:style-name="T53">Prevención</text:span></text:p>
          </draw:text-box>
        </draw:frame>
        <draw:frame draw:style-name="gr15" draw:text-style-name="P15" draw:layer="layout" svg:width="3.423cm" svg:height="1.305cm" svg:x="15.581cm" svg:y="11.043cm">
          <draw:text-box>
            <text:p text:style-name="P7"><text:span text:style-name="T54">Activo</text:span></text:p>
          </draw:text-box>
        </draw:frame>
        <draw:frame draw:style-name="gr19" draw:text-style-name="P19" draw:layer="layout" svg:width="9.061cm" svg:height="0.425cm" svg:x="13.354cm" svg:y="13.068cm">
          <draw:text-box>
            <text:p text:style-name="P7"><text:span text:style-name="T49">Previene </text:span><text:span text:style-name="T46">situaciones</text:span><text:span text:style-name="T52"> críticas</text:span><text:span text:style-name="T41"> de </text:span><text:span text:style-name="T47">desabastecimiento </text:span><text:span text:style-name="T42">o</text:span></text:p>
          </draw:text-box>
        </draw:frame>
        <draw:frame draw:style-name="gr20" draw:text-style-name="P19" draw:layer="layout" svg:width="8.232cm" svg:height="0.425cm" svg:x="13.744cm" svg:y="13.635cm">
          <draw:text-box>
            <text:p text:style-name="P7"><text:span text:style-name="T55">tomas</text:span><text:span text:style-name="T56"> de </text:span><text:span text:style-name="T46">fármacos </text:span><text:span text:style-name="T44">caducados </text:span><text:span text:style-name="T49">mediante</text:span><text:span text:style-name="T48"> alertas</text:span></text:p>
          </draw:text-box>
        </draw:frame>
        <draw:frame draw:style-name="gr19" draw:text-style-name="P19" draw:layer="layout" svg:width="5.107cm" svg:height="0.425cm" svg:x="14.963cm" svg:y="14.212cm">
          <draw:text-box>
            <text:p text:style-name="P7"><text:span text:style-name="T51">automáticas </text:span><text:span text:style-name="T52">parametrizables.</text:span></text:p>
          </draw:text-box>
        </draw:frame>
        <draw:frame draw:style-name="gr15" draw:text-style-name="P15" draw:layer="layout" svg:width="6.826cm" svg:height="1.305cm" svg:x="23.863cm" svg:y="9.493cm">
          <draw:text-box>
            <text:p text:style-name="P7"><text:span text:style-name="T53">Acceso Local</text:span></text:p>
          </draw:text-box>
        </draw:frame>
        <draw:frame draw:style-name="gr19" draw:text-style-name="P19" draw:layer="layout" svg:width="8.295cm" svg:height="0.425cm" svg:x="23.71cm" svg:y="11.518cm">
          <draw:text-box>
            <text:p text:style-name="P7"><text:span text:style-name="T57">AI </text:span><text:span text:style-name="T42">no </text:span><text:span text:style-name="T43">requerir</text:span><text:span text:style-name="T40"> internet </text:span><text:span text:style-name="T58">ni </text:span><text:span text:style-name="T40">registros </text:span><text:span text:style-name="T59">complejos,</text:span><text:span text:style-name="T60"> el</text:span></text:p>
          </draw:text-box>
        </draw:frame>
        <draw:frame draw:style-name="gr19" draw:text-style-name="P19" draw:layer="layout" svg:width="9.4cm" svg:height="0.425cm" svg:x="23.396cm" svg:y="12.086cm">
          <draw:text-box>
            <text:p text:style-name="P7"><text:span text:style-name="T61">Software </text:span><text:span text:style-name="T47">es </text:span><text:span text:style-name="T51">extremadamente </text:span><text:span text:style-name="T52">accesible</text:span><text:span text:style-name="T40"> y</text:span><text:span text:style-name="T47"> seguro </text:span><text:span text:style-name="T46">para <text:s/></text:span></text:p>
          </draw:text-box>
        </draw:frame>
        <draw:frame draw:style-name="gr19" draw:text-style-name="P19" draw:layer="layout" svg:width="6.487cm" svg:height="0.425cm" svg:x="24.523cm" svg:y="12.662cm">
          <draw:text-box>
            <text:p text:style-name="P7"><text:span text:style-name="T48">resguardar</text:span><text:span text:style-name="T62"> la </text:span><text:span text:style-name="T43">privacidad del </text:span><text:span text:style-name="T51">paciente.</text:span></text:p>
          </draw:text-box>
        </draw:frame>
      </draw:page>
      <draw:page draw:name="page4" draw:style-name="dp1" draw:master-page-name="master-page3">
        <draw:polygon draw:style-name="gr1" draw:text-style-name="P1" draw:layer="layout" svg:width="33.866cm" svg:height="19.05cm" svg:x="0cm" svg:y="-0.001cm" svg:viewBox="0 0 33867 19051" draw:points="0,19051 33867,19051 33867,0 0,0">
          <text:p/>
        </draw:polygon>
        <draw:polygon draw:style-name="gr12" draw:text-style-name="P12" draw:layer="layout" svg:width="33.866cm" svg:height="19.05cm" svg:x="0cm" svg:y="-0.001cm" svg:viewBox="0 0 33867 19051" draw:points="0,19051 33867,19051 33867,0 0,0">
          <text:p/>
        </draw:polygon>
        <draw:polygon draw:style-name="gr13" draw:text-style-name="P13" draw:layer="layout" svg:width="6.612cm" svg:height="0.931cm" svg:x="1.27cm" svg:y="1.134cm" svg:viewBox="0 0 6613 932" draw:points="6150,0 462,0 339,17 229,64 135,137 63,231 16,343 0,466 16,590 63,702 135,796 229,869 339,916 462,932 6150,932 6273,916 6384,869 6477,796 6550,702 6596,590 6613,466 6596,343 6550,231 6477,137 6384,64 6273,17">
          <text:p/>
        </draw:polygon>
        <draw:frame draw:style-name="gr11" draw:text-style-name="P11" draw:layer="layout" svg:width="1.42cm" svg:height="0.39cm" svg:x="2.767cm" svg:y="1.424cm">
          <draw:text-box>
            <text:p text:style-name="P7"><text:span text:style-name="T63">AGENDA</text:span></text:p>
          </draw:text-box>
        </draw:frame>
        <draw:frame draw:style-name="gr21" draw:text-style-name="P20" draw:layer="layout" svg:width="15.094cm" svg:height="1.322cm" svg:x="1.27cm" svg:y="2.544cm">
          <draw:text-box>
            <text:p text:style-name="P7"><text:span text:style-name="T64">Contenido de la presentación</text:span></text:p>
          </draw:text-box>
        </draw:frame>
        <draw:polygon draw:style-name="gr22" draw:text-style-name="P21" draw:layer="layout" svg:width="1.007cm" svg:height="0.999cm" svg:x="1.27cm" svg:y="6.46cm" svg:viewBox="0 0 1008 1000" draw:points="504,0 370,18 250,69 147,147 68,248 17,367 0,500 17,633 68,752 147,853 250,932 370,982 504,1000 638,982 759,932 860,853 939,752 990,633 1008,500 990,367 939,248 860,147 759,69 638,18">
          <text:p/>
        </draw:polygon>
        <draw:frame draw:style-name="gr23" draw:text-style-name="P22" draw:layer="layout" svg:width="13.307cm" svg:height="0.492cm" svg:x="1.27cm" svg:y="4.286cm">
          <draw:text-box>
            <text:p text:style-name="P7"><text:span text:style-name="T65">Recorrido por el proyecto, de la idea al código y a la futura interfaz</text:span></text:p>
          </draw:text-box>
        </draw:frame>
        <draw:frame draw:style-name="gr23" draw:text-style-name="P22" draw:layer="layout" svg:width="0.49cm" svg:height="0.492cm" svg:x="1.653cm" svg:y="6.729cm">
          <draw:text-box>
            <text:p text:style-name="P7"><text:span text:style-name="T66">1</text:span></text:p>
          </draw:text-box>
        </draw:frame>
        <draw:frame draw:style-name="gr16" draw:text-style-name="P16" draw:layer="layout" svg:width="5.488cm" svg:height="0.539cm" svg:x="2.643cm" svg:y="6.411cm">
          <draw:text-box>
            <text:p text:style-name="P7"><text:span text:style-name="T67">Descripción del proyecto</text:span></text:p>
          </draw:text-box>
        </draw:frame>
        <draw:polygon draw:style-name="gr22" draw:text-style-name="P21" draw:layer="layout" svg:width="1.007cm" svg:height="1.008cm" svg:x="1.27cm" svg:y="8.864cm" svg:viewBox="0 0 1008 1009" draw:points="504,0 370,18 250,69 147,148 68,250 17,370 0,504 17,638 68,759 147,861 250,940 370,991 504,1009 638,991 759,940 860,861 939,759 990,638 1008,504 990,370 939,250 860,148 759,69 638,18">
          <text:p/>
        </draw:polygon>
        <draw:frame draw:style-name="gr20" draw:text-style-name="P19" draw:layer="layout" svg:width="7.965cm" svg:height="0.425cm" svg:x="2.643cm" svg:y="7.102cm">
          <draw:text-box>
            <text:p text:style-name="P7"><text:span text:style-name="T68">Qué es MediControl y cómo está estructurado</text:span></text:p>
          </draw:text-box>
        </draw:frame>
        <draw:frame draw:style-name="gr23" draw:text-style-name="P22" draw:layer="layout" svg:width="0.49cm" svg:height="0.492cm" svg:x="1.653cm" svg:y="9.146cm">
          <draw:text-box>
            <text:p text:style-name="P7"><text:span text:style-name="T66">2</text:span></text:p>
          </draw:text-box>
        </draw:frame>
        <draw:frame draw:style-name="gr16" draw:text-style-name="P16" draw:layer="layout" svg:width="3.363cm" svg:height="0.539cm" svg:x="2.643cm" svg:y="8.828cm">
          <draw:text-box>
            <text:p text:style-name="P7"><text:span text:style-name="T67">Menú principal</text:span></text:p>
          </draw:text-box>
        </draw:frame>
        <draw:polygon draw:style-name="gr22" draw:text-style-name="P21" draw:layer="layout" svg:width="1.007cm" svg:height="1.033cm" svg:x="1.27cm" svg:y="11.269cm" svg:viewBox="0 0 1008 1034" draw:points="504,0 370,18 250,70 147,151 68,255 17,379 0,516 17,654 68,778 147,882 250,963 370,1015 504,1034 638,1015 759,963 860,882 939,778 990,654 1008,516 990,379 939,255 860,151 759,70 638,18">
          <text:p/>
        </draw:polygon>
        <draw:frame draw:style-name="gr20" draw:text-style-name="P19" draw:layer="layout" svg:width="6.868cm" svg:height="0.425cm" svg:x="2.643cm" svg:y="9.519cm">
          <draw:text-box>
            <text:p text:style-name="P7"><text:span text:style-name="T68">9 opciones de navegación del programa</text:span></text:p>
          </draw:text-box>
        </draw:frame>
        <draw:frame draw:style-name="gr23" draw:text-style-name="P22" draw:layer="layout" svg:width="0.49cm" svg:height="0.492cm" svg:x="1.653cm" svg:y="11.564cm">
          <draw:text-box>
            <text:p text:style-name="P7"><text:span text:style-name="T66">3</text:span></text:p>
          </draw:text-box>
        </draw:frame>
        <draw:frame draw:style-name="gr16" draw:text-style-name="P16" draw:layer="layout" svg:width="5.874cm" svg:height="0.539cm" svg:x="2.643cm" svg:y="11.246cm">
          <draw:text-box>
            <text:p text:style-name="P7"><text:span text:style-name="T67">Código: alta y validaciones</text:span></text:p>
          </draw:text-box>
        </draw:frame>
        <draw:polygon draw:style-name="gr22" draw:text-style-name="P21" draw:layer="layout" svg:width="1.007cm" svg:height="1.024cm" svg:x="1.27cm" svg:y="13.682cm" svg:viewBox="0 0 1008 1025" draw:points="504,0 370,18 250,69 147,151 68,254 17,377 0,513 17,649 68,771 147,875 250,955 370,1007 504,1025 638,1007 759,955 860,875 939,771 990,649 1008,513 990,377 939,254 860,151 759,69 638,18">
          <text:p/>
        </draw:polygon>
        <draw:frame draw:style-name="gr20" draw:text-style-name="P19" draw:layer="layout" svg:width="6.877cm" svg:height="0.425cm" svg:x="2.643cm" svg:y="11.937cm">
          <draw:text-box>
            <text:p text:style-name="P7"><text:span text:style-name="T68">agregar_medicamento() y pedir_fecha()</text:span></text:p>
          </draw:text-box>
        </draw:frame>
        <draw:frame draw:style-name="gr23" draw:text-style-name="P22" draw:layer="layout" svg:width="0.49cm" svg:height="0.492cm" svg:x="1.653cm" svg:y="13.981cm">
          <draw:text-box>
            <text:p text:style-name="P7"><text:span text:style-name="T66">4</text:span></text:p>
          </draw:text-box>
        </draw:frame>
        <draw:frame draw:style-name="gr16" draw:text-style-name="P16" draw:layer="layout" svg:width="5.641cm" svg:height="0.539cm" svg:x="2.643cm" svg:y="13.663cm">
          <draw:text-box>
            <text:p text:style-name="P7"><text:span text:style-name="T67">Código: toma y búsqueda</text:span></text:p>
          </draw:text-box>
        </draw:frame>
        <draw:polygon draw:style-name="gr22" draw:text-style-name="P21" draw:layer="layout" svg:width="0.999cm" svg:height="0.999cm" svg:x="16.645cm" svg:y="6.46cm" svg:viewBox="0 0 1000 1000" draw:points="500,0 367,18 247,69 146,147 68,248 18,367 0,500 18,633 68,752 146,853 247,932 367,982 500,1000 632,982 752,932 854,853 932,752 982,633 1000,500 982,367 932,248 854,147 752,69 632,18">
          <text:p/>
        </draw:polygon>
        <draw:frame draw:style-name="gr19" draw:text-style-name="P19" draw:layer="layout" svg:width="7.22cm" svg:height="0.425cm" svg:x="2.643cm" svg:y="14.355cm">
          <draw:text-box>
            <text:p text:style-name="P7"><text:span text:style-name="T68">registrar_toma() y buscar_medicamento()</text:span></text:p>
          </draw:text-box>
        </draw:frame>
        <draw:frame draw:style-name="gr23" draw:text-style-name="P22" draw:layer="layout" svg:width="0.49cm" svg:height="0.492cm" svg:x="17.035cm" svg:y="6.729cm">
          <draw:text-box>
            <text:p text:style-name="P7"><text:span text:style-name="T66">5</text:span></text:p>
          </draw:text-box>
        </draw:frame>
        <draw:frame draw:style-name="gr16" draw:text-style-name="P16" draw:layer="layout" svg:width="8.003cm" svg:height="0.539cm" svg:x="18.026cm" svg:y="6.411cm">
          <draw:text-box>
            <text:p text:style-name="P7"><text:span text:style-name="T67">Stock, vencimientos y días restantes</text:span></text:p>
          </draw:text-box>
        </draw:frame>
        <draw:polygon draw:style-name="gr22" draw:text-style-name="P21" draw:layer="layout" svg:width="0.999cm" svg:height="1.008cm" svg:x="16.645cm" svg:y="8.864cm" svg:viewBox="0 0 1000 1009" draw:points="500,0 367,18 247,69 146,148 68,250 18,370 0,504 18,638 68,759 146,861 247,940 367,991 500,1009 632,991 752,940 854,861 932,759 982,638 1000,504 982,370 932,250 854,148 752,69 632,18">
          <text:p/>
        </draw:polygon>
        <draw:frame draw:style-name="gr20" draw:text-style-name="P19" draw:layer="layout" svg:width="7.728cm" svg:height="0.425cm" svg:x="18.026cm" svg:y="7.102cm">
          <draw:text-box>
            <text:p text:style-name="P7"><text:span text:style-name="T68">verificar_alertas() y calcular_dias_restantes()</text:span></text:p>
          </draw:text-box>
        </draw:frame>
        <draw:frame draw:style-name="gr23" draw:text-style-name="P22" draw:layer="layout" svg:width="0.49cm" svg:height="0.492cm" svg:x="17.035cm" svg:y="9.146cm">
          <draw:text-box>
            <text:p text:style-name="P7"><text:span text:style-name="T66">6</text:span></text:p>
          </draw:text-box>
        </draw:frame>
        <draw:frame draw:style-name="gr16" draw:text-style-name="P16" draw:layer="layout" svg:width="5.429cm" svg:height="0.539cm" svg:x="18.026cm" svg:y="8.828cm">
          <draw:text-box>
            <text:p text:style-name="P7"><text:span text:style-name="T67">Asistente IA con GPT-5.5</text:span></text:p>
          </draw:text-box>
        </draw:frame>
        <draw:polygon draw:style-name="gr22" draw:text-style-name="P21" draw:layer="layout" svg:width="0.999cm" svg:height="1.033cm" svg:x="16.645cm" svg:y="11.269cm" svg:viewBox="0 0 1000 1034" draw:points="500,0 367,18 247,70 146,151 68,255 18,379 0,516 18,654 68,778 146,882 247,963 367,1015 500,1034 632,1015 752,963 854,882 932,778 982,654 1000,516 982,379 932,255 854,151 752,70 632,18">
          <text:p/>
        </draw:polygon>
        <draw:frame draw:style-name="gr20" draw:text-style-name="P19" draw:layer="layout" svg:width="5.861cm" svg:height="0.425cm" svg:x="18.026cm" svg:y="9.519cm">
          <draw:text-box>
            <text:p text:style-name="P7"><text:span text:style-name="T68">hablar_con_ia() y el loop principal</text:span></text:p>
          </draw:text-box>
        </draw:frame>
        <draw:frame draw:style-name="gr23" draw:text-style-name="P22" draw:layer="layout" svg:width="0.49cm" svg:height="0.492cm" svg:x="17.035cm" svg:y="11.564cm">
          <draw:text-box>
            <text:p text:style-name="P7"><text:span text:style-name="T66">7</text:span></text:p>
          </draw:text-box>
        </draw:frame>
        <draw:frame draw:style-name="gr24" draw:text-style-name="P23" draw:layer="layout" svg:width="6.585cm" svg:height="0.323cm" svg:x="1.27cm" svg:y="18.254cm">
          <draw:text-box>
            <text:p text:style-name="P7"><text:span text:style-name="T69">MediControl — UADE, Introducción a la Algoritmia</text:span></text:p>
          </draw:text-box>
        </draw:frame>
        <draw:frame draw:style-name="gr24" draw:text-style-name="P23" draw:layer="layout" svg:width="0.321cm" svg:height="0.323cm" svg:x="32.47cm" svg:y="18.254cm">
          <draw:text-box>
            <text:p text:style-name="P7"><text:span text:style-name="T69">4</text:span></text:p>
          </draw:text-box>
        </draw:frame>
        <draw:frame draw:style-name="gr16" draw:text-style-name="P16" draw:layer="layout" svg:width="6.915cm" svg:height="0.539cm" svg:x="18.026cm" svg:y="11.246cm">
          <draw:text-box>
            <text:p text:style-name="P7"><text:span text:style-name="T67">El futuro: de la consola a la app</text:span></text:p>
          </draw:text-box>
        </draw:frame>
        <draw:frame draw:style-name="gr20" draw:text-style-name="P19" draw:layer="layout" svg:width="5.713cm" svg:height="0.425cm" svg:x="18.026cm" svg:y="11.937cm">
          <draw:text-box>
            <text:p text:style-name="P7"><text:span text:style-name="T68">Mockups de la interfaz que viene</text:span></text:p>
          </draw:text-box>
        </draw:frame>
      </draw:page>
      <draw:page draw:name="page5" draw:style-name="dp1" draw:master-page-name="master-page3">
        <draw:polygon draw:style-name="gr1" draw:text-style-name="P1" draw:layer="layout" svg:width="33.866cm" svg:height="19.05cm" svg:x="0cm" svg:y="-0.001cm" svg:viewBox="0 0 33867 19051" draw:points="0,19051 33867,19051 33867,0 0,0">
          <text:p/>
        </draw:polygon>
        <draw:polygon draw:style-name="gr12" draw:text-style-name="P12" draw:layer="layout" svg:width="33.866cm" svg:height="19.05cm" svg:x="0cm" svg:y="-0.001cm" svg:viewBox="0 0 33867 19051" draw:points="0,19051 33867,19051 33867,0 0,0">
          <text:p/>
        </draw:polygon>
        <draw:polygon draw:style-name="gr13" draw:text-style-name="P13" draw:layer="layout" svg:width="6.612cm" svg:height="0.931cm" svg:x="1.27cm" svg:y="1.134cm" svg:viewBox="0 0 6613 932" draw:points="6150,0 462,0 339,17 229,64 135,137 63,231 16,343 0,466 16,590 63,702 135,796 229,869 339,916 462,932 6150,932 6273,916 6384,869 6477,796 6550,702 6596,590 6613,466 6596,343 6550,231 6477,137 6384,64 6273,17">
          <text:p/>
        </draw:polygon>
        <draw:frame draw:style-name="gr11" draw:text-style-name="P11" draw:layer="layout" svg:width="2.195cm" svg:height="0.39cm" svg:x="1.783cm" svg:y="1.424cm">
          <draw:text-box>
            <text:p text:style-name="P7"><text:span text:style-name="T63">EL PROYECTO</text:span></text:p>
          </draw:text-box>
        </draw:frame>
        <draw:polygon draw:style-name="gr13" draw:text-style-name="P13" draw:layer="layout" svg:width="18.042cm" svg:height="5.207cm" svg:x="1.27cm" svg:y="5.215cm" svg:viewBox="0 0 18043 5208" draw:points="17839,0 203,0 124,16 59,60 15,124 0,203 0,5005 15,5084 59,5148 124,5192 203,5208 17839,5208 17919,5192 17983,5148 18027,5084 18043,5005 18043,203 18027,124 17983,60 17919,16">
          <text:p/>
        </draw:polygon>
        <draw:frame draw:style-name="gr21" draw:text-style-name="P20" draw:layer="layout" svg:width="11.144cm" svg:height="1.322cm" svg:x="1.27cm" svg:y="2.544cm">
          <draw:text-box>
            <text:p text:style-name="P7"><text:span text:style-name="T64">¿Qué es MediControl?</text:span></text:p>
          </draw:text-box>
        </draw:frame>
        <draw:frame draw:style-name="gr25" draw:text-style-name="P24" draw:layer="layout" svg:width="15.674cm" svg:height="0.492cm" svg:x="2.16cm" svg:y="5.807cm">
          <draw:text-box>
            <text:p text:style-name="P7"><text:span text:style-name="T70">Programa de consola en Python que permite registrar, consultar y administrar </text:span></text:p>
          </draw:text-box>
        </draw:frame>
        <draw:frame draw:style-name="gr23" draw:text-style-name="P22" draw:layer="layout" svg:width="13.659cm" svg:height="0.492cm" svg:x="2.16cm" svg:y="6.512cm">
          <draw:text-box>
            <text:p text:style-name="P7"><text:span text:style-name="T71">los medicamentos del hogar. Funciona sin internet, sin registro y sin </text:span></text:p>
          </draw:text-box>
        </draw:frame>
        <draw:frame draw:style-name="gr23" draw:text-style-name="P22" draw:layer="layout" svg:width="5.061cm" svg:height="0.492cm" svg:x="2.16cm" svg:y="7.206cm">
          <draw:text-box>
            <text:p text:style-name="P7"><text:span text:style-name="T71">instalaciones adicionales.</text:span></text:p>
          </draw:text-box>
        </draw:frame>
        <draw:frame draw:style-name="gr6" draw:text-style-name="P6" draw:layer="layout" svg:width="6.146cm" svg:height="3.657cm" svg:x="1.033cm" svg:y="10.905cm">
          <draw:image xlink:href="Pictures/10000201000000E8000000D00863E18EB1D404C0.png" xlink:type="simple" xlink:show="embed" xlink:actuate="onLoad" loext:mime-type="image/png">
            <text:p/>
          </draw:image>
        </draw:frame>
        <draw:polygon draw:style-name="gr1" draw:text-style-name="P1" draw:layer="layout" svg:width="5.655cm" svg:height="3.175cm" svg:x="1.286cm" svg:y="11.074cm" svg:viewBox="0 0 5656 3176" draw:points="5453,0 203,0 124,16 60,60 16,125 0,204 0,2972 16,3052 60,3116 124,3160 203,3176 5453,3176 5532,3160 5596,3116 5640,3052 5656,2972 5656,204 5640,125 5596,60 5532,16">
          <text:p/>
        </draw:polygon>
        <draw:polygon draw:style-name="gr26" draw:text-style-name="P6" draw:layer="layout" svg:width="5.655cm" svg:height="3.175cm" svg:x="1.286cm" svg:y="11.074cm" svg:viewBox="0 0 5656 3176" draw:points="0,204 16,125 60,60 124,16 203,0 5453,0 5532,16 5596,60 5640,125 5656,204 5656,2972 5640,3052 5596,3116 5532,3160 5453,3176 203,3176 124,3160 60,3116 16,3052 0,2972">
          <text:p/>
        </draw:polygon>
        <draw:frame draw:style-name="gr9" draw:text-style-name="P10" draw:layer="layout" svg:width="15.212cm" svg:height="0.441cm" svg:x="2.16cm" svg:y="8.465cm">
          <draw:text-box>
            <text:p text:style-name="P7"><text:span text:style-name="T72">Pensado especialmente para adultos mayores y personas con enfermedades crónicas.</text:span></text:p>
          </draw:text-box>
        </draw:frame>
        <draw:frame draw:style-name="gr27" draw:text-style-name="P25" draw:layer="layout" svg:width="1.058cm" svg:height="1.246cm" svg:x="3.797cm" svg:y="11.426cm">
          <draw:text-box>
            <text:p text:style-name="P7"><text:span text:style-name="T73">9</text:span></text:p>
          </draw:text-box>
        </draw:frame>
        <draw:frame draw:style-name="gr6" draw:text-style-name="P6" draw:layer="layout" svg:width="6.154cm" svg:height="3.657cm" svg:x="7.197cm" svg:y="10.905cm">
          <draw:image xlink:href="Pictures/10000201000000E8000000D0320F05451DE8BCD3.png" xlink:type="simple" xlink:show="embed" xlink:actuate="onLoad" loext:mime-type="image/png">
            <text:p/>
          </draw:image>
        </draw:frame>
        <draw:polygon draw:style-name="gr1" draw:text-style-name="P1" draw:layer="layout" svg:width="5.656cm" svg:height="3.175cm" svg:x="7.45cm" svg:y="11.074cm" svg:viewBox="0 0 5657 3176" draw:points="5454,0 203,0 124,16 59,60 16,125 0,204 0,2972 16,3052 59,3116 124,3160 203,3176 5454,3176 5533,3160 5597,3116 5641,3052 5657,2972 5657,204 5641,125 5597,60 5533,16">
          <text:p/>
        </draw:polygon>
        <draw:polygon draw:style-name="gr26" draw:text-style-name="P6" draw:layer="layout" svg:width="5.656cm" svg:height="3.175cm" svg:x="7.45cm" svg:y="11.074cm" svg:viewBox="0 0 5657 3176" draw:points="0,204 16,125 59,60 124,16 203,0 5454,0 5533,16 5597,60 5641,125 5657,204 5657,2972 5641,3052 5597,3116 5533,3160 5454,3176 203,3176 124,3160 59,3116 16,3052 0,2972">
          <text:p/>
        </draw:polygon>
        <draw:frame draw:style-name="gr28" draw:text-style-name="P26" draw:layer="layout" svg:width="2.775cm" svg:height="0.374cm" svg:x="2.747cm" svg:y="13.305cm">
          <draw:text-box>
            <text:p text:style-name="P7"><text:span text:style-name="T74">opciones de menú</text:span></text:p>
          </draw:text-box>
        </draw:frame>
        <draw:frame draw:style-name="gr27" draw:text-style-name="P25" draw:layer="layout" svg:width="1.058cm" svg:height="1.246cm" svg:x="9.983cm" svg:y="11.426cm">
          <draw:text-box>
            <text:p text:style-name="P7"><text:span text:style-name="T73">9</text:span></text:p>
          </draw:text-box>
        </draw:frame>
        <draw:frame draw:style-name="gr6" draw:text-style-name="P6" draw:layer="layout" svg:width="6.154cm" svg:height="3.657cm" svg:x="13.386cm" svg:y="10.905cm">
          <draw:image xlink:href="Pictures/10000201000000E8000000D02A6FB31F89D91DB7.png" xlink:type="simple" xlink:show="embed" xlink:actuate="onLoad" loext:mime-type="image/png">
            <text:p/>
          </draw:image>
        </draw:frame>
        <draw:polygon draw:style-name="gr1" draw:text-style-name="P1" draw:layer="layout" svg:width="5.665cm" svg:height="3.175cm" svg:x="13.639cm" svg:y="11.074cm" svg:viewBox="0 0 5666 3176" draw:points="5462,0 204,0 124,16 60,60 16,125 0,204 0,2972 16,3052 60,3116 124,3160 204,3176 5462,3176 5541,3160 5606,3116 5650,3052 5666,2972 5666,204 5650,125 5606,60 5541,16">
          <text:p/>
        </draw:polygon>
        <draw:polygon draw:style-name="gr26" draw:text-style-name="P6" draw:layer="layout" svg:width="5.665cm" svg:height="3.175cm" svg:x="13.639cm" svg:y="11.074cm" svg:viewBox="0 0 5666 3176" draw:points="0,204 16,125 60,60 124,16 204,0 5462,0 5541,16 5606,60 5650,125 5666,204 5666,2972 5650,3052 5606,3116 5541,3160 5462,3176 204,3176 124,3160 60,3116 16,3052 0,2972">
          <text:p/>
        </draw:polygon>
        <draw:frame draw:style-name="gr28" draw:text-style-name="P26" draw:layer="layout" svg:width="3.185cm" svg:height="0.374cm" svg:x="8.746cm" svg:y="13.305cm">
          <draw:text-box>
            <text:p text:style-name="P7"><text:span text:style-name="T74">funciones principales</text:span></text:p>
          </draw:text-box>
        </draw:frame>
        <draw:frame draw:style-name="gr27" draw:text-style-name="P25" draw:layer="layout" svg:width="1.058cm" svg:height="1.246cm" svg:x="16.16cm" svg:y="11.426cm">
          <draw:text-box>
            <text:p text:style-name="P7"><text:span text:style-name="T73">1</text:span></text:p>
          </draw:text-box>
        </draw:frame>
        <draw:frame draw:style-name="gr28" draw:text-style-name="P26" draw:layer="layout" svg:width="3.304cm" svg:height="0.374cm" svg:x="14.848cm" svg:y="13.305cm">
          <draw:text-box>
            <text:p text:style-name="P7"><text:span text:style-name="T74">asistente IA integrado</text:span></text:p>
          </draw:text-box>
        </draw:frame>
        <draw:polygon draw:style-name="gr1" draw:text-style-name="P1" draw:layer="layout" svg:width="12.463cm" svg:height="1.981cm" svg:x="20.201cm" svg:y="6.231cm" svg:viewBox="0 0 12464 1982" draw:points="12286,0 178,0 109,14 52,52 14,108 0,177 0,1804 14,1874 52,1930 109,1968 178,1982 12286,1982 12355,1968 12412,1930 12450,1874 12464,1804 12464,177 12450,108 12412,52 12355,14">
          <text:p/>
        </draw:polygon>
        <draw:polygon draw:style-name="gr26" draw:text-style-name="P6" draw:layer="layout" svg:width="12.463cm" svg:height="1.981cm" svg:x="20.201cm" svg:y="6.231cm" svg:viewBox="0 0 12464 1982" draw:points="0,177 14,108 52,52 109,14 178,0 12286,0 12355,14 12412,52 12450,108 12464,177 12464,1804 12450,1874 12412,1930 12355,1968 12286,1982 178,1982 109,1968 52,1930 14,1874 0,1804">
          <text:p/>
        </draw:polygon>
        <draw:frame draw:style-name="gr29" draw:text-style-name="P27" draw:layer="layout" svg:width="4.938cm" svg:height="0.649cm" svg:x="20.43cm" svg:y="4.557cm">
          <draw:text-box>
            <text:p text:style-name="P7"><text:span text:style-name="T75">Librerías utilizadas</text:span></text:p>
          </draw:text-box>
        </draw:frame>
        <draw:frame draw:style-name="gr9" draw:text-style-name="P10" draw:layer="layout" svg:width="2.102cm" svg:height="0.501cm" svg:x="20.721cm" svg:y="6.557cm">
          <draw:text-box>
            <text:p text:style-name="P7"><text:span text:style-name="T76">datetime</text:span></text:p>
          </draw:text-box>
        </draw:frame>
        <draw:polygon draw:style-name="gr1" draw:text-style-name="P1" draw:layer="layout" svg:width="12.463cm" svg:height="1.956cm" svg:x="20.201cm" svg:y="8.585cm" svg:viewBox="0 0 12464 1957" draw:points="12288,0 176,0 107,13 51,51 14,107 0,175 0,1781 14,1849 51,1905 107,1943 176,1957 12288,1957 12356,1943 12412,1905 12450,1849 12464,1781 12464,175 12450,107 12412,51 12356,13">
          <text:p/>
        </draw:polygon>
        <draw:polygon draw:style-name="gr26" draw:text-style-name="P6" draw:layer="layout" svg:width="12.463cm" svg:height="1.956cm" svg:x="20.201cm" svg:y="8.585cm" svg:viewBox="0 0 12464 1957" draw:points="0,175 14,107 51,51 107,13 176,0 12288,0 12356,13 12412,51 12450,107 12464,175 12464,1781 12450,1849 12412,1905 12356,1943 12288,1957 176,1957 107,1943 51,1905 14,1849 0,1781">
          <text:p/>
        </draw:polygon>
        <draw:frame draw:style-name="gr28" draw:text-style-name="P26" draw:layer="layout" svg:width="7.635cm" svg:height="0.374cm" svg:x="20.721cm" svg:y="7.475cm">
          <draw:text-box>
            <text:p text:style-name="P7"><text:span text:style-name="T74">Manejo de fechas de inicio, término y vencimiento</text:span></text:p>
          </draw:text-box>
        </draw:frame>
        <draw:frame draw:style-name="gr10" draw:text-style-name="P10" draw:layer="layout" svg:width="1.577cm" svg:height="0.501cm" svg:x="20.721cm" svg:y="8.899cm">
          <draw:text-box>
            <text:p text:style-name="P7"><text:span text:style-name="T76">openai</text:span></text:p>
          </draw:text-box>
        </draw:frame>
        <draw:polygon draw:style-name="gr1" draw:text-style-name="P1" draw:layer="layout" svg:width="12.463cm" svg:height="1.981cm" svg:x="20.201cm" svg:y="10.913cm" svg:viewBox="0 0 12464 1982" draw:points="12286,0 178,0 109,14 52,52 14,108 0,177 0,1803 14,1873 52,1929 109,1968 178,1982 12286,1982 12355,1968 12412,1929 12450,1873 12464,1803 12464,177 12450,108 12412,52 12355,14">
          <text:p/>
        </draw:polygon>
        <draw:polygon draw:style-name="gr26" draw:text-style-name="P6" draw:layer="layout" svg:width="12.463cm" svg:height="1.981cm" svg:x="20.201cm" svg:y="10.913cm" svg:viewBox="0 0 12464 1982" draw:points="0,177 14,108 52,52 109,14 178,0 12286,0 12355,14 12412,52 12450,108 12464,177 12464,1803 12450,1873 12412,1929 12355,1968 12286,1982 178,1982 109,1968 52,1929 14,1873 0,1803">
          <text:p/>
        </draw:polygon>
        <draw:frame draw:style-name="gr28" draw:text-style-name="P26" draw:layer="layout" svg:width="6.289cm" svg:height="0.374cm" svg:x="20.721cm" svg:y="9.817cm">
          <draw:text-box>
            <text:p text:style-name="P7"><text:span text:style-name="T74">Conexión con GPT-5.5 para el asistente IA</text:span></text:p>
          </draw:text-box>
        </draw:frame>
        <draw:frame draw:style-name="gr9" draw:text-style-name="P10" draw:layer="layout" svg:width="1.577cm" svg:height="0.501cm" svg:x="20.721cm" svg:y="11.239cm">
          <draw:text-box>
            <text:p text:style-name="P7"><text:span text:style-name="T76">dotenv</text:span></text:p>
          </draw:text-box>
        </draw:frame>
        <draw:polygon draw:style-name="gr1" draw:text-style-name="P1" draw:layer="layout" svg:width="12.463cm" svg:height="1.982cm" svg:x="20.201cm" svg:y="13.241cm" svg:viewBox="0 0 12464 1983" draw:points="12286,0 178,0 109,14 52,53 14,109 0,178 0,1805 14,1874 52,1930 109,1968 178,1983 12286,1983 12355,1968 12412,1930 12450,1874 12464,1805 12464,178 12450,109 12412,53 12355,14">
          <text:p/>
        </draw:polygon>
        <draw:polygon draw:style-name="gr26" draw:text-style-name="P6" draw:layer="layout" svg:width="12.463cm" svg:height="1.982cm" svg:x="20.201cm" svg:y="13.241cm" svg:viewBox="0 0 12464 1983" draw:points="0,178 14,109 52,53 109,14 178,0 12286,0 12355,14 12412,53 12450,109 12464,178 12464,1805 12450,1874 12412,1930 12355,1968 12286,1983 178,1983 109,1968 52,1930 14,1874 0,1805">
          <text:p/>
        </draw:polygon>
        <draw:frame draw:style-name="gr28" draw:text-style-name="P26" draw:layer="layout" svg:width="5.679cm" svg:height="0.374cm" svg:x="20.721cm" svg:y="12.157cm">
          <draw:text-box>
            <text:p text:style-name="P7"><text:span text:style-name="T74">Carga segura de la API key desde .env</text:span></text:p>
          </draw:text-box>
        </draw:frame>
        <draw:frame draw:style-name="gr10" draw:text-style-name="P10" draw:layer="layout" svg:width="0.527cm" svg:height="0.501cm" svg:x="20.721cm" svg:y="13.58cm">
          <draw:text-box>
            <text:p text:style-name="P7"><text:span text:style-name="T76">os</text:span></text:p>
          </draw:text-box>
        </draw:frame>
        <draw:frame draw:style-name="gr28" draw:text-style-name="P26" draw:layer="layout" svg:width="6.314cm" svg:height="0.374cm" svg:x="20.721cm" svg:y="14.498cm">
          <draw:text-box>
            <text:p text:style-name="P7"><text:span text:style-name="T74">Acceso a variables de entorno del sistema</text:span></text:p>
          </draw:text-box>
        </draw:frame>
        <draw:frame draw:style-name="gr24" draw:text-style-name="P23" draw:layer="layout" svg:width="6.585cm" svg:height="0.323cm" svg:x="1.27cm" svg:y="18.254cm">
          <draw:text-box>
            <text:p text:style-name="P7"><text:span text:style-name="T69">MediControl — UADE, Introducción a la Algoritmia</text:span></text:p>
          </draw:text-box>
        </draw:frame>
        <draw:frame draw:style-name="gr24" draw:text-style-name="P23" draw:layer="layout" svg:width="0.321cm" svg:height="0.323cm" svg:x="32.47cm" svg:y="18.254cm">
          <draw:text-box>
            <text:p text:style-name="P7"><text:span text:style-name="T69">5</text:span></text:p>
          </draw:text-box>
        </draw:frame>
      </draw:page>
      <draw:page draw:name="page6" draw:style-name="dp1" draw:master-page-name="master-page3">
        <draw:polygon draw:style-name="gr1" draw:text-style-name="P1" draw:layer="layout" svg:width="33.866cm" svg:height="19.05cm" svg:x="0cm" svg:y="-0.001cm" svg:viewBox="0 0 33867 19051" draw:points="0,19051 33867,19051 33867,0 0,0">
          <text:p/>
        </draw:polygon>
        <draw:polygon draw:style-name="gr12" draw:text-style-name="P12" draw:layer="layout" svg:width="33.866cm" svg:height="19.05cm" svg:x="0cm" svg:y="-0.001cm" svg:viewBox="0 0 33867 19051" draw:points="0,19051 33867,19051 33867,0 0,0">
          <text:p/>
        </draw:polygon>
        <draw:polygon draw:style-name="gr13" draw:text-style-name="P13" draw:layer="layout" svg:width="6.612cm" svg:height="0.931cm" svg:x="1.27cm" svg:y="1.134cm" svg:viewBox="0 0 6613 932" draw:points="6150,0 462,0 339,17 229,64 135,137 63,231 16,343 0,466 16,590 63,702 135,796 229,869 339,916 462,932 6150,932 6273,916 6384,869 6477,796 6550,702 6596,590 6613,466 6596,343 6550,231 6477,137 6384,64 6273,17">
          <text:p/>
        </draw:polygon>
        <draw:frame draw:style-name="gr11" draw:text-style-name="P11" draw:layer="layout" svg:width="2.195cm" svg:height="0.39cm" svg:x="2.035cm" svg:y="1.607cm">
          <draw:text-box>
            <text:p text:style-name="P7"><text:span text:style-name="T63">EL PROYECTO</text:span></text:p>
          </draw:text-box>
        </draw:frame>
        <draw:frame draw:style-name="gr30" draw:text-style-name="P28" draw:layer="layout" svg:width="12.558cm" svg:height="1.322cm" svg:x="1.27cm" svg:y="2.818cm">
          <draw:text-box>
            <text:p text:style-name="P7"><text:span text:style-name="T77">Funciones del programa</text:span></text:p>
          </draw:text-box>
        </draw:frame>
        <draw:frame draw:style-name="gr6" draw:text-style-name="P6" draw:layer="layout" svg:width="10.489cm" svg:height="4.029cm" svg:x="1.058cm" svg:y="5.08cm">
          <draw:image xlink:href="Pictures/100002010000018C000000E5973DA5FFA692BB86.png" xlink:type="simple" xlink:show="embed" xlink:actuate="onLoad" loext:mime-type="image/png">
            <text:p/>
          </draw:image>
        </draw:frame>
        <draw:polygon draw:style-name="gr1" draw:text-style-name="P1" draw:layer="layout" svg:width="10.049cm" svg:height="3.599cm" svg:x="1.286cm" svg:y="5.223cm" svg:viewBox="0 0 10050 3600" draw:points="9847,0 203,0 124,16 60,60 16,124 0,204 0,3397 16,3476 60,3540 124,3584 203,3600 9847,3600 9926,3584 9990,3540 10034,3476 10050,3397 10050,204 10034,124 9990,60 9926,16">
          <text:p/>
        </draw:polygon>
        <draw:polygon draw:style-name="gr26" draw:text-style-name="P6" draw:layer="layout" svg:width="10.049cm" svg:height="3.599cm" svg:x="1.286cm" svg:y="5.223cm" svg:viewBox="0 0 10050 3600" draw:points="0,204 16,124 60,60 124,16 203,0 9847,0 9926,16 9990,60 10034,124 10050,204 10050,3397 10034,3476 9990,3540 9926,3584 9847,3600 203,3600 124,3584 60,3540 16,3476 0,3397">
          <text:p/>
        </draw:polygon>
        <draw:polygon draw:style-name="gr22" draw:text-style-name="P21" draw:layer="layout" svg:width="1.27cm" svg:height="1.27cm" svg:x="1.718cm" svg:y="5.664cm" svg:viewBox="0 0 1271 1271" draw:points="636,0 508,13 389,49 281,109 186,187 109,281 50,388 13,508 0,636 13,764 50,883 109,991 186,1085 281,1162 389,1221 508,1258 636,1271 764,1258 883,1221 991,1162 1085,1085 1163,991 1221,883 1258,764 1271,636 1258,508 1221,388 1163,281 1085,187 991,109 883,49 764,13">
          <text:p/>
        </draw:polygon>
        <draw:frame draw:style-name="gr6" draw:text-style-name="P6" draw:layer="layout" svg:width="0.922cm" svg:height="0.947cm" svg:x="1.905cm" svg:y="5.825cm">
          <draw:image xlink:href="Pictures/1000020100000022000000235FA12EC9C9262694.png" xlink:type="simple" xlink:show="embed" xlink:actuate="onLoad" loext:mime-type="image/png">
            <text:p/>
          </draw:image>
        </draw:frame>
        <draw:frame draw:style-name="gr23" draw:text-style-name="P22" draw:layer="layout" svg:width="13.058cm" svg:height="0.492cm" svg:x="1.27cm" svg:y="4.507cm">
          <draw:text-box>
            <text:p text:style-name="P7"><text:span text:style-name="T65">Nueve funciones cubren todo el ciclo de vida de un medicamento</text:span></text:p>
          </draw:text-box>
        </draw:frame>
        <draw:frame draw:style-name="gr11" draw:text-style-name="P11" draw:layer="layout" svg:width="4.892cm" svg:height="0.446cm" svg:x="3.355cm" svg:y="5.843cm">
          <draw:text-box>
            <text:p text:style-name="P7"><text:span text:style-name="T78">agregar_medicamento()</text:span></text:p>
          </draw:text-box>
        </draw:frame>
        <draw:frame draw:style-name="gr6" draw:text-style-name="P6" draw:layer="layout" svg:width="10.489cm" svg:height="4.029cm" svg:x="11.43cm" svg:y="5.08cm">
          <draw:image xlink:href="Pictures/100002010000018C000000E5973DA5FFA692BB86.png" xlink:type="simple" xlink:show="embed" xlink:actuate="onLoad" loext:mime-type="image/png">
            <text:p/>
          </draw:image>
        </draw:frame>
        <draw:polygon draw:style-name="gr1" draw:text-style-name="P1" draw:layer="layout" svg:width="10.05cm" svg:height="3.599cm" svg:x="11.658cm" svg:y="5.223cm" svg:viewBox="0 0 10051 3600" draw:points="9848,0 203,0 124,16 59,60 16,124 0,204 0,3397 16,3476 59,3540 124,3584 203,3600 9848,3600 9927,3584 9991,3540 10035,3476 10051,3397 10051,204 10035,124 9991,60 9927,16">
          <text:p/>
        </draw:polygon>
        <draw:polygon draw:style-name="gr26" draw:text-style-name="P6" draw:layer="layout" svg:width="10.05cm" svg:height="3.599cm" svg:x="11.658cm" svg:y="5.223cm" svg:viewBox="0 0 10051 3600" draw:points="0,204 16,124 59,60 124,16 203,0 9848,0 9927,16 9991,60 10035,124 10051,204 10051,3397 10035,3476 9991,3540 9927,3584 9848,3600 203,3600 124,3584 59,3540 16,3476 0,3397">
          <text:p/>
        </draw:polygon>
        <draw:polygon draw:style-name="gr22" draw:text-style-name="P21" draw:layer="layout" svg:width="1.27cm" svg:height="1.27cm" svg:x="12.09cm" svg:y="5.664cm" svg:viewBox="0 0 1271 1271" draw:points="635,0 507,13 388,49 280,109 186,187 108,281 50,388 13,508 0,636 13,764 50,883 108,991 186,1085 280,1162 388,1221 507,1258 635,1271 763,1258 882,1221 990,1162 1084,1085 1162,991 1220,883 1258,764 1271,636 1258,508 1220,388 1162,281 1084,187 990,109 882,49 763,13">
          <text:p/>
        </draw:polygon>
        <draw:frame draw:style-name="gr6" draw:text-style-name="P6" draw:layer="layout" svg:width="0.947cm" svg:height="0.947cm" svg:x="12.251cm" svg:y="5.825cm">
          <draw:image xlink:href="Pictures/100002010000002300000023C10FC24A8946E192.png" xlink:type="simple" xlink:show="embed" xlink:actuate="onLoad" loext:mime-type="image/png">
            <text:p/>
          </draw:image>
        </draw:frame>
        <draw:frame draw:style-name="gr28" draw:text-style-name="P26" draw:layer="layout" svg:width="6.835cm" svg:height="0.374cm" svg:x="1.727cm" svg:y="7.04cm">
          <draw:text-box>
            <text:p text:style-name="P7"><text:span text:style-name="T74">Alta de nuevo medicamento con validaciones</text:span></text:p>
          </draw:text-box>
        </draw:frame>
        <draw:frame draw:style-name="gr11" draw:text-style-name="P11" draw:layer="layout" svg:width="5.124cm" svg:height="0.446cm" svg:x="13.729cm" svg:y="5.843cm">
          <draw:text-box>
            <text:p text:style-name="P7"><text:span text:style-name="T78">mostrar_medicamentos()</text:span></text:p>
          </draw:text-box>
        </draw:frame>
        <draw:frame draw:style-name="gr6" draw:text-style-name="P6" draw:layer="layout" svg:width="10.515cm" svg:height="4.029cm" svg:x="21.776cm" svg:y="5.08cm">
          <draw:image xlink:href="Pictures/100002010000018D000000E595FF5FF407A266AF.png" xlink:type="simple" xlink:show="embed" xlink:actuate="onLoad" loext:mime-type="image/png">
            <text:p/>
          </draw:image>
        </draw:frame>
        <draw:polygon draw:style-name="gr1" draw:text-style-name="P1" draw:layer="layout" svg:width="10.084cm" svg:height="3.599cm" svg:x="21.996cm" svg:y="5.223cm" svg:viewBox="0 0 10085 3600" draw:points="9882,0 202,0 124,16 59,60 16,124 0,204 0,3397 16,3476 59,3540 124,3584 202,3600 9882,3600 9961,3584 10025,3540 10069,3476 10085,3397 10085,204 10069,124 10025,60 9961,16">
          <text:p/>
        </draw:polygon>
        <draw:polygon draw:style-name="gr26" draw:text-style-name="P6" draw:layer="layout" svg:width="10.084cm" svg:height="3.599cm" svg:x="21.996cm" svg:y="5.223cm" svg:viewBox="0 0 10085 3600" draw:points="0,204 16,124 59,60 124,16 202,0 9882,0 9961,16 10025,60 10069,124 10085,204 10085,3397 10069,3476 10025,3540 9961,3584 9882,3600 202,3600 124,3584 59,3540 16,3476 0,3397">
          <text:p/>
        </draw:polygon>
        <draw:polygon draw:style-name="gr22" draw:text-style-name="P21" draw:layer="layout" svg:width="1.27cm" svg:height="1.27cm" svg:x="22.462cm" svg:y="5.664cm" svg:viewBox="0 0 1271 1271" draw:points="635,0 507,13 387,49 280,109 185,187 108,281 49,388 13,508 0,636 13,764 49,883 108,991 185,1085 280,1162 387,1221 507,1258 635,1271 763,1258 882,1221 989,1162 1085,1085 1162,991 1221,883 1258,764 1271,636 1258,508 1221,388 1162,281 1085,187 989,109 882,49 763,13">
          <text:p/>
        </draw:polygon>
        <draw:frame draw:style-name="gr6" draw:text-style-name="P6" draw:layer="layout" svg:width="0.922cm" svg:height="0.947cm" svg:x="22.623cm" svg:y="5.825cm">
          <draw:image xlink:href="Pictures/1000020100000022000000230CBD5E804D0EEBDA.png" xlink:type="simple" xlink:show="embed" xlink:actuate="onLoad" loext:mime-type="image/png">
            <text:p/>
          </draw:image>
        </draw:frame>
        <draw:frame draw:style-name="gr28" draw:text-style-name="P26" draw:layer="layout" svg:width="6.221cm" svg:height="0.374cm" svg:x="12.101cm" svg:y="7.04cm">
          <draw:text-box>
            <text:p text:style-name="P7"><text:span text:style-name="T74">Lista todos los medicamentos registrados</text:span></text:p>
          </draw:text-box>
        </draw:frame>
        <draw:frame draw:style-name="gr11" draw:text-style-name="P11" draw:layer="layout" svg:width="3.727cm" svg:height="0.446cm" svg:x="24.102cm" svg:y="5.843cm">
          <draw:text-box>
            <text:p text:style-name="P7"><text:span text:style-name="T78">registrar_toma()</text:span></text:p>
          </draw:text-box>
        </draw:frame>
        <draw:frame draw:style-name="gr6" draw:text-style-name="P6" draw:layer="layout" svg:width="10.489cm" svg:height="4.063cm" svg:x="1.058cm" svg:y="9.127cm">
          <draw:image xlink:href="Pictures/100002010000018C000000E69CFF27259B6910F0.png" xlink:type="simple" xlink:show="embed" xlink:actuate="onLoad" loext:mime-type="image/png">
            <text:p/>
          </draw:image>
        </draw:frame>
        <draw:polygon draw:style-name="gr1" draw:text-style-name="P1" draw:layer="layout" svg:width="10.049cm" svg:height="3.623cm" svg:x="1.286cm" svg:y="9.271cm" svg:viewBox="0 0 10050 3624" draw:points="9846,0 205,0 125,15 60,59 16,124 0,203 0,3420 16,3499 60,3564 125,3608 205,3624 9846,3624 9925,3608 9990,3564 10034,3499 10050,3420 10050,203 10034,124 9990,59 9925,15">
          <text:p/>
        </draw:polygon>
        <draw:polygon draw:style-name="gr26" draw:text-style-name="P6" draw:layer="layout" svg:width="10.049cm" svg:height="3.623cm" svg:x="1.286cm" svg:y="9.271cm" svg:viewBox="0 0 10050 3624" draw:points="0,203 16,124 60,59 125,15 205,0 9846,0 9925,15 9990,59 10034,124 10050,203 10050,3420 10034,3499 9990,3564 9925,3608 9846,3624 205,3624 125,3608 60,3564 16,3499 0,3420">
          <text:p/>
        </draw:polygon>
        <draw:polygon draw:style-name="gr22" draw:text-style-name="P21" draw:layer="layout" svg:width="1.27cm" svg:height="1.27cm" svg:x="1.718cm" svg:y="9.736cm" svg:viewBox="0 0 1271 1271" draw:points="636,0 508,13 389,50 281,108 186,186 109,280 50,388 13,507 0,635 13,763 50,882 109,990 186,1085 281,1163 389,1221 508,1258 636,1271 764,1258 883,1221 991,1163 1085,1085 1163,990 1221,882 1258,763 1271,635 1258,507 1221,388 1163,280 1085,186 991,108 883,50 764,13">
          <text:p/>
        </draw:polygon>
        <draw:frame draw:style-name="gr6" draw:text-style-name="P6" draw:layer="layout" svg:width="0.922cm" svg:height="0.922cm" svg:x="1.905cm" svg:y="9.898cm">
          <draw:image xlink:href="Pictures/10000201000000220000002263DF5BD417C4D4AE.png" xlink:type="simple" xlink:show="embed" xlink:actuate="onLoad" loext:mime-type="image/png">
            <text:p/>
          </draw:image>
        </draw:frame>
        <draw:frame draw:style-name="gr28" draw:text-style-name="P26" draw:layer="layout" svg:width="5.709cm" svg:height="0.374cm" svg:x="22.475cm" svg:y="7.04cm">
          <draw:text-box>
            <text:p text:style-name="P7"><text:span text:style-name="T74">Descuenta stock al registrar una toma</text:span></text:p>
          </draw:text-box>
        </draw:frame>
        <draw:frame draw:style-name="gr11" draw:text-style-name="P11" draw:layer="layout" svg:width="3.029cm" svg:height="0.446cm" svg:x="3.355cm" svg:y="9.914cm">
          <draw:text-box>
            <text:p text:style-name="P7"><text:span text:style-name="T78">pedir_fecha()</text:span></text:p>
          </draw:text-box>
        </draw:frame>
        <draw:frame draw:style-name="gr6" draw:text-style-name="P6" draw:layer="layout" svg:width="10.489cm" svg:height="4.063cm" svg:x="11.43cm" svg:y="9.127cm">
          <draw:image xlink:href="Pictures/100002010000018C000000E69CFF27259B6910F0.png" xlink:type="simple" xlink:show="embed" xlink:actuate="onLoad" loext:mime-type="image/png">
            <text:p/>
          </draw:image>
        </draw:frame>
        <draw:polygon draw:style-name="gr1" draw:text-style-name="P1" draw:layer="layout" svg:width="10.05cm" svg:height="3.623cm" svg:x="11.658cm" svg:y="9.271cm" svg:viewBox="0 0 10051 3624" draw:points="9847,0 204,0 125,15 60,59 16,124 0,203 0,3420 16,3499 60,3564 125,3608 204,3624 9847,3624 9926,3608 9991,3564 10035,3499 10051,3420 10051,203 10035,124 9991,59 9926,15">
          <text:p/>
        </draw:polygon>
        <draw:polygon draw:style-name="gr26" draw:text-style-name="P6" draw:layer="layout" svg:width="10.05cm" svg:height="3.623cm" svg:x="11.658cm" svg:y="9.271cm" svg:viewBox="0 0 10051 3624" draw:points="0,203 16,124 60,59 125,15 204,0 9847,0 9926,15 9991,59 10035,124 10051,203 10051,3420 10035,3499 9991,3564 9926,3608 9847,3624 204,3624 125,3608 60,3564 16,3499 0,3420">
          <text:p/>
        </draw:polygon>
        <draw:polygon draw:style-name="gr22" draw:text-style-name="P21" draw:layer="layout" svg:width="1.27cm" svg:height="1.27cm" svg:x="12.09cm" svg:y="9.736cm" svg:viewBox="0 0 1271 1271" draw:points="635,0 507,13 388,50 280,108 186,186 108,280 50,388 13,507 0,635 13,763 50,882 108,990 186,1085 280,1163 388,1221 507,1258 635,1271 763,1258 882,1221 990,1163 1084,1085 1162,990 1220,882 1258,763 1271,635 1258,507 1220,388 1162,280 1084,186 990,108 882,50 763,13">
          <text:p/>
        </draw:polygon>
        <draw:frame draw:style-name="gr6" draw:text-style-name="P6" draw:layer="layout" svg:width="0.947cm" svg:height="0.922cm" svg:x="12.251cm" svg:y="9.898cm">
          <draw:image xlink:href="Pictures/100002010000002300000022356EF75497B074CC.png" xlink:type="simple" xlink:show="embed" xlink:actuate="onLoad" loext:mime-type="image/png">
            <text:p/>
          </draw:image>
        </draw:frame>
        <draw:frame draw:style-name="gr28" draw:text-style-name="P26" draw:layer="layout" svg:width="7.525cm" svg:height="0.374cm" svg:x="1.727cm" svg:y="11.111cm">
          <draw:text-box>
            <text:p text:style-name="P7"><text:span text:style-name="T74">Valida el formato y rango de las fechas ingresadas</text:span></text:p>
          </draw:text-box>
        </draw:frame>
        <draw:frame draw:style-name="gr11" draw:text-style-name="P11" draw:layer="layout" svg:width="1.399cm" svg:height="0.446cm" svg:x="13.729cm" svg:y="9.914cm">
          <draw:text-box>
            <text:p text:style-name="P7"><text:span text:style-name="T78">main()</text:span></text:p>
          </draw:text-box>
        </draw:frame>
        <draw:frame draw:style-name="gr6" draw:text-style-name="P6" draw:layer="layout" svg:width="10.515cm" svg:height="4.063cm" svg:x="21.776cm" svg:y="9.127cm">
          <draw:image xlink:href="Pictures/100002010000018D000000E6872C925E832F9E09.png" xlink:type="simple" xlink:show="embed" xlink:actuate="onLoad" loext:mime-type="image/png">
            <text:p/>
          </draw:image>
        </draw:frame>
        <draw:polygon draw:style-name="gr1" draw:text-style-name="P1" draw:layer="layout" svg:width="10.084cm" svg:height="3.623cm" svg:x="21.996cm" svg:y="9.271cm" svg:viewBox="0 0 10085 3624" draw:points="9880,0 204,0 124,15 60,59 16,124 0,203 0,3420 16,3499 60,3564 124,3608 204,3624 9880,3624 9960,3608 10025,3564 10068,3499 10085,3420 10085,203 10068,124 10025,59 9960,15">
          <text:p/>
        </draw:polygon>
        <draw:polygon draw:style-name="gr26" draw:text-style-name="P6" draw:layer="layout" svg:width="10.084cm" svg:height="3.623cm" svg:x="21.996cm" svg:y="9.271cm" svg:viewBox="0 0 10085 3624" draw:points="0,203 16,124 60,59 124,15 204,0 9880,0 9960,15 10025,59 10068,124 10085,203 10085,3420 10068,3499 10025,3564 9960,3608 9880,3624 204,3624 124,3608 60,3564 16,3499 0,3420">
          <text:p/>
        </draw:polygon>
        <draw:polygon draw:style-name="gr22" draw:text-style-name="P21" draw:layer="layout" svg:width="1.27cm" svg:height="1.27cm" svg:x="22.462cm" svg:y="9.736cm" svg:viewBox="0 0 1271 1271" draw:points="635,0 507,13 387,50 280,108 185,186 108,280 49,388 13,507 0,635 13,763 49,882 108,990 185,1085 280,1163 387,1221 507,1258 635,1271 763,1258 882,1221 989,1163 1085,1085 1162,990 1221,882 1258,763 1271,635 1258,507 1221,388 1162,280 1085,186 989,108 882,50 763,13">
          <text:p/>
        </draw:polygon>
        <draw:frame draw:style-name="gr6" draw:text-style-name="P6" draw:layer="layout" svg:width="0.922cm" svg:height="0.922cm" svg:x="22.623cm" svg:y="9.898cm">
          <draw:image xlink:href="Pictures/1000020100000022000000221A9E8EB0D83DA613.png" xlink:type="simple" xlink:show="embed" xlink:actuate="onLoad" loext:mime-type="image/png">
            <text:p/>
          </draw:image>
        </draw:frame>
        <draw:frame draw:style-name="gr28" draw:text-style-name="P26" draw:layer="layout" svg:width="8.477cm" svg:height="0.374cm" svg:x="12.101cm" svg:y="11.111cm">
          <draw:text-box>
            <text:p text:style-name="P7"><text:span text:style-name="T74">Arma el menú, captura la opción y deriva a cada función</text:span></text:p>
          </draw:text-box>
        </draw:frame>
        <draw:frame draw:style-name="gr11" draw:text-style-name="P11" draw:layer="layout" svg:width="4.426cm" svg:height="0.446cm" svg:x="24.102cm" svg:y="9.914cm">
          <draw:text-box>
            <text:p text:style-name="P7"><text:span text:style-name="T78">verificar_alertas()</text:span></text:p>
          </draw:text-box>
        </draw:frame>
        <draw:frame draw:style-name="gr6" draw:text-style-name="P6" draw:layer="layout" svg:width="10.489cm" svg:height="4.038cm" svg:x="1.058cm" svg:y="13.2cm">
          <draw:image xlink:href="Pictures/100002010000018C000000E54EE7C7D727813B0F.png" xlink:type="simple" xlink:show="embed" xlink:actuate="onLoad" loext:mime-type="image/png">
            <text:p/>
          </draw:image>
        </draw:frame>
        <draw:polygon draw:style-name="gr1" draw:text-style-name="P1" draw:layer="layout" svg:width="10.049cm" svg:height="3.59cm" svg:x="1.286cm" svg:y="13.351cm" svg:viewBox="0 0 10050 3591" draw:points="9847,0 203,0 124,16 60,60 16,124 0,203 0,3389 16,3468 60,3532 124,3575 203,3591 9847,3591 9926,3575 9990,3532 10034,3468 10050,3389 10050,203 10034,124 9990,60 9926,16">
          <text:p/>
        </draw:polygon>
        <draw:polygon draw:style-name="gr26" draw:text-style-name="P6" draw:layer="layout" svg:width="10.049cm" svg:height="3.59cm" svg:x="1.286cm" svg:y="13.351cm" svg:viewBox="0 0 10050 3591" draw:points="0,203 16,124 60,60 124,16 203,0 9847,0 9926,16 9990,60 10034,124 10050,203 10050,3389 10034,3468 9990,3532 9926,3575 9847,3591 203,3591 124,3575 60,3532 16,3468 0,3389">
          <text:p/>
        </draw:polygon>
        <draw:polygon draw:style-name="gr22" draw:text-style-name="P21" draw:layer="layout" svg:width="1.27cm" svg:height="1.27cm" svg:x="1.718cm" svg:y="13.783cm" svg:viewBox="0 0 1271 1271" draw:points="636,0 508,13 389,50 281,109 186,186 109,280 50,388 13,507 0,635 13,763 50,884 109,991 186,1085 281,1163 389,1221 508,1258 636,1271 764,1258 883,1221 991,1163 1085,1085 1163,991 1221,884 1258,763 1271,635 1258,507 1221,388 1163,280 1085,186 991,109 883,50 764,13">
          <text:p/>
        </draw:polygon>
        <draw:frame draw:style-name="gr6" draw:text-style-name="P6" draw:layer="layout" svg:width="0.922cm" svg:height="0.922cm" svg:x="1.905cm" svg:y="13.97cm">
          <draw:image xlink:href="Pictures/100002010000002200000022CB4A9F87B2B139EE.png" xlink:type="simple" xlink:show="embed" xlink:actuate="onLoad" loext:mime-type="image/png">
            <text:p/>
          </draw:image>
        </draw:frame>
        <draw:frame draw:style-name="gr28" draw:text-style-name="P26" draw:layer="layout" svg:width="6.636cm" svg:height="0.374cm" svg:x="22.475cm" svg:y="11.111cm">
          <draw:text-box>
            <text:p text:style-name="P7"><text:span text:style-name="T74">Detecta stock bajo y vencimientos próximos</text:span></text:p>
          </draw:text-box>
        </draw:frame>
        <draw:frame draw:style-name="gr11" draw:text-style-name="P11" draw:layer="layout" svg:width="5.823cm" svg:height="0.446cm" svg:x="3.355cm" svg:y="13.988cm">
          <draw:text-box>
            <text:p text:style-name="P7"><text:span text:style-name="T78">calcular_dias_restantes()</text:span></text:p>
          </draw:text-box>
        </draw:frame>
        <draw:frame draw:style-name="gr6" draw:text-style-name="P6" draw:layer="layout" svg:width="10.489cm" svg:height="4.038cm" svg:x="11.43cm" svg:y="13.2cm">
          <draw:image xlink:href="Pictures/100002010000018C000000E54EE7C7D727813B0F.png" xlink:type="simple" xlink:show="embed" xlink:actuate="onLoad" loext:mime-type="image/png">
            <text:p/>
          </draw:image>
        </draw:frame>
        <draw:polygon draw:style-name="gr1" draw:text-style-name="P1" draw:layer="layout" svg:width="10.05cm" svg:height="3.59cm" svg:x="11.658cm" svg:y="13.351cm" svg:viewBox="0 0 10051 3591" draw:points="9848,0 203,0 124,16 59,60 16,124 0,203 0,3389 16,3468 59,3532 124,3575 203,3591 9848,3591 9927,3575 9991,3532 10035,3468 10051,3389 10051,203 10035,124 9991,60 9927,16">
          <text:p/>
        </draw:polygon>
        <draw:polygon draw:style-name="gr26" draw:text-style-name="P6" draw:layer="layout" svg:width="10.05cm" svg:height="3.59cm" svg:x="11.658cm" svg:y="13.351cm" svg:viewBox="0 0 10051 3591" draw:points="0,203 16,124 59,60 124,16 203,0 9848,0 9927,16 9991,60 10035,124 10051,203 10051,3389 10035,3468 9991,3532 9927,3575 9848,3591 203,3591 124,3575 59,3532 16,3468 0,3389">
          <text:p/>
        </draw:polygon>
        <draw:polygon draw:style-name="gr22" draw:text-style-name="P21" draw:layer="layout" svg:width="1.27cm" svg:height="1.27cm" svg:x="12.09cm" svg:y="13.783cm" svg:viewBox="0 0 1271 1271" draw:points="635,0 507,13 388,50 280,109 186,186 108,280 50,388 13,507 0,635 13,763 50,884 108,991 186,1085 280,1163 388,1221 507,1258 635,1271 763,1258 882,1221 990,1163 1084,1085 1162,991 1220,884 1258,763 1271,635 1258,507 1220,388 1162,280 1084,186 990,109 882,50 763,13">
          <text:p/>
        </draw:polygon>
        <draw:frame draw:style-name="gr6" draw:text-style-name="P6" draw:layer="layout" svg:width="0.947cm" svg:height="0.922cm" svg:x="12.251cm" svg:y="13.97cm">
          <draw:image xlink:href="Pictures/1000020100000023000000228FAF0F20B5A8A9D0.png" xlink:type="simple" xlink:show="embed" xlink:actuate="onLoad" loext:mime-type="image/png">
            <text:p/>
          </draw:image>
        </draw:frame>
        <draw:frame draw:style-name="gr28" draw:text-style-name="P26" draw:layer="layout" svg:width="6.78cm" svg:height="0.374cm" svg:x="1.727cm" svg:y="15.181cm">
          <draw:text-box>
            <text:p text:style-name="P7"><text:span text:style-name="T74">Estima días de stock según dosis y frecuencia</text:span></text:p>
          </draw:text-box>
        </draw:frame>
        <draw:frame draw:style-name="gr11" draw:text-style-name="P11" draw:layer="layout" svg:width="4.659cm" svg:height="0.446cm" svg:x="13.729cm" svg:y="13.988cm">
          <draw:text-box>
            <text:p text:style-name="P7"><text:span text:style-name="T78">buscar_medicamento()</text:span></text:p>
          </draw:text-box>
        </draw:frame>
        <draw:frame draw:style-name="gr6" draw:text-style-name="P6" draw:layer="layout" svg:width="10.515cm" svg:height="4.038cm" svg:x="21.776cm" svg:y="13.2cm">
          <draw:image xlink:href="Pictures/100002010000018D000000E5C3D7C9FAE8665355.png" xlink:type="simple" xlink:show="embed" xlink:actuate="onLoad" loext:mime-type="image/png">
            <text:p/>
          </draw:image>
        </draw:frame>
        <draw:polygon draw:style-name="gr1" draw:text-style-name="P1" draw:layer="layout" svg:width="10.084cm" svg:height="3.59cm" svg:x="21.996cm" svg:y="13.351cm" svg:viewBox="0 0 10085 3591" draw:points="9882,0 202,0 124,16 59,60 16,124 0,203 0,3389 16,3468 59,3532 124,3575 202,3591 9882,3591 9961,3575 10025,3532 10069,3468 10085,3389 10085,203 10069,124 10025,60 9961,16">
          <text:p/>
        </draw:polygon>
        <draw:polygon draw:style-name="gr26" draw:text-style-name="P6" draw:layer="layout" svg:width="10.084cm" svg:height="3.59cm" svg:x="21.996cm" svg:y="13.351cm" svg:viewBox="0 0 10085 3591" draw:points="0,203 16,124 59,60 124,16 202,0 9882,0 9961,16 10025,60 10069,124 10085,203 10085,3389 10069,3468 10025,3532 9961,3575 9882,3591 202,3591 124,3575 59,3532 16,3468 0,3389">
          <text:p/>
        </draw:polygon>
        <draw:polygon draw:style-name="gr22" draw:text-style-name="P21" draw:layer="layout" svg:width="1.27cm" svg:height="1.27cm" svg:x="22.462cm" svg:y="13.783cm" svg:viewBox="0 0 1271 1271" draw:points="635,0 507,13 387,50 280,109 185,186 108,280 49,388 13,507 0,635 13,763 49,884 108,991 185,1085 280,1163 387,1221 507,1258 635,1271 763,1258 882,1221 989,1163 1085,1085 1162,991 1221,884 1258,763 1271,635 1258,507 1221,388 1162,280 1085,186 989,109 882,50 763,13">
          <text:p/>
        </draw:polygon>
        <draw:frame draw:style-name="gr6" draw:text-style-name="P6" draw:layer="layout" svg:width="0.922cm" svg:height="0.922cm" svg:x="22.623cm" svg:y="13.97cm">
          <draw:image xlink:href="Pictures/1000020100000022000000224C8FB4CE2551D3F3.png" xlink:type="simple" xlink:show="embed" xlink:actuate="onLoad" loext:mime-type="image/png">
            <text:p/>
          </draw:image>
        </draw:frame>
        <draw:frame draw:style-name="gr28" draw:text-style-name="P26" draw:layer="layout" svg:width="5.416cm" svg:height="0.374cm" svg:x="12.101cm" svg:y="15.181cm">
          <draw:text-box>
            <text:p text:style-name="P7"><text:span text:style-name="T74">Busca un medicamento por nombre</text:span></text:p>
          </draw:text-box>
        </draw:frame>
        <draw:frame draw:style-name="gr11" draw:text-style-name="P11" draw:layer="layout" svg:width="3.495cm" svg:height="0.446cm" svg:x="24.102cm" svg:y="13.988cm">
          <draw:text-box>
            <text:p text:style-name="P7"><text:span text:style-name="T78">hablar_con_ia()</text:span></text:p>
          </draw:text-box>
        </draw:frame>
        <draw:frame draw:style-name="gr24" draw:text-style-name="P23" draw:layer="layout" svg:width="6.585cm" svg:height="0.323cm" svg:x="1.27cm" svg:y="18.254cm">
          <draw:text-box>
            <text:p text:style-name="P7"><text:span text:style-name="T69">MediControl — UADE, Introducción a la Algoritmia</text:span></text:p>
          </draw:text-box>
        </draw:frame>
        <draw:frame draw:style-name="gr24" draw:text-style-name="P23" draw:layer="layout" svg:width="0.321cm" svg:height="0.323cm" svg:x="32.47cm" svg:y="18.254cm">
          <draw:text-box>
            <text:p text:style-name="P7"><text:span text:style-name="T69">6</text:span></text:p>
          </draw:text-box>
        </draw:frame>
        <draw:frame draw:style-name="gr28" draw:text-style-name="P26" draw:layer="layout" svg:width="5.256cm" svg:height="0.374cm" svg:x="22.475cm" svg:y="15.181cm">
          <draw:text-box>
            <text:p text:style-name="P7"><text:span text:style-name="T74">Chat con asistente médico GPT-5.5</text:span></text:p>
          </draw:text-box>
        </draw:frame>
      </draw:page>
      <draw:page draw:name="page7" draw:style-name="dp1" draw:master-page-name="master-page3">
        <draw:polygon draw:style-name="gr1" draw:text-style-name="P1" draw:layer="layout" svg:width="33.866cm" svg:height="19.05cm" svg:x="0cm" svg:y="-0.001cm" svg:viewBox="0 0 33867 19051" draw:points="0,19051 33867,19051 33867,0 0,0">
          <text:p/>
        </draw:polygon>
        <draw:polygon draw:style-name="gr12" draw:text-style-name="P12" draw:layer="layout" svg:width="33.866cm" svg:height="19.05cm" svg:x="0cm" svg:y="-0.001cm" svg:viewBox="0 0 33867 19051" draw:points="0,19051 33867,19051 33867,0 0,0">
          <text:p/>
        </draw:polygon>
        <draw:polygon draw:style-name="gr13" draw:text-style-name="P13" draw:layer="layout" svg:width="6.612cm" svg:height="0.931cm" svg:x="1.27cm" svg:y="1.134cm" svg:viewBox="0 0 6613 932" draw:points="6150,0 462,0 339,17 229,64 135,137 63,231 16,343 0,466 16,590 63,702 135,796 229,869 339,916 462,932 6150,932 6273,916 6384,869 6477,796 6550,702 6596,590 6613,466 6596,343 6550,231 6477,137 6384,64 6273,17">
          <text:p/>
        </draw:polygon>
        <draw:frame draw:style-name="gr11" draw:text-style-name="P11" draw:layer="layout" svg:width="2.237cm" svg:height="0.39cm" svg:x="2.288cm" svg:y="1.424cm">
          <draw:text-box>
            <text:p text:style-name="P7"><text:span text:style-name="T63">NAVEGACIÓN</text:span></text:p>
          </draw:text-box>
        </draw:frame>
        <draw:frame draw:style-name="gr21" draw:text-style-name="P20" draw:layer="layout" svg:width="15.068cm" svg:height="1.322cm" svg:x="1.27cm" svg:y="2.544cm">
          <draw:text-box>
            <text:p text:style-name="P7"><text:span text:style-name="T64">Menú principal — 9 opciones</text:span></text:p>
          </draw:text-box>
        </draw:frame>
        <draw:polygon draw:style-name="gr1" draw:text-style-name="P1" draw:layer="layout" svg:width="15.367cm" svg:height="1.499cm" svg:x="1.27cm" svg:y="5.85cm" svg:viewBox="0 0 15368 1500" draw:points="0,1500 15368,1500 15368,0 0,0">
          <text:p/>
        </draw:polygon>
        <draw:frame draw:style-name="gr23" draw:text-style-name="P22" draw:layer="layout" svg:width="10.386cm" svg:height="0.492cm" svg:x="1.27cm" svg:y="4.286cm">
          <draw:text-box>
            <text:p text:style-name="P7"><text:span text:style-name="T65">El loop while se repite hasta elegir la opción 9 (Salir)</text:span></text:p>
          </draw:text-box>
        </draw:frame>
        <draw:frame draw:style-name="gr9" draw:text-style-name="P10" draw:layer="layout" svg:width="0.439cm" svg:height="0.441cm" svg:x="1.575cm" svg:y="6.381cm">
          <draw:text-box>
            <text:p text:style-name="P7"><text:span text:style-name="T79">1</text:span></text:p>
          </draw:text-box>
        </draw:frame>
        <draw:frame draw:style-name="gr9" draw:text-style-name="P10" draw:layer="layout" svg:width="3.998cm" svg:height="0.441cm" svg:x="2.795cm" svg:y="6.381cm">
          <draw:text-box>
            <text:p text:style-name="P7"><text:span text:style-name="T80">Agregar medicamento</text:span></text:p>
          </draw:text-box>
        </draw:frame>
        <draw:polygon draw:style-name="gr31" draw:text-style-name="P29" draw:layer="layout" svg:width="15.367cm" svg:height="1.515cm" svg:x="1.27cm" svg:y="7.408cm" svg:viewBox="0 0 15368 1516" draw:points="0,1516 15368,1516 15368,0 0,0">
          <text:p/>
        </draw:polygon>
        <draw:frame draw:style-name="gr32" draw:text-style-name="P30" draw:layer="layout" svg:width="0.574cm" svg:height="0.34cm" svg:x="15.803cm" svg:y="6.432cm">
          <draw:text-box>
            <text:p text:style-name="P7"><text:span text:style-name="T81">Alta</text:span></text:p>
          </draw:text-box>
        </draw:frame>
        <draw:frame draw:style-name="gr9" draw:text-style-name="P10" draw:layer="layout" svg:width="0.439cm" svg:height="0.441cm" svg:x="1.575cm" svg:y="7.959cm">
          <draw:text-box>
            <text:p text:style-name="P7"><text:span text:style-name="T79">2</text:span></text:p>
          </draw:text-box>
        </draw:frame>
        <draw:frame draw:style-name="gr9" draw:text-style-name="P10" draw:layer="layout" svg:width="4.214cm" svg:height="0.441cm" svg:x="2.795cm" svg:y="7.959cm">
          <draw:text-box>
            <text:p text:style-name="P7"><text:span text:style-name="T80">Mostrar medicamentos</text:span></text:p>
          </draw:text-box>
        </draw:frame>
        <draw:polygon draw:style-name="gr1" draw:text-style-name="P1" draw:layer="layout" svg:width="15.367cm" svg:height="1.507cm" svg:x="1.27cm" svg:y="9cm" svg:viewBox="0 0 15368 1508" draw:points="0,1508 15368,1508 15368,0 0,0">
          <text:p/>
        </draw:polygon>
        <draw:frame draw:style-name="gr32" draw:text-style-name="P30" draw:layer="layout" svg:width="1.23cm" svg:height="0.34cm" svg:x="15.117cm" svg:y="8.009cm">
          <draw:text-box>
            <text:p text:style-name="P7"><text:span text:style-name="T81">Consulta</text:span></text:p>
          </draw:text-box>
        </draw:frame>
        <draw:frame draw:style-name="gr9" draw:text-style-name="P10" draw:layer="layout" svg:width="0.439cm" svg:height="0.441cm" svg:x="1.575cm" svg:y="9.538cm">
          <draw:text-box>
            <text:p text:style-name="P7"><text:span text:style-name="T79">3</text:span></text:p>
          </draw:text-box>
        </draw:frame>
        <draw:frame draw:style-name="gr9" draw:text-style-name="P10" draw:layer="layout" svg:width="2.652cm" svg:height="0.441cm" svg:x="2.795cm" svg:y="9.538cm">
          <draw:text-box>
            <text:p text:style-name="P7"><text:span text:style-name="T80">Registrar toma</text:span></text:p>
          </draw:text-box>
        </draw:frame>
        <draw:polygon draw:style-name="gr31" draw:text-style-name="P29" draw:layer="layout" svg:width="15.367cm" svg:height="1.524cm" svg:x="1.27cm" svg:y="10.557cm" svg:viewBox="0 0 15368 1525" draw:points="0,1525 15368,1525 15368,0 0,0">
          <text:p/>
        </draw:polygon>
        <draw:frame draw:style-name="gr32" draw:text-style-name="P30" draw:layer="layout" svg:width="0.933cm" svg:height="0.34cm" svg:x="15.431cm" svg:y="9.589cm">
          <draw:text-box>
            <text:p text:style-name="P7"><text:span text:style-name="T81">Acción</text:span></text:p>
          </draw:text-box>
        </draw:frame>
        <draw:frame draw:style-name="gr9" draw:text-style-name="P10" draw:layer="layout" svg:width="0.439cm" svg:height="0.441cm" svg:x="1.575cm" svg:y="11.115cm">
          <draw:text-box>
            <text:p text:style-name="P7"><text:span text:style-name="T79">4</text:span></text:p>
          </draw:text-box>
        </draw:frame>
        <draw:frame draw:style-name="gr9" draw:text-style-name="P10" draw:layer="layout" svg:width="2.555cm" svg:height="0.441cm" svg:x="2.795cm" svg:y="11.115cm">
          <draw:text-box>
            <text:p text:style-name="P7"><text:span text:style-name="T80">Cargar umbral</text:span></text:p>
          </draw:text-box>
        </draw:frame>
        <draw:frame draw:style-name="gr9" draw:text-style-name="P10" draw:layer="layout" svg:width="2.529cm" svg:height="0.441cm" svg:x="5.497cm" svg:y="11.115cm">
          <draw:text-box>
            <text:p text:style-name="P7"><text:span text:style-name="T80">y vencimiento</text:span></text:p>
          </draw:text-box>
        </draw:frame>
        <draw:polygon draw:style-name="gr1" draw:text-style-name="P1" draw:layer="layout" svg:width="15.367cm" svg:height="1.515cm" svg:x="1.27cm" svg:y="12.141cm" svg:viewBox="0 0 15368 1516" draw:points="0,1516 15368,1516 15368,0 0,0">
          <text:p/>
        </draw:polygon>
        <draw:frame draw:style-name="gr32" draw:text-style-name="P30" draw:layer="layout" svg:width="0.891cm" svg:height="0.34cm" svg:x="15.464cm" svg:y="11.166cm">
          <draw:text-box>
            <text:p text:style-name="P7"><text:span text:style-name="T81">Config</text:span></text:p>
          </draw:text-box>
        </draw:frame>
        <draw:frame draw:style-name="gr9" draw:text-style-name="P10" draw:layer="layout" svg:width="0.439cm" svg:height="0.441cm" svg:x="1.575cm" svg:y="12.694cm">
          <draw:text-box>
            <text:p text:style-name="P7"><text:span text:style-name="T79">5</text:span></text:p>
          </draw:text-box>
        </draw:frame>
        <draw:frame draw:style-name="gr9" draw:text-style-name="P10" draw:layer="layout" svg:width="4.036cm" svg:height="0.441cm" svg:x="2.795cm" svg:y="12.694cm">
          <draw:text-box>
            <text:p text:style-name="P7"><text:span text:style-name="T80">Calcular días restantes</text:span></text:p>
          </draw:text-box>
        </draw:frame>
        <draw:polygon draw:style-name="gr31" draw:text-style-name="P29" draw:layer="layout" svg:width="15.35cm" svg:height="1.499cm" svg:x="17.407cm" svg:y="5.85cm" svg:viewBox="0 0 15351 1500" draw:points="0,1500 15351,1500 15351,0 0,0">
          <text:p/>
        </draw:polygon>
        <draw:frame draw:style-name="gr32" draw:text-style-name="P30" draw:layer="layout" svg:width="1.018cm" svg:height="0.34cm" svg:x="15.337cm" svg:y="12.745cm">
          <draw:text-box>
            <text:p text:style-name="P7"><text:span text:style-name="T81">Cálculo</text:span></text:p>
          </draw:text-box>
        </draw:frame>
        <draw:frame draw:style-name="gr9" draw:text-style-name="P10" draw:layer="layout" svg:width="0.439cm" svg:height="0.441cm" svg:x="17.719cm" svg:y="6.381cm">
          <draw:text-box>
            <text:p text:style-name="P7"><text:span text:style-name="T79">6</text:span></text:p>
          </draw:text-box>
        </draw:frame>
        <draw:frame draw:style-name="gr9" draw:text-style-name="P10" draw:layer="layout" svg:width="6.035cm" svg:height="0.441cm" svg:x="18.939cm" svg:y="6.381cm">
          <draw:text-box>
            <text:p text:style-name="P7"><text:span text:style-name="T80">Buscar medicamento por nombre</text:span></text:p>
          </draw:text-box>
        </draw:frame>
        <draw:polygon draw:style-name="gr1" draw:text-style-name="P1" draw:layer="layout" svg:width="15.35cm" svg:height="1.515cm" svg:x="17.407cm" svg:y="7.408cm" svg:viewBox="0 0 15351 1516" draw:points="0,1516 15351,1516 15351,0 0,0">
          <text:p/>
        </draw:polygon>
        <draw:frame draw:style-name="gr32" draw:text-style-name="P30" draw:layer="layout" svg:width="1.23cm" svg:height="0.34cm" svg:x="31.261cm" svg:y="6.432cm">
          <draw:text-box>
            <text:p text:style-name="P7"><text:span text:style-name="T81">Consulta</text:span></text:p>
          </draw:text-box>
        </draw:frame>
        <draw:frame draw:style-name="gr9" draw:text-style-name="P10" draw:layer="layout" svg:width="0.439cm" svg:height="0.441cm" svg:x="17.719cm" svg:y="7.959cm">
          <draw:text-box>
            <text:p text:style-name="P7"><text:span text:style-name="T79">7</text:span></text:p>
          </draw:text-box>
        </draw:frame>
        <draw:frame draw:style-name="gr9" draw:text-style-name="P10" draw:layer="layout" svg:width="6.149cm" svg:height="0.441cm" svg:x="18.939cm" svg:y="7.959cm">
          <draw:text-box>
            <text:p text:style-name="P7"><text:span text:style-name="T80">Verificar alertas de medicamentos</text:span></text:p>
          </draw:text-box>
        </draw:frame>
        <draw:polygon draw:style-name="gr31" draw:text-style-name="P29" draw:layer="layout" svg:width="15.35cm" svg:height="1.507cm" svg:x="17.407cm" svg:y="9cm" svg:viewBox="0 0 15351 1508" draw:points="0,1508 15351,1508 15351,0 0,0">
          <text:p/>
        </draw:polygon>
        <draw:frame draw:style-name="gr32" draw:text-style-name="P30" draw:layer="layout" svg:width="1.23cm" svg:height="0.34cm" svg:x="31.261cm" svg:y="8.009cm">
          <draw:text-box>
            <text:p text:style-name="P7"><text:span text:style-name="T81">Consulta</text:span></text:p>
          </draw:text-box>
        </draw:frame>
        <draw:frame draw:style-name="gr9" draw:text-style-name="P10" draw:layer="layout" svg:width="0.439cm" svg:height="0.441cm" svg:x="17.719cm" svg:y="9.538cm">
          <draw:text-box>
            <text:p text:style-name="P7"><text:span text:style-name="T79">8</text:span></text:p>
          </draw:text-box>
        </draw:frame>
        <draw:frame draw:style-name="gr9" draw:text-style-name="P10" draw:layer="layout" svg:width="3.918cm" svg:height="0.441cm" svg:x="18.939cm" svg:y="9.538cm">
          <draw:text-box>
            <text:p text:style-name="P7"><text:span text:style-name="T80">Consultar asistente IA</text:span></text:p>
          </draw:text-box>
        </draw:frame>
        <draw:polygon draw:style-name="gr1" draw:text-style-name="P1" draw:layer="layout" svg:width="15.35cm" svg:height="1.524cm" svg:x="17.407cm" svg:y="10.557cm" svg:viewBox="0 0 15351 1525" draw:points="0,1525 15351,1525 15351,0 0,0">
          <text:p/>
        </draw:polygon>
        <draw:frame draw:style-name="gr32" draw:text-style-name="P30" draw:layer="layout" svg:width="0.338cm" svg:height="0.34cm" svg:x="32.243cm" svg:y="9.589cm">
          <draw:text-box>
            <text:p text:style-name="P7"><text:span text:style-name="T81">IA</text:span></text:p>
          </draw:text-box>
        </draw:frame>
        <draw:frame draw:style-name="gr9" draw:text-style-name="P10" draw:layer="layout" svg:width="0.439cm" svg:height="0.441cm" svg:x="17.719cm" svg:y="11.115cm">
          <draw:text-box>
            <text:p text:style-name="P7"><text:span text:style-name="T79">9</text:span></text:p>
          </draw:text-box>
        </draw:frame>
        <draw:frame draw:style-name="gr9" draw:text-style-name="P10" draw:layer="layout" svg:width="2.91cm" svg:height="0.441cm" svg:x="18.939cm" svg:y="11.115cm">
          <draw:text-box>
            <text:p text:style-name="P7"><text:span text:style-name="T80">Salir del sistema</text:span></text:p>
          </draw:text-box>
        </draw:frame>
        <draw:polygon draw:style-name="gr13" draw:text-style-name="P13" draw:layer="layout" svg:width="30.107cm" svg:height="1.397cm" svg:x="1.27cm" svg:y="16.645cm" svg:viewBox="0 0 30108 1398" draw:points="29929,0 178,0 109,14 52,52 14,109 0,178 0,1220 14,1289 52,1346 109,1384 178,1398 29929,1398 29999,1384 30056,1346 30094,1289 30108,1220 30108,178 30094,109 30056,52 29999,14">
          <text:p/>
        </draw:polygon>
        <draw:frame draw:style-name="gr32" draw:text-style-name="P30" draw:layer="layout" svg:width="0.844cm" svg:height="0.34cm" svg:x="31.667cm" svg:y="11.166cm">
          <draw:text-box>
            <text:p text:style-name="P7"><text:span text:style-name="T81">Salida</text:span></text:p>
          </draw:text-box>
        </draw:frame>
        <draw:frame draw:style-name="gr11" draw:text-style-name="P11" draw:layer="layout" svg:width="3.228cm" svg:height="0.39cm" svg:x="1.778cm" svg:y="17.16cm">
          <draw:text-box>
            <text:p text:style-name="P7"><text:span text:style-name="T63">Condición de salida:</text:span></text:p>
          </draw:text-box>
        </draw:frame>
        <draw:frame draw:style-name="gr11" draw:text-style-name="P11" draw:layer="layout" svg:width="3.495cm" svg:height="0.446cm" svg:x="5.157cm" svg:y="17.128cm">
          <draw:text-box>
            <text:p text:style-name="P7"><text:span text:style-name="T82">while opcion !=</text:span></text:p>
          </draw:text-box>
        </draw:frame>
        <draw:frame draw:style-name="gr11" draw:text-style-name="P11" draw:layer="layout" svg:width="0.701cm" svg:height="0.446cm" svg:x="9.079cm" svg:y="17.128cm">
          <draw:text-box>
            <text:p text:style-name="P7"><text:span text:style-name="T82">"9"</text:span></text:p>
          </draw:text-box>
        </draw:frame>
        <draw:frame draw:style-name="gr11" draw:text-style-name="P11" draw:layer="layout" svg:width="6.665cm" svg:height="0.39cm" svg:x="9.9cm" svg:y="17.16cm">
          <draw:text-box>
            <text:p text:style-name="P7"><text:span text:style-name="T83">— </text:span><text:span text:style-name="T83">comparación de texto, sin uso de break</text:span></text:p>
          </draw:text-box>
        </draw:frame>
        <draw:frame draw:style-name="gr24" draw:text-style-name="P23" draw:layer="layout" svg:width="6.585cm" svg:height="0.323cm" svg:x="1.27cm" svg:y="18.254cm">
          <draw:text-box>
            <text:p text:style-name="P7"><text:span text:style-name="T69">MediControl — UADE, Introducción a la Algoritmia</text:span></text:p>
          </draw:text-box>
        </draw:frame>
        <draw:frame draw:style-name="gr24" draw:text-style-name="P23" draw:layer="layout" svg:width="0.321cm" svg:height="0.323cm" svg:x="32.47cm" svg:y="18.254cm">
          <draw:text-box>
            <text:p text:style-name="P7"><text:span text:style-name="T69">7</text:span></text:p>
          </draw:text-box>
        </draw:frame>
      </draw:page>
      <draw:page draw:name="page8" draw:style-name="dp1" draw:master-page-name="master-page3">
        <draw:polygon draw:style-name="gr1" draw:text-style-name="P1" draw:layer="layout" svg:width="33.866cm" svg:height="19.05cm" svg:x="0cm" svg:y="-0.001cm" svg:viewBox="0 0 33867 19051" draw:points="0,19051 33867,19051 33867,0 0,0">
          <text:p/>
        </draw:polygon>
        <draw:polygon draw:style-name="gr12" draw:text-style-name="P12" draw:layer="layout" svg:width="33.866cm" svg:height="19.05cm" svg:x="0cm" svg:y="-0.001cm" svg:viewBox="0 0 33867 19051" draw:points="0,19051 33867,19051 33867,0 0,0">
          <text:p/>
        </draw:polygon>
        <draw:polygon draw:style-name="gr13" draw:text-style-name="P13" draw:layer="layout" svg:width="6.612cm" svg:height="0.931cm" svg:x="1.27cm" svg:y="1.134cm" svg:viewBox="0 0 6613 932" draw:points="6150,0 462,0 339,17 229,64 135,137 63,231 16,343 0,466 16,590 63,702 135,796 229,869 339,916 462,932 6150,932 6273,916 6384,869 6477,796 6550,702 6596,590 6613,466 6596,343 6550,231 6477,137 6384,64 6273,17">
          <text:p/>
        </draw:polygon>
        <draw:frame draw:style-name="gr11" draw:text-style-name="P11" draw:layer="layout" svg:width="1.336cm" svg:height="0.39cm" svg:x="2.805cm" svg:y="1.424cm">
          <draw:text-box>
            <text:p text:style-name="P7"><text:span text:style-name="T63">CÓDIGO</text:span></text:p>
          </draw:text-box>
        </draw:frame>
        <draw:polygon draw:style-name="gr5" draw:text-style-name="P5" draw:layer="layout" svg:width="1.007cm" svg:height="1.033cm" svg:x="1.27cm" svg:y="6.214cm" svg:viewBox="0 0 1008 1034" draw:points="504,0 370,18 250,71 147,151 68,256 17,379 0,517 17,655 68,778 147,883 250,963 370,1016 504,1034 638,1016 759,963 860,883 939,778 990,655 1008,517 990,379 939,256 860,151 759,71 638,18">
          <text:p/>
        </draw:polygon>
        <draw:frame draw:style-name="gr6" draw:text-style-name="P6" draw:layer="layout" svg:width="0.736cm" svg:height="0.761cm" svg:x="1.405cm" svg:y="6.35cm">
          <draw:image xlink:href="Pictures/100002010000001F00000020BE28D0A9BC05BBAE.png" xlink:type="simple" xlink:show="embed" xlink:actuate="onLoad" loext:mime-type="image/png">
            <text:p/>
          </draw:image>
        </draw:frame>
        <draw:frame draw:style-name="gr21" draw:text-style-name="P20" draw:layer="layout" svg:width="12.444cm" svg:height="1.322cm" svg:x="1.27cm" svg:y="2.544cm">
          <draw:text-box>
            <text:p text:style-name="P7"><text:span text:style-name="T64">agregar_medicamento()</text:span></text:p>
          </draw:text-box>
        </draw:frame>
        <draw:frame draw:style-name="gr23" draw:text-style-name="P22" draw:layer="layout" svg:width="12.046cm" svg:height="0.492cm" svg:x="1.27cm" svg:y="4.286cm">
          <draw:text-box>
            <text:p text:style-name="P7"><text:span text:style-name="T65">Registro de medicamentos con validaciones de fecha y stock</text:span></text:p>
          </draw:text-box>
        </draw:frame>
        <draw:frame draw:style-name="gr17" draw:text-style-name="P17" draw:layer="layout" svg:width="7.067cm" svg:height="0.628cm" svg:x="2.125cm" svg:y="5.213cm">
          <draw:text-box>
            <text:p text:style-name="P7"><text:span text:style-name="T84">Validaciones implementadas</text:span></text:p>
          </draw:text-box>
        </draw:frame>
        <draw:frame draw:style-name="gr11" draw:text-style-name="P11" draw:layer="layout" svg:width="9.243cm" svg:height="0.39cm" svg:x="2.668cm" svg:y="6.158cm">
          <draw:text-box>
            <text:p text:style-name="P7"><text:span text:style-name="T85">Las fechas se validan con pedir_fecha(), que exige formato</text:span></text:p>
          </draw:text-box>
        </draw:frame>
        <draw:polygon draw:style-name="gr5" draw:text-style-name="P5" draw:layer="layout" svg:width="1.007cm" svg:height="1.033cm" svg:x="1.27cm" svg:y="8.754cm" svg:viewBox="0 0 1008 1034" draw:points="504,0 370,19 250,72 147,152 68,257 17,380 0,517 17,655 68,778 147,883 250,963 370,1016 504,1034 638,1016 759,963 860,883 939,778 990,655 1008,517 990,380 939,257 860,152 759,72 638,19">
          <text:p/>
        </draw:polygon>
        <draw:frame draw:style-name="gr6" draw:text-style-name="P6" draw:layer="layout" svg:width="0.736cm" svg:height="0.761cm" svg:x="1.405cm" svg:y="8.89cm">
          <draw:image xlink:href="Pictures/100002010000001F00000020BE28D0A9BC05BBAE.png" xlink:type="simple" xlink:show="embed" xlink:actuate="onLoad" loext:mime-type="image/png">
            <text:p/>
          </draw:image>
        </draw:frame>
        <draw:frame draw:style-name="gr11" draw:text-style-name="P11" draw:layer="layout" svg:width="2.153cm" svg:height="0.39cm" svg:x="2.668cm" svg:y="6.666cm">
          <draw:text-box>
            <text:p text:style-name="P7"><text:span text:style-name="T85">YYYY-MM-DD</text:span></text:p>
          </draw:text-box>
        </draw:frame>
        <draw:frame draw:style-name="gr11" draw:text-style-name="P11" draw:layer="layout" svg:width="9.116cm" svg:height="0.39cm" svg:x="2.668cm" svg:y="8.662cm">
          <draw:text-box>
            <text:p text:style-name="P7"><text:span text:style-name="T85">El stock no puede ser 0 ni negativo — se repite el ingreso </text:span></text:p>
          </draw:text-box>
        </draw:frame>
        <draw:polygon draw:style-name="gr5" draw:text-style-name="P5" draw:layer="layout" svg:width="1.007cm" svg:height="1.033cm" svg:x="1.27cm" svg:y="11.294cm" svg:viewBox="0 0 1008 1034" draw:points="504,0 370,18 250,71 147,151 68,256 17,379 0,516 17,655 68,778 147,883 250,963 370,1016 504,1034 638,1016 759,963 860,883 939,778 990,655 1008,516 990,379 939,256 860,151 759,71 638,18">
          <text:p/>
        </draw:polygon>
        <draw:frame draw:style-name="gr6" draw:text-style-name="P6" draw:layer="layout" svg:width="0.736cm" svg:height="0.761cm" svg:x="1.405cm" svg:y="11.43cm">
          <draw:image xlink:href="Pictures/100002010000001F00000020BE28D0A9BC05BBAE.png" xlink:type="simple" xlink:show="embed" xlink:actuate="onLoad" loext:mime-type="image/png">
            <text:p/>
          </draw:image>
        </draw:frame>
        <draw:frame draw:style-name="gr11" draw:text-style-name="P11" draw:layer="layout" svg:width="3.215cm" svg:height="0.39cm" svg:x="2.668cm" svg:y="9.162cm">
          <draw:text-box>
            <text:p text:style-name="P7"><text:span text:style-name="T85">hasta que sea válido</text:span></text:p>
          </draw:text-box>
        </draw:frame>
        <draw:frame draw:style-name="gr11" draw:text-style-name="P11" draw:layer="layout" svg:width="9.815cm" svg:height="0.39cm" svg:x="2.668cm" svg:y="11.206cm">
          <draw:text-box>
            <text:p text:style-name="P7"><text:span text:style-name="T85">Si el medicamento ya venció al cargarlo, el sistema avisa pero </text:span></text:p>
          </draw:text-box>
        </draw:frame>
        <draw:polygon draw:style-name="gr5" draw:text-style-name="P5" draw:layer="layout" svg:width="1.007cm" svg:height="1.033cm" svg:x="1.27cm" svg:y="13.834cm" svg:viewBox="0 0 1008 1034" draw:points="504,0 370,18 250,71 147,152 68,257 17,380 0,517 17,655 68,778 147,883 250,963 370,1016 504,1034 638,1016 759,963 860,883 939,778 990,655 1008,517 990,380 939,257 860,152 759,71 638,18">
          <text:p/>
        </draw:polygon>
        <draw:frame draw:style-name="gr6" draw:text-style-name="P6" draw:layer="layout" svg:width="0.736cm" svg:height="0.761cm" svg:x="1.405cm" svg:y="13.97cm">
          <draw:image xlink:href="Pictures/100002010000001F00000020BE28D0A9BC05BBAE.png" xlink:type="simple" xlink:show="embed" xlink:actuate="onLoad" loext:mime-type="image/png">
            <text:p/>
          </draw:image>
        </draw:frame>
        <draw:frame draw:style-name="gr11" draw:text-style-name="P11" draw:layer="layout" svg:width="1.788cm" svg:height="0.39cm" svg:x="2.668cm" svg:y="11.706cm">
          <draw:text-box>
            <text:p text:style-name="P7"><text:span text:style-name="T85">no bloquea</text:span></text:p>
          </draw:text-box>
        </draw:frame>
        <draw:frame draw:style-name="gr11" draw:text-style-name="P11" draw:layer="layout" svg:width="8.697cm" svg:height="0.39cm" svg:x="2.668cm" svg:y="13.752cm">
          <draw:text-box>
            <text:p text:style-name="P7"><text:span text:style-name="T85">También se guarda el nombre del doctor que recetó el </text:span></text:p>
          </draw:text-box>
        </draw:frame>
        <draw:frame draw:style-name="gr6" draw:text-style-name="P6" draw:layer="layout" svg:width="20.251cm" svg:height="13.317cm" svg:x="12.649cm" svg:y="4.868cm">
          <draw:image xlink:href="Pictures/10000201000002FE000001F80766FA3893421725.png" xlink:type="simple" xlink:show="embed" xlink:actuate="onLoad" loext:mime-type="image/png">
            <text:p/>
          </draw:image>
        </draw:frame>
        <draw:polygon draw:style-name="gr33" draw:text-style-name="P31" draw:layer="layout" svg:width="19.634cm" svg:height="12.7cm" svg:x="12.962cm" svg:y="5.08cm" svg:viewBox="0 0 19635 12701" draw:points="19483,0 152,0 93,11 44,44 12,93 0,152 0,12548 12,12607 44,12656 93,12689 152,12701 19483,12701 19542,12689 19591,12656 19623,12607 19635,12548 19635,152 19623,93 19591,44 19542,11">
          <text:p/>
        </draw:polygon>
        <draw:frame draw:style-name="gr11" draw:text-style-name="P11" draw:layer="layout" svg:width="2.195cm" svg:height="0.39cm" svg:x="2.668cm" svg:y="14.251cm">
          <draw:text-box>
            <text:p text:style-name="P7"><text:span text:style-name="T85">medicamento</text:span></text:p>
          </draw:text-box>
        </draw:frame>
        <draw:frame draw:style-name="gr34" draw:text-style-name="P11" draw:layer="layout" svg:width="6.056cm" svg:height="0.446cm" svg:x="13.601cm" svg:y="5.602cm">
          <draw:text-box>
            <text:p text:style-name="P7"><text:span text:style-name="T86">def agregar_medicamento():</text:span></text:p>
          </draw:text-box>
        </draw:frame>
        <draw:frame draw:style-name="gr11" draw:text-style-name="P11" draw:layer="layout" svg:width="11.178cm" svg:height="0.446cm" svg:x="14.542cm" svg:y="6.095cm">
          <draw:text-box>
            <text:p text:style-name="P7"><text:span text:style-name="T86">nombre = input("Nombre del medicamento: ") dosis</text:span></text:p>
          </draw:text-box>
        </draw:frame>
        <draw:frame draw:style-name="gr11" draw:text-style-name="P11" draw:layer="layout" svg:width="9.315cm" svg:height="0.446cm" svg:x="14.542cm" svg:y="6.595cm">
          <draw:text-box>
            <text:p text:style-name="P7"><text:span text:style-name="T86">= int(input("Pastillas/ml por toma: ")) </text:span></text:p>
          </draw:text-box>
        </draw:frame>
        <draw:frame draw:style-name="gr11" draw:text-style-name="P11" draw:layer="layout" svg:width="10.014cm" svg:height="0.446cm" svg:x="14.542cm" svg:y="7.103cm">
          <draw:text-box>
            <text:p text:style-name="P7"><text:span text:style-name="T86">frecuencia = int(input("Tomas diarias: ")) </text:span></text:p>
          </draw:text-box>
        </draw:frame>
        <draw:frame draw:style-name="gr11" draw:text-style-name="P11" draw:layer="layout" svg:width="6.289cm" svg:height="0.446cm" svg:x="14.542cm" svg:y="7.611cm">
          <draw:text-box>
            <text:p text:style-name="P7"><text:span text:style-name="T86">fecha_inicio = pedir_fecha(</text:span></text:p>
          </draw:text-box>
        </draw:frame>
        <draw:frame draw:style-name="gr11" draw:text-style-name="P11" draw:layer="layout" svg:width="7.918cm" svg:height="0.446cm" svg:x="15.473cm" svg:y="8.102cm">
          <draw:text-box>
            <text:p text:style-name="P7"><text:span text:style-name="T86">"Fecha de inicio (YYYY-MM-DD): ") </text:span></text:p>
          </draw:text-box>
        </draw:frame>
        <draw:frame draw:style-name="gr11" draw:text-style-name="P11" draw:layer="layout" svg:width="7.453cm" svg:height="0.446cm" svg:x="14.542cm" svg:y="8.619cm">
          <draw:text-box>
            <text:p text:style-name="P7"><text:span text:style-name="T86">fecha_termino = pedir_fecha(...)</text:span></text:p>
          </draw:text-box>
        </draw:frame>
        <draw:frame draw:style-name="gr11" draw:text-style-name="P11" draw:layer="layout" svg:width="11.411cm" svg:height="0.446cm" svg:x="14.542cm" svg:y="9.644cm">
          <draw:text-box>
            <text:p text:style-name="P7"><text:span text:style-name="T86">while fecha_termino &lt; fecha_inicio: print("Error:</text:span></text:p>
          </draw:text-box>
        </draw:frame>
        <draw:frame draw:style-name="gr11" draw:text-style-name="P11" draw:layer="layout" svg:width="10.48cm" svg:height="0.446cm" svg:x="15.473cm" svg:y="10.152cm">
          <draw:text-box>
            <text:p text:style-name="P7"><text:span text:style-name="T86">término anterior al inicio.") fecha_termino =</text:span></text:p>
          </draw:text-box>
        </draw:frame>
        <draw:frame draw:style-name="gr11" draw:text-style-name="P11" draw:layer="layout" svg:width="3.727cm" svg:height="0.446cm" svg:x="15.473cm" svg:y="10.66cm">
          <draw:text-box>
            <text:p text:style-name="P7"><text:span text:style-name="T86">pedir_fecha(...)</text:span></text:p>
          </draw:text-box>
        </draw:frame>
        <draw:frame draw:style-name="gr11" draw:text-style-name="P11" draw:layer="layout" svg:width="12.109cm" svg:height="0.446cm" svg:x="13.601cm" svg:y="11.694cm">
          <draw:text-box>
            <text:p text:style-name="P7"><text:span text:style-name="T86">stock = int(input("Stock total disponible: ")) while</text:span></text:p>
          </draw:text-box>
        </draw:frame>
        <draw:frame draw:style-name="gr11" draw:text-style-name="P11" draw:layer="layout" svg:width="2.563cm" svg:height="0.446cm" svg:x="14.542cm" svg:y="12.202cm">
          <draw:text-box>
            <text:p text:style-name="P7"><text:span text:style-name="T86">stock &lt;= 0:</text:span></text:p>
          </draw:text-box>
        </draw:frame>
        <draw:frame draw:style-name="gr11" draw:text-style-name="P11" draw:layer="layout" svg:width="10.48cm" svg:height="0.446cm" svg:x="14.542cm" svg:y="12.718cm">
          <draw:text-box>
            <text:p text:style-name="P7"><text:span text:style-name="T86">stock = int(input("Stock no puede ser 0..."))</text:span></text:p>
          </draw:text-box>
        </draw:frame>
        <draw:frame draw:style-name="gr11" draw:text-style-name="P11" draw:layer="layout" svg:width="6.987cm" svg:height="0.446cm" svg:x="13.601cm" svg:y="13.752cm">
          <draw:text-box>
            <text:p text:style-name="P7"><text:span text:style-name="T86">vencimiento = pedir_fecha(...)</text:span></text:p>
          </draw:text-box>
        </draw:frame>
        <draw:frame draw:style-name="gr11" draw:text-style-name="P11" draw:layer="layout" svg:width="10.014cm" svg:height="0.446cm" svg:x="14.542cm" svg:y="14.235cm">
          <draw:text-box>
            <text:p text:style-name="P7"><text:span text:style-name="T86">if vencimiento &lt;= datetime.now(): print("El</text:span></text:p>
          </draw:text-box>
        </draw:frame>
        <draw:frame draw:style-name="gr34" draw:text-style-name="P11" draw:layer="layout" svg:width="6.521cm" svg:height="0.446cm" svg:x="15.473cm" svg:y="14.75cm">
          <draw:text-box>
            <text:p text:style-name="P7"><text:span text:style-name="T86">medicamento ya ha vencido.")</text:span></text:p>
          </draw:text-box>
        </draw:frame>
        <draw:frame draw:style-name="gr24" draw:text-style-name="P23" draw:layer="layout" svg:width="6.585cm" svg:height="0.323cm" svg:x="1.27cm" svg:y="18.254cm">
          <draw:text-box>
            <text:p text:style-name="P7"><text:span text:style-name="T69">MediControl — UADE, Introducción a la Algoritmia</text:span></text:p>
          </draw:text-box>
        </draw:frame>
        <draw:frame draw:style-name="gr24" draw:text-style-name="P23" draw:layer="layout" svg:width="0.321cm" svg:height="0.323cm" svg:x="32.47cm" svg:y="18.254cm">
          <draw:text-box>
            <text:p text:style-name="P7"><text:span text:style-name="T69">8</text:span></text:p>
          </draw:text-box>
        </draw:frame>
        <draw:frame draw:style-name="gr11" draw:text-style-name="P11" draw:layer="layout" svg:width="7.686cm" svg:height="0.446cm" svg:x="14.537cm" svg:y="15.676cm">
          <draw:text-box>
            <text:p text:style-name="P7"><text:span text:style-name="T86">nombre_doctor = input("Doctor: ")</text:span></text:p>
          </draw:text-box>
        </draw:frame>
      </draw:page>
      <draw:page draw:name="page9" draw:style-name="dp1" draw:master-page-name="master-page3">
        <draw:polygon draw:style-name="gr1" draw:text-style-name="P1" draw:layer="layout" svg:width="33.866cm" svg:height="19.05cm" svg:x="0cm" svg:y="-0.001cm" svg:viewBox="0 0 33867 19051" draw:points="0,19051 33867,19051 33867,0 0,0">
          <text:p/>
        </draw:polygon>
        <draw:polygon draw:style-name="gr12" draw:text-style-name="P12" draw:layer="layout" svg:width="33.866cm" svg:height="19.05cm" svg:x="0cm" svg:y="-0.001cm" svg:viewBox="0 0 33867 19051" draw:points="0,19051 33867,19051 33867,0 0,0">
          <text:p/>
        </draw:polygon>
        <draw:polygon draw:style-name="gr13" draw:text-style-name="P13" draw:layer="layout" svg:width="6.612cm" svg:height="0.931cm" svg:x="1.27cm" svg:y="1.134cm" svg:viewBox="0 0 6613 932" draw:points="6150,0 462,0 339,17 229,64 135,137 63,231 16,343 0,466 16,590 63,702 135,796 229,869 339,916 462,932 6150,932 6273,916 6384,869 6477,796 6550,702 6596,590 6613,466 6596,343 6550,231 6477,137 6384,64 6273,17">
          <text:p/>
        </draw:polygon>
        <draw:frame draw:style-name="gr11" draw:text-style-name="P11" draw:layer="layout" svg:width="1.336cm" svg:height="0.39cm" svg:x="2.305cm" svg:y="1.424cm">
          <draw:text-box>
            <text:p text:style-name="P7"><text:span text:style-name="T63">CÓDIGO</text:span></text:p>
          </draw:text-box>
        </draw:frame>
        <draw:frame draw:style-name="gr21" draw:text-style-name="P20" draw:layer="layout" svg:width="18.646cm" svg:height="1.322cm" svg:x="1.27cm" svg:y="2.055cm">
          <draw:text-box>
            <text:p text:style-name="P7"><text:span text:style-name="T64">Stock, vencimientos y días restantes</text:span></text:p>
          </draw:text-box>
        </draw:frame>
        <draw:frame draw:style-name="gr19" draw:text-style-name="P19" draw:layer="layout" svg:width="3.118cm" svg:height="0.425cm" svg:x="1.27cm" svg:y="4.583cm">
          <draw:text-box>
            <text:p text:style-name="P7"><text:span text:style-name="T87">verificar_alertas()</text:span></text:p>
          </draw:text-box>
        </draw:frame>
        <draw:frame draw:style-name="gr6" draw:text-style-name="P6" draw:layer="layout" svg:width="15.722cm" svg:height="11.175cm" svg:x="0.957cm" svg:y="5.241cm">
          <draw:image xlink:href="Pictures/1000020100000253000001A797DEC117FF5EB4B2.png" xlink:type="simple" xlink:show="embed" xlink:actuate="onLoad" loext:mime-type="image/png">
            <text:p/>
          </draw:image>
        </draw:frame>
        <draw:polygon draw:style-name="gr33" draw:text-style-name="P31" draw:layer="layout" svg:width="15.104cm" svg:height="10.55cm" svg:x="1.27cm" svg:y="5.452cm" svg:viewBox="0 0 15105 10551" draw:points="14952,0 152,0 93,12 44,45 11,93 0,153 0,10398 11,10457 44,10506 93,10539 152,10551 14952,10551 15012,10539 15060,10506 15093,10457 15105,10398 15105,153 15093,93 15060,45 15012,12">
          <text:p/>
        </draw:polygon>
        <draw:frame draw:style-name="gr19" draw:text-style-name="P19" draw:layer="layout" svg:width="4.409cm" svg:height="0.425cm" svg:x="17.42cm" svg:y="4.583cm">
          <draw:text-box>
            <text:p text:style-name="P7"><text:span text:style-name="T87">calcular_dias_restantes()</text:span></text:p>
          </draw:text-box>
        </draw:frame>
        <draw:frame draw:style-name="gr28" draw:text-style-name="P26" draw:layer="layout" svg:width="7.855cm" svg:height="0.42cm" svg:x="1.905cm" svg:y="6.009cm">
          <draw:text-box>
            <text:p text:style-name="P7"><text:span text:style-name="T88">def verificar_alertas(medicamentos,</text:span></text:p>
          </draw:text-box>
        </draw:frame>
        <draw:frame draw:style-name="gr28" draw:text-style-name="P26" draw:layer="layout" svg:width="7.182cm" svg:height="0.42cm" svg:x="3.675cm" svg:y="6.483cm">
          <draw:text-box>
            <text:p text:style-name="P7"><text:span text:style-name="T88">umbral_stock, dias_vencimiento):</text:span></text:p>
          </draw:text-box>
        </draw:frame>
        <draw:frame draw:style-name="gr28" draw:text-style-name="P26" draw:layer="layout" svg:width="4.489cm" svg:height="0.42cm" svg:x="2.786cm" svg:y="6.967cm">
          <draw:text-box>
            <text:p text:style-name="P7"><text:span text:style-name="T88">hoy = datetime.now()</text:span></text:p>
          </draw:text-box>
        </draw:frame>
        <draw:frame draw:style-name="gr28" draw:text-style-name="P26" draw:layer="layout" svg:width="5.387cm" svg:height="0.42cm" svg:x="2.786cm" svg:y="7.449cm">
          <draw:text-box>
            <text:p text:style-name="P7"><text:span text:style-name="T88">for med in medicamentos:</text:span></text:p>
          </draw:text-box>
        </draw:frame>
        <draw:frame draw:style-name="gr28" draw:text-style-name="P26" draw:layer="layout" svg:width="6.957cm" svg:height="0.42cm" svg:x="3.675cm" svg:y="7.924cm">
          <draw:text-box>
            <text:p text:style-name="P7"><text:span text:style-name="T88">if med['stock'] &lt; umbral_stock:</text:span></text:p>
          </draw:text-box>
        </draw:frame>
        <draw:frame draw:style-name="gr28" draw:text-style-name="P26" draw:layer="layout" svg:width="6.509cm" svg:height="0.42cm" svg:x="4.607cm" svg:y="8.405cm">
          <draw:text-box>
            <text:p text:style-name="P7"><text:span text:style-name="T88">print(f"Alerta: stock bajo de</text:span></text:p>
          </draw:text-box>
        </draw:frame>
        <draw:frame draw:style-name="gr28" draw:text-style-name="P26" draw:layer="layout" svg:width="3.816cm" svg:height="0.42cm" svg:x="5.903cm" svg:y="8.889cm">
          <draw:text-box>
            <text:p text:style-name="P7"><text:span text:style-name="T88">{med['nombre']}")</text:span></text:p>
          </draw:text-box>
        </draw:frame>
        <draw:frame draw:style-name="gr28" draw:text-style-name="P26" draw:layer="layout" svg:width="4.041cm" svg:height="0.42cm" svg:x="3.671cm" svg:y="9.853cm">
          <draw:text-box>
            <text:p text:style-name="P7"><text:span text:style-name="T88">dias_faltantes = (</text:span></text:p>
          </draw:text-box>
        </draw:frame>
        <draw:frame draw:style-name="gr28" draw:text-style-name="P26" draw:layer="layout" svg:width="6.733cm" svg:height="0.42cm" svg:x="4.552cm" svg:y="10.327cm">
          <draw:text-box>
            <text:p text:style-name="P7"><text:span text:style-name="T88">med['vencimiento'] - hoy).days</text:span></text:p>
          </draw:text-box>
        </draw:frame>
        <draw:frame draw:style-name="gr28" draw:text-style-name="P26" draw:layer="layout" svg:width="8.528cm" svg:height="0.42cm" svg:x="3.671cm" svg:y="10.818cm">
          <draw:text-box>
            <text:p text:style-name="P7"><text:span text:style-name="T88">if (dias_faltantes &lt; dias_vencimiento </text:span></text:p>
          </draw:text-box>
        </draw:frame>
        <draw:frame draw:style-name="gr28" draw:text-style-name="P26" draw:layer="layout" svg:width="5.611cm" svg:height="0.42cm" svg:x="5.441cm" svg:y="11.276cm">
          <draw:text-box>
            <text:p text:style-name="P7"><text:span text:style-name="T88">and dias_faltantes &gt;= 0):</text:span></text:p>
          </draw:text-box>
        </draw:frame>
        <draw:frame draw:style-name="gr28" draw:text-style-name="P26" draw:layer="layout" svg:width="6.509cm" svg:height="0.42cm" svg:x="3.637cm" svg:y="11.725cm">
          <draw:text-box>
            <text:p text:style-name="P7"><text:span text:style-name="T88">print(f"{med['nombre']} vence</text:span></text:p>
          </draw:text-box>
        </draw:frame>
        <draw:frame draw:style-name="gr6" draw:text-style-name="P6" draw:layer="layout" svg:width="15.722cm" svg:height="11.175cm" svg:x="17.094cm" svg:y="5.241cm">
          <draw:image xlink:href="Pictures/1000020100000253000001A797DEC117FF5EB4B2.png" xlink:type="simple" xlink:show="embed" xlink:actuate="onLoad" loext:mime-type="image/png">
            <text:p/>
          </draw:image>
        </draw:frame>
        <draw:polygon draw:style-name="gr33" draw:text-style-name="P31" draw:layer="layout" svg:width="15.113cm" svg:height="10.55cm" svg:x="17.407cm" svg:y="5.452cm" svg:viewBox="0 0 15114 10551" draw:points="14961,0 153,0 93,12 45,45 12,93 0,153 0,10398 12,10457 45,10506 93,10539 153,10551 14961,10551 15020,10539 15069,10506 15102,10457 15114,10398 15114,153 15102,93 15069,45 15020,12">
          <text:p/>
        </draw:polygon>
        <draw:frame draw:style-name="gr28" draw:text-style-name="P26" draw:layer="layout" svg:width="5.836cm" svg:height="0.42cm" svg:x="4.111cm" svg:y="12.208cm">
          <draw:text-box>
            <text:p text:style-name="P7"><text:span text:style-name="T88">en {dias_faltantes} días")</text:span></text:p>
          </draw:text-box>
        </draw:frame>
        <draw:frame draw:style-name="gr28" draw:text-style-name="P26" draw:layer="layout" svg:width="6.284cm" svg:height="0.42cm" svg:x="18.051cm" svg:y="6.009cm">
          <draw:text-box>
            <text:p text:style-name="P7"><text:span text:style-name="T88">def calcular_dias_restantes(</text:span></text:p>
          </draw:text-box>
        </draw:frame>
        <draw:frame draw:style-name="gr28" draw:text-style-name="P26" draw:layer="layout" svg:width="3.143cm" svg:height="0.42cm" svg:x="19.821cm" svg:y="6.483cm">
          <draw:text-box>
            <text:p text:style-name="P7"><text:span text:style-name="T88">medicamentos):</text:span></text:p>
          </draw:text-box>
        </draw:frame>
        <draw:frame draw:style-name="gr28" draw:text-style-name="P26" draw:layer="layout" svg:width="9.65cm" svg:height="0.42cm" svg:x="18.932cm" svg:y="6.975cm">
          <draw:text-box>
            <text:p text:style-name="P7"><text:span text:style-name="T88">for med in medicamentos: if med['dosis'] &gt; </text:span></text:p>
          </draw:text-box>
        </draw:frame>
        <draw:frame draw:style-name="gr28" draw:text-style-name="P26" draw:layer="layout" svg:width="0.451cm" svg:height="0.42cm" svg:x="19.821cm" svg:y="7.432cm">
          <draw:text-box>
            <text:p text:style-name="P7"><text:span text:style-name="T88">0:</text:span></text:p>
          </draw:text-box>
        </draw:frame>
        <draw:frame draw:style-name="gr28" draw:text-style-name="P26" draw:layer="layout" svg:width="2.919cm" svg:height="0.42cm" svg:x="19.821cm" svg:y="7.881cm">
          <draw:text-box>
            <text:p text:style-name="P7"><text:span text:style-name="T88">total_dia = (</text:span></text:p>
          </draw:text-box>
        </draw:frame>
        <draw:frame draw:style-name="gr28" draw:text-style-name="P26" draw:layer="layout" svg:width="3.143cm" svg:height="0.42cm" svg:x="20.702cm" svg:y="8.363cm">
          <draw:text-box>
            <text:p text:style-name="P7"><text:span text:style-name="T88">med['dosis'] *</text:span></text:p>
          </draw:text-box>
        </draw:frame>
        <draw:frame draw:style-name="gr28" draw:text-style-name="P26" draw:layer="layout" svg:width="4.041cm" svg:height="0.42cm" svg:x="20.702cm" svg:y="8.847cm">
          <draw:text-box>
            <text:p text:style-name="P7"><text:span text:style-name="T88">med['frecuencia'])</text:span></text:p>
          </draw:text-box>
        </draw:frame>
        <draw:frame draw:style-name="gr28" draw:text-style-name="P26" draw:layer="layout" svg:width="7.63cm" svg:height="0.42cm" svg:x="20.702cm" svg:y="9.338cm">
          <draw:text-box>
            <text:p text:style-name="P7"><text:span text:style-name="T88">dias_restantes = ( med['stock'] //</text:span></text:p>
          </draw:text-box>
        </draw:frame>
        <draw:frame draw:style-name="gr28" draw:text-style-name="P26" draw:layer="layout" svg:width="2.246cm" svg:height="0.42cm" svg:x="21.583cm" svg:y="9.821cm">
          <draw:text-box>
            <text:p text:style-name="P7"><text:span text:style-name="T88">total_dia)</text:span></text:p>
          </draw:text-box>
        </draw:frame>
        <draw:frame draw:style-name="gr28" draw:text-style-name="P26" draw:layer="layout" svg:width="6.733cm" svg:height="0.42cm" svg:x="20.702cm" svg:y="10.286cm">
          <draw:text-box>
            <text:p text:style-name="P7"><text:span text:style-name="T88">print(f"{med['nombre']} tiene </text:span></text:p>
          </draw:text-box>
        </draw:frame>
        <draw:frame draw:style-name="gr28" draw:text-style-name="P26" draw:layer="layout" svg:width="6.509cm" svg:height="0.42cm" svg:x="22.024cm" svg:y="10.77cm">
          <draw:text-box>
            <text:p text:style-name="P7"><text:span text:style-name="T88">stock para ~{dias_restantes} </text:span></text:p>
          </draw:text-box>
        </draw:frame>
        <draw:frame draw:style-name="gr28" draw:text-style-name="P26" draw:layer="layout" svg:width="1.348cm" svg:height="0.42cm" svg:x="22.024cm" svg:y="11.244cm">
          <draw:text-box>
            <text:p text:style-name="P7"><text:span text:style-name="T88">días")</text:span></text:p>
          </draw:text-box>
        </draw:frame>
        <draw:frame draw:style-name="gr28" draw:text-style-name="P26" draw:layer="layout" svg:width="1.124cm" svg:height="0.42cm" svg:x="18.492cm" svg:y="11.735cm">
          <draw:text-box>
            <text:p text:style-name="P7"><text:span text:style-name="T88">else:</text:span></text:p>
          </draw:text-box>
        </draw:frame>
        <draw:polygon draw:style-name="gr13" draw:text-style-name="P13" draw:layer="layout" svg:width="31.326cm" svg:height="1.27cm" svg:x="1.27cm" svg:y="16.374cm" svg:viewBox="0 0 31327 1271" draw:points="31175,0 152,0 93,12 44,45 11,93 0,152 0,1119 11,1178 44,1226 93,1259 152,1271 31175,1271 31234,1259 31283,1226 31315,1178 31327,1119 31327,152 31315,93 31283,45 31234,12">
          <text:p/>
        </draw:polygon>
        <draw:frame draw:style-name="gr28" draw:text-style-name="P26" draw:layer="layout" svg:width="5.836cm" svg:height="0.42cm" svg:x="19.372cm" svg:y="12.217cm">
          <draw:text-box>
            <text:p text:style-name="P7"><text:span text:style-name="T88">print("Error en la dosis")</text:span></text:p>
          </draw:text-box>
        </draw:frame>
        <draw:frame draw:style-name="gr28" draw:text-style-name="P26" draw:layer="layout" svg:width="22.985cm" svg:height="0.374cm" svg:x="1.778cm" svg:y="16.869cm">
          <draw:text-box>
            <text:p text:style-name="P7"><text:span text:style-name="T89">Los parámetros umbral y dias_venc se ingresan en la opción 4 del menú, dentro de main(), y se pasan directo a las funciones cuando se elige la opción 7.</text:span></text:p>
          </draw:text-box>
        </draw:frame>
        <draw:frame draw:style-name="gr24" draw:text-style-name="P23" draw:layer="layout" svg:width="6.585cm" svg:height="0.323cm" svg:x="1.27cm" svg:y="18.254cm">
          <draw:text-box>
            <text:p text:style-name="P7"><text:span text:style-name="T69">MediControl — UADE, Introducción a la Algoritmia</text:span></text:p>
          </draw:text-box>
        </draw:frame>
        <draw:frame draw:style-name="gr24" draw:text-style-name="P23" draw:layer="layout" svg:width="0.321cm" svg:height="0.323cm" svg:x="32.31cm" svg:y="18.254cm">
          <draw:text-box>
            <text:p text:style-name="P7"><text:span text:style-name="T69">8</text:span></text:p>
          </draw:text-box>
        </draw:frame>
      </draw:page>
      <draw:page draw:name="page10" draw:style-name="dp1" draw:master-page-name="master-page3">
        <draw:polygon draw:style-name="gr1" draw:text-style-name="P1" draw:layer="layout" svg:width="33.866cm" svg:height="19.05cm" svg:x="0cm" svg:y="-0.001cm" svg:viewBox="0 0 33867 19051" draw:points="0,19051 33867,19051 33867,0 0,0">
          <text:p/>
        </draw:polygon>
        <draw:polygon draw:style-name="gr12" draw:text-style-name="P12" draw:layer="layout" svg:width="33.866cm" svg:height="19.05cm" svg:x="0cm" svg:y="-0.001cm" svg:viewBox="0 0 33867 19051" draw:points="0,19051 33867,19051 33867,0 0,0">
          <text:p/>
        </draw:polygon>
        <draw:polygon draw:style-name="gr13" draw:text-style-name="P13" draw:layer="layout" svg:width="6.612cm" svg:height="0.931cm" svg:x="1.27cm" svg:y="1.134cm" svg:viewBox="0 0 6613 932" draw:points="6150,0 462,0 339,17 229,64 135,137 63,231 16,343 0,466 16,590 63,702 135,796 229,869 339,916 462,932 6150,932 6273,916 6384,869 6477,796 6550,702 6596,590 6613,466 6596,343 6550,231 6477,137 6384,64 6273,17">
          <text:p/>
        </draw:polygon>
        <draw:frame draw:style-name="gr11" draw:text-style-name="P11" draw:layer="layout" svg:width="1.336cm" svg:height="0.39cm" svg:x="2.805cm" svg:y="1.424cm">
          <draw:text-box>
            <text:p text:style-name="P7"><text:span text:style-name="T63">CÓDIGO</text:span></text:p>
          </draw:text-box>
        </draw:frame>
        <draw:polygon draw:style-name="gr22" draw:text-style-name="P21" draw:layer="layout" svg:width="1.16cm" svg:height="1.16cm" svg:x="1.236cm" svg:y="5.503cm" svg:viewBox="0 0 1161 1161" draw:points="581,0 447,15 325,59 217,127 127,217 59,325 15,447 0,580 15,713 59,835 127,943 217,1033 325,1102 447,1146 581,1161 714,1146 836,1102 943,1033 1033,943 1102,835 1145,713 1161,580 1145,447 1102,325 1033,217 943,127 836,59 714,15">
          <text:p/>
        </draw:polygon>
        <draw:frame draw:style-name="gr6" draw:text-style-name="P6" draw:layer="layout" svg:width="0.846cm" svg:height="0.846cm" svg:x="1.397cm" svg:y="5.656cm">
          <draw:image xlink:href="Pictures/1000020100000022000000224C8FB4CE2551D3F3.png" xlink:type="simple" xlink:show="embed" xlink:actuate="onLoad" loext:mime-type="image/png">
            <text:p/>
          </draw:image>
        </draw:frame>
        <draw:frame draw:style-name="gr21" draw:text-style-name="P20" draw:layer="layout" svg:width="7.978cm" svg:height="1.322cm" svg:x="1.27cm" svg:y="2.544cm">
          <draw:text-box>
            <text:p text:style-name="P7"><text:span text:style-name="T64">hablar_con_ia()</text:span></text:p>
          </draw:text-box>
        </draw:frame>
        <draw:frame draw:style-name="gr23" draw:text-style-name="P22" draw:layer="layout" svg:width="13.214cm" svg:height="0.492cm" svg:x="1.27cm" svg:y="4.286cm">
          <draw:text-box>
            <text:p text:style-name="P7"><text:span text:style-name="T65">Asistente médico basado en GPT-5.5 con historial de conversación</text:span></text:p>
          </draw:text-box>
        </draw:frame>
        <draw:polygon draw:style-name="gr22" draw:text-style-name="P21" draw:layer="layout" svg:width="1.159cm" svg:height="1.16cm" svg:x="1.27cm" svg:y="7.755cm" svg:viewBox="0 0 1160 1161" draw:points="580,0 446,15 324,59 217,127 127,217 58,325 15,447 0,580 15,713 58,835 127,944 217,1034 324,1102 446,1146 580,1161 713,1146 836,1102 943,1034 1033,944 1101,835 1145,713 1160,580 1145,447 1101,325 1033,217 943,127 836,59 713,15">
          <text:p/>
        </draw:polygon>
        <draw:frame draw:style-name="gr6" draw:text-style-name="P6" draw:layer="layout" svg:width="0.846cm" svg:height="0.846cm" svg:x="1.431cm" svg:y="7.908cm">
          <draw:image xlink:href="Pictures/100002010000001F0000001F6A9D2BEA589666A3.png" xlink:type="simple" xlink:show="embed" xlink:actuate="onLoad" loext:mime-type="image/png">
            <text:p/>
          </draw:image>
        </draw:frame>
        <draw:frame draw:style-name="gr11" draw:text-style-name="P11" draw:layer="layout" svg:width="8.642cm" svg:height="0.39cm" svg:x="2.795cm" svg:y="5.243cm">
          <draw:text-box>
            <text:p text:style-name="P7"><text:span text:style-name="T85">Usa el modelo GPT-5.5 de OpenAI vía la API Responses</text:span></text:p>
          </draw:text-box>
        </draw:frame>
        <draw:frame draw:style-name="gr11" draw:text-style-name="P11" draw:layer="layout" svg:width="6.631cm" svg:height="0.39cm" svg:x="2.795cm" svg:y="7.761cm">
          <draw:text-box>
            <text:p text:style-name="P7"><text:span text:style-name="T85">La API key se carga desde un archivo .env,</text:span></text:p>
          </draw:text-box>
        </draw:frame>
        <draw:frame draw:style-name="gr11" draw:text-style-name="P11" draw:layer="layout" svg:width="1.911cm" svg:height="0.39cm" svg:x="9.765cm" svg:y="7.761cm">
          <draw:text-box>
            <text:p text:style-name="P7"><text:span text:style-name="T85">nunca en el </text:span></text:p>
          </draw:text-box>
        </draw:frame>
        <draw:polygon draw:style-name="gr22" draw:text-style-name="P21" draw:layer="layout" svg:width="1.159cm" svg:height="1.16cm" svg:x="1.27cm" svg:y="10.295cm" svg:viewBox="0 0 1160 1161" draw:points="580,0 446,15 324,59 217,127 127,217 58,325 15,447 0,580 15,713 58,836 127,944 217,1034 324,1102 446,1146 580,1161 713,1146 836,1102 943,1034 1033,944 1101,836 1145,713 1160,580 1145,447 1101,325 1033,217 943,127 836,59 713,15">
          <text:p/>
        </draw:polygon>
        <draw:frame draw:style-name="gr6" draw:text-style-name="P6" draw:layer="layout" svg:width="0.846cm" svg:height="0.846cm" svg:x="1.431cm" svg:y="10.448cm">
          <draw:image xlink:href="Pictures/1000020100000043000000444527CCCDA0542202.png" xlink:type="simple" xlink:show="embed" xlink:actuate="onLoad" loext:mime-type="image/png">
            <text:p/>
          </draw:image>
        </draw:frame>
        <draw:frame draw:style-name="gr34" draw:text-style-name="P11" draw:layer="layout" svg:width="1.056cm" svg:height="0.39cm" svg:x="2.795cm" svg:y="8.286cm">
          <draw:text-box>
            <text:p text:style-name="P7"><text:span text:style-name="T85">código</text:span></text:p>
          </draw:text-box>
        </draw:frame>
        <draw:frame draw:style-name="gr11" draw:text-style-name="P11" draw:layer="layout" svg:width="0.388cm" svg:height="0.39cm" svg:x="2.795cm" svg:y="10.306cm">
          <draw:text-box>
            <text:p text:style-name="P7"><text:span text:style-name="T85">El</text:span></text:p>
          </draw:text-box>
        </draw:frame>
        <draw:frame draw:style-name="gr11" draw:text-style-name="P11" draw:layer="layout" svg:width="7.893cm" svg:height="0.39cm" svg:x="3.193cm" svg:y="10.306cm">
          <draw:text-box>
            <text:p text:style-name="P7"><text:span text:style-name="T85">rol de sistema limita al asistente a medicamentos </text:span></text:p>
          </draw:text-box>
        </draw:frame>
        <draw:frame draw:style-name="gr11" draw:text-style-name="P11" draw:layer="layout" svg:width="6.538cm" svg:height="0.39cm" svg:x="2.795cm" svg:y="10.832cm">
          <draw:text-box>
            <text:p text:style-name="P7"><text:span text:style-name="T85">(Vademécum Argentino) con un guardrail</text:span></text:p>
          </draw:text-box>
        </draw:frame>
        <draw:polygon draw:style-name="gr22" draw:text-style-name="P21" draw:layer="layout" svg:width="1.159cm" svg:height="1.16cm" svg:x="1.27cm" svg:y="12.835cm" svg:viewBox="0 0 1160 1161" draw:points="580,0 446,15 324,59 217,127 127,217 58,325 15,447 0,581 15,714 58,836 127,944 217,1034 324,1102 446,1146 580,1161 713,1146 836,1102 943,1034 1033,944 1101,836 1145,714 1160,581 1145,447 1101,325 1033,217 943,127 836,59 713,15">
          <text:p/>
        </draw:polygon>
        <draw:frame draw:style-name="gr6" draw:text-style-name="P6" draw:layer="layout" svg:width="0.846cm" svg:height="0.846cm" svg:x="1.431cm" svg:y="12.988cm">
          <draw:image xlink:href="Pictures/100002010000001F0000001F72DF3870E259D011.png" xlink:type="simple" xlink:show="embed" xlink:actuate="onLoad" loext:mime-type="image/png">
            <text:p/>
          </draw:image>
        </draw:frame>
        <draw:frame draw:style-name="gr11" draw:text-style-name="P11" draw:layer="layout" svg:width="1.34cm" svg:height="0.39cm" svg:x="9.654cm" svg:y="10.832cm">
          <draw:text-box>
            <text:p text:style-name="P7"><text:span text:style-name="T85">explícito</text:span></text:p>
          </draw:text-box>
        </draw:frame>
        <draw:frame draw:style-name="gr11" draw:text-style-name="P11" draw:layer="layout" svg:width="0.388cm" svg:height="0.39cm" svg:x="2.795cm" svg:y="12.851cm">
          <draw:text-box>
            <text:p text:style-name="P7"><text:span text:style-name="T85">El</text:span></text:p>
          </draw:text-box>
        </draw:frame>
        <draw:frame draw:style-name="gr11" draw:text-style-name="P11" draw:layer="layout" svg:width="7.8cm" svg:height="0.39cm" svg:x="3.193cm" svg:y="12.851cm">
          <draw:text-box>
            <text:p text:style-name="P7"><text:span text:style-name="T85">historial completo se envía en cada llamada para </text:span></text:p>
          </draw:text-box>
        </draw:frame>
        <draw:frame draw:style-name="gr11" draw:text-style-name="P11" draw:layer="layout" svg:width="3.058cm" svg:height="0.39cm" svg:x="2.795cm" svg:y="13.377cm">
          <draw:text-box>
            <text:p text:style-name="P7"><text:span text:style-name="T85">mantener contexto</text:span></text:p>
          </draw:text-box>
        </draw:frame>
        <draw:frame draw:style-name="gr32" draw:text-style-name="P30" draw:layer="layout" svg:width="10.568cm" svg:height="0.34cm" svg:x="1.27cm" svg:y="15.69cm">
          <draw:text-box>
            <text:p text:style-name="P7"><text:span text:style-name="T90">El loop usa "while mensaje.lower() != 'salir'" — sin break, condición directa en</text:span></text:p>
          </draw:text-box>
        </draw:frame>
        <draw:frame draw:style-name="gr6" draw:text-style-name="P6" draw:layer="layout" svg:width="20.251cm" svg:height="13.317cm" svg:x="12.649cm" svg:y="4.868cm">
          <draw:image xlink:href="Pictures/10000201000002FE000001F80766FA3893421725.png" xlink:type="simple" xlink:show="embed" xlink:actuate="onLoad" loext:mime-type="image/png">
            <text:p/>
          </draw:image>
        </draw:frame>
        <draw:polygon draw:style-name="gr33" draw:text-style-name="P31" draw:layer="layout" svg:width="19.634cm" svg:height="12.7cm" svg:x="12.962cm" svg:y="5.08cm" svg:viewBox="0 0 19635 12701" draw:points="19483,0 152,0 93,11 44,44 12,93 0,152 0,12548 12,12607 44,12656 93,12689 152,12701 19483,12701 19542,12689 19591,12656 19623,12607 19635,12548 19635,152 19623,93 19591,44 19542,11">
          <text:p/>
        </draw:polygon>
        <draw:frame draw:style-name="gr35" draw:text-style-name="P30" draw:layer="layout" svg:width="1.128cm" svg:height="0.34cm" svg:x="1.27cm" svg:y="16.13cm">
          <draw:text-box>
            <text:p text:style-name="P7"><text:span text:style-name="T90">el while.</text:span></text:p>
          </draw:text-box>
        </draw:frame>
        <draw:frame draw:style-name="gr28" draw:text-style-name="P26" draw:layer="layout" svg:width="7.855cm" svg:height="0.42cm" svg:x="13.601cm" svg:y="5.611cm">
          <draw:text-box>
            <text:p text:style-name="P7"><text:span text:style-name="T88">def hablar_con_ia(): historial = [{</text:span></text:p>
          </draw:text-box>
        </draw:frame>
        <draw:frame draw:style-name="gr28" draw:text-style-name="P26" draw:layer="layout" svg:width="3.816cm" svg:height="0.42cm" svg:x="14.482cm" svg:y="6.102cm">
          <draw:text-box>
            <text:p text:style-name="P7"><text:span text:style-name="T88">"role": "system",</text:span></text:p>
          </draw:text-box>
        </draw:frame>
        <draw:frame draw:style-name="gr28" draw:text-style-name="P26" draw:layer="layout" svg:width="6.957cm" svg:height="0.42cm" svg:x="14.482cm" svg:y="6.585cm">
          <draw:text-box>
            <text:p text:style-name="P7"><text:span text:style-name="T88">"content": ("Asistente médico,"</text:span></text:p>
          </draw:text-box>
        </draw:frame>
        <draw:frame draw:style-name="gr28" draw:text-style-name="P26" draw:layer="layout" svg:width="3.816cm" svg:height="0.42cm" svg:x="15.371cm" svg:y="7.059cm">
          <draw:text-box>
            <text:p text:style-name="P7"><text:span text:style-name="T88">" solo VADEMECUM"</text:span></text:p>
          </draw:text-box>
        </draw:frame>
        <draw:frame draw:style-name="gr28" draw:text-style-name="P26" draw:layer="layout" svg:width="6.733cm" svg:height="0.42cm" svg:x="15.371cm" svg:y="7.543cm">
          <draw:text-box>
            <text:p text:style-name="P7"><text:span text:style-name="T88">" ARGENTINO. No otros temas.")</text:span></text:p>
          </draw:text-box>
        </draw:frame>
        <draw:frame draw:style-name="gr28" draw:text-style-name="P26" draw:layer="layout" svg:width="0.451cm" svg:height="0.42cm" svg:x="13.601cm" svg:y="8.025cm">
          <draw:text-box>
            <text:p text:style-name="P7"><text:span text:style-name="T88">}]</text:span></text:p>
          </draw:text-box>
        </draw:frame>
        <draw:frame draw:style-name="gr24" draw:text-style-name="P23" draw:layer="layout" svg:width="6.585cm" svg:height="0.323cm" svg:x="1.27cm" svg:y="18.254cm">
          <draw:text-box>
            <text:p text:style-name="P7"><text:span text:style-name="T69">MediControl — UADE, Introducción a la Algoritmia</text:span></text:p>
          </draw:text-box>
        </draw:frame>
        <draw:frame draw:style-name="gr24" draw:text-style-name="P23" draw:layer="layout" svg:width="0.321cm" svg:height="0.323cm" svg:x="32.31cm" svg:y="18.254cm">
          <draw:text-box>
            <text:p text:style-name="P7"><text:span text:style-name="T69">9</text:span></text:p>
          </draw:text-box>
        </draw:frame>
        <draw:frame draw:style-name="gr28" draw:text-style-name="P26" draw:layer="layout" svg:width="2.694cm" svg:height="0.42cm" svg:x="14.485cm" svg:y="9.469cm">
          <draw:text-box>
            <text:p text:style-name="P7"><text:span text:style-name="T88">mensaje = ""</text:span></text:p>
          </draw:text-box>
        </draw:frame>
        <draw:frame draw:style-name="gr28" draw:text-style-name="P26" draw:layer="layout" svg:width="9.65cm" svg:height="0.42cm" svg:x="14.485cm" svg:y="9.928cm">
          <draw:text-box>
            <text:p text:style-name="P7"><text:span text:style-name="T88">while mensaje.lower() != "salir": mensaje =</text:span></text:p>
          </draw:text-box>
        </draw:frame>
        <draw:frame draw:style-name="gr28" draw:text-style-name="P26" draw:layer="layout" svg:width="9.65cm" svg:height="0.42cm" svg:x="15.365cm" svg:y="10.402cm">
          <draw:text-box>
            <text:p text:style-name="P7"><text:span text:style-name="T88">input("Tu: ").strip() if mensaje.lower() !=</text:span></text:p>
          </draw:text-box>
        </draw:frame>
        <draw:frame draw:style-name="gr28" draw:text-style-name="P26" draw:layer="layout" svg:width="1.797cm" svg:height="0.42cm" svg:x="15.365cm" svg:y="10.884cm">
          <draw:text-box>
            <text:p text:style-name="P7"><text:span text:style-name="T88">"salir":</text:span></text:p>
          </draw:text-box>
        </draw:frame>
        <draw:frame draw:style-name="gr28" draw:text-style-name="P26" draw:layer="layout" svg:width="3.816cm" svg:height="0.42cm" svg:x="15.365cm" svg:y="11.375cm">
          <draw:text-box>
            <text:p text:style-name="P7"><text:span text:style-name="T88">historial.append(</text:span></text:p>
          </draw:text-box>
        </draw:frame>
        <draw:frame draw:style-name="gr28" draw:text-style-name="P26" draw:layer="layout" svg:width="8.304cm" svg:height="0.42cm" svg:x="16.254cm" svg:y="11.85cm">
          <draw:text-box>
            <text:p text:style-name="P7"><text:span text:style-name="T88">{"role": "user", "content": mensaje})</text:span></text:p>
          </draw:text-box>
        </draw:frame>
        <draw:frame draw:style-name="gr28" draw:text-style-name="P26" draw:layer="layout" svg:width="8.079cm" svg:height="0.42cm" svg:x="16.25cm" svg:y="12.814cm">
          <draw:text-box>
            <text:p text:style-name="P7"><text:span text:style-name="T88">response = client.responses.create( </text:span></text:p>
          </draw:text-box>
        </draw:frame>
        <draw:frame draw:style-name="gr28" draw:text-style-name="P26" draw:layer="layout" svg:width="3.816cm" svg:height="0.42cm" svg:x="17.131cm" svg:y="13.296cm">
          <draw:text-box>
            <text:p text:style-name="P7"><text:span text:style-name="T88">model="gpt-5.5", </text:span></text:p>
          </draw:text-box>
        </draw:frame>
        <draw:frame draw:style-name="gr28" draw:text-style-name="P26" draw:layer="layout" svg:width="3.592cm" svg:height="0.42cm" svg:x="17.131cm" svg:y="13.772cm">
          <draw:text-box>
            <text:p text:style-name="P7"><text:span text:style-name="T88">input=historial)</text:span></text:p>
          </draw:text-box>
        </draw:frame>
        <draw:frame draw:style-name="gr28" draw:text-style-name="P26" draw:layer="layout" svg:width="7.182cm" svg:height="0.42cm" svg:x="16.25cm" svg:y="14.745cm">
          <draw:text-box>
            <text:p text:style-name="P7"><text:span text:style-name="T88">respuesta = response.output_text</text:span></text:p>
          </draw:text-box>
        </draw:frame>
        <draw:frame draw:style-name="gr28" draw:text-style-name="P26" draw:layer="layout" svg:width="5.611cm" svg:height="0.42cm" svg:x="16.25cm" svg:y="15.726cm">
          <draw:text-box>
            <text:p text:style-name="P7"><text:span text:style-name="T88">print(f"IA: {respuesta}")</text:span></text:p>
          </draw:text-box>
        </draw:frame>
      </draw:page>
      <draw:page draw:name="page11" draw:style-name="dp1" draw:master-page-name="master-page3">
        <draw:polygon draw:style-name="gr1" draw:text-style-name="P1" draw:layer="layout" svg:width="33.866cm" svg:height="19.05cm" svg:x="0cm" svg:y="-0.001cm" svg:viewBox="0 0 33867 19051" draw:points="0,19051 33867,19051 33867,0 0,0">
          <text:p/>
        </draw:polygon>
        <draw:polygon draw:style-name="gr12" draw:text-style-name="P12" draw:layer="layout" svg:width="33.866cm" svg:height="19.05cm" svg:x="0cm" svg:y="-0.001cm" svg:viewBox="0 0 33867 19051" draw:points="0,19051 33867,19051 33867,0 0,0">
          <text:p/>
        </draw:polygon>
        <draw:polygon draw:style-name="gr13" draw:text-style-name="P13" draw:layer="layout" svg:width="6.612cm" svg:height="0.931cm" svg:x="1.27cm" svg:y="1.134cm" svg:viewBox="0 0 6613 932" draw:points="6150,0 462,0 339,17 229,64 135,137 63,231 16,343 0,466 16,590 63,702 135,796 229,869 339,916 462,932 6150,932 6273,916 6384,869 6477,796 6550,702 6596,590 6613,466 6596,343 6550,231 6477,137 6384,64 6273,17">
          <text:p/>
        </draw:polygon>
        <draw:frame draw:style-name="gr11" draw:text-style-name="P11" draw:layer="layout" svg:width="1.336cm" svg:height="0.39cm" svg:x="2.535cm" svg:y="1.424cm">
          <draw:text-box>
            <text:p text:style-name="P7"><text:span text:style-name="T63">CÓDIGO</text:span></text:p>
          </draw:text-box>
        </draw:frame>
        <draw:frame draw:style-name="gr6" draw:text-style-name="P6" draw:layer="layout" svg:width="17.39cm" svg:height="13.317cm" svg:x="0.957cm" svg:y="4.868cm">
          <draw:image xlink:href="Pictures/1000020100000292000001F8B167D5B375BEFA21.png" xlink:type="simple" xlink:show="embed" xlink:actuate="onLoad" loext:mime-type="image/png">
            <text:p/>
          </draw:image>
        </draw:frame>
        <draw:polygon draw:style-name="gr33" draw:text-style-name="P31" draw:layer="layout" svg:width="16.772cm" svg:height="12.7cm" svg:x="1.27cm" svg:y="5.08cm" svg:viewBox="0 0 16773 12701" draw:points="16621,0 152,0 93,11 44,44 11,93 0,152 0,12548 11,12607 44,12656 93,12689 152,12701 16621,12701 16680,12689 16729,12656 16761,12607 16773,12548 16773,152 16761,93 16729,44 16680,11">
          <text:p/>
        </draw:polygon>
        <draw:frame draw:style-name="gr21" draw:text-style-name="P20" draw:layer="layout" svg:width="12.753cm" svg:height="1.322cm" svg:x="1.27cm" svg:y="2.544cm">
          <draw:text-box>
            <text:p text:style-name="P7"><text:span text:style-name="T64">main() — Loop principal</text:span></text:p>
          </draw:text-box>
        </draw:frame>
        <draw:frame draw:style-name="gr23" draw:text-style-name="P22" draw:layer="layout" svg:width="12.558cm" svg:height="0.492cm" svg:x="1.236cm" svg:y="4.286cm">
          <draw:text-box>
            <text:p text:style-name="P7"><text:span text:style-name="T65">El corazón del programa: arma el menú y deriva a cada función</text:span></text:p>
          </draw:text-box>
        </draw:frame>
        <draw:frame draw:style-name="gr28" draw:text-style-name="P26" draw:layer="layout" svg:width="2.47cm" svg:height="0.42cm" svg:x="1.27cm" svg:y="5.962cm">
          <draw:text-box>
            <text:p text:style-name="P7"><text:span text:style-name="T88">def main():</text:span></text:p>
          </draw:text-box>
        </draw:frame>
        <draw:frame draw:style-name="gr28" draw:text-style-name="P26" draw:layer="layout" svg:width="3.816cm" svg:height="0.42cm" svg:x="2.151cm" svg:y="6.444cm">
          <draw:text-box>
            <text:p text:style-name="P7"><text:span text:style-name="T88">medicamentos = []</text:span></text:p>
          </draw:text-box>
        </draw:frame>
        <draw:frame draw:style-name="gr28" draw:text-style-name="P26" draw:layer="layout" svg:width="2.47cm" svg:height="0.42cm" svg:x="2.151cm" svg:y="6.918cm">
          <draw:text-box>
            <text:p text:style-name="P7"><text:span text:style-name="T88">opcion = ""</text:span></text:p>
          </draw:text-box>
        </draw:frame>
        <draw:frame draw:style-name="gr28" draw:text-style-name="P26" draw:layer="layout" svg:width="4.489cm" svg:height="0.42cm" svg:x="2.151cm" svg:y="7.885cm">
          <draw:text-box>
            <text:p text:style-name="P7"><text:span text:style-name="T88">while opcion != "9":</text:span></text:p>
          </draw:text-box>
        </draw:frame>
        <draw:frame draw:style-name="gr28" draw:text-style-name="P26" draw:layer="layout" svg:width="6.957cm" svg:height="0.42cm" svg:x="3.04cm" svg:y="8.359cm">
          <draw:text-box>
            <text:p text:style-name="P7"><text:span text:style-name="T88">print("--- MENU PRINCIPAL ---")</text:span></text:p>
          </draw:text-box>
        </draw:frame>
        <draw:frame draw:style-name="gr28" draw:text-style-name="P26" draw:layer="layout" svg:width="6.957cm" svg:height="0.42cm" svg:x="3.04cm" svg:y="8.841cm">
          <draw:text-box>
            <text:p text:style-name="P7"><text:span text:style-name="T88">print("1. Agregar medicamento")</text:span></text:p>
          </draw:text-box>
        </draw:frame>
        <draw:frame draw:style-name="gr28" draw:text-style-name="P26" draw:layer="layout" svg:width="0.675cm" svg:height="0.42cm" svg:x="3.04cm" svg:y="9.357cm">
          <draw:text-box>
            <text:p text:style-name="P7"><text:span text:style-name="T88">...</text:span></text:p>
          </draw:text-box>
        </draw:frame>
        <draw:frame draw:style-name="gr28" draw:text-style-name="P26" draw:layer="layout" svg:width="3.816cm" svg:height="0.42cm" svg:x="3.04cm" svg:y="9.833cm">
          <draw:text-box>
            <text:p text:style-name="P7"><text:span text:style-name="T88">print(“9. Salir")</text:span></text:p>
          </draw:text-box>
        </draw:frame>
        <draw:frame draw:style-name="gr28" draw:text-style-name="P26" draw:layer="layout" svg:width="8.304cm" svg:height="0.42cm" svg:x="3.04cm" svg:y="10.315cm">
          <draw:text-box>
            <text:p text:style-name="P7"><text:span text:style-name="T88">opcion = input("Seleccione opción: ")</text:span></text:p>
          </draw:text-box>
        </draw:frame>
        <draw:frame draw:style-name="gr28" draw:text-style-name="P26" draw:layer="layout" svg:width="3.816cm" svg:height="0.42cm" svg:x="3.04cm" svg:y="11.271cm">
          <draw:text-box>
            <text:p text:style-name="P7"><text:span text:style-name="T88">if opcion == "1":</text:span></text:p>
          </draw:text-box>
        </draw:frame>
        <draw:frame draw:style-name="gr28" draw:text-style-name="P26" draw:layer="layout" svg:width="9.65cm" svg:height="0.42cm" svg:x="4.556cm" svg:y="11.764cm">
          <draw:text-box>
            <text:p text:style-name="P7"><text:span text:style-name="T88">medicamentos.append( agregar_medicamento())</text:span></text:p>
          </draw:text-box>
        </draw:frame>
        <draw:frame draw:style-name="gr28" draw:text-style-name="P26" draw:layer="layout" svg:width="4.265cm" svg:height="0.42cm" svg:x="2.786cm" svg:y="12.246cm">
          <draw:text-box>
            <text:p text:style-name="P7"><text:span text:style-name="T88">elif opcion == "4":</text:span></text:p>
          </draw:text-box>
        </draw:frame>
        <draw:frame draw:style-name="gr28" draw:text-style-name="P26" draw:layer="layout" svg:width="6.957cm" svg:height="0.42cm" svg:x="3.675cm" svg:y="12.729cm">
          <draw:text-box>
            <text:p text:style-name="P7"><text:span text:style-name="T88">umbral = int(input("Umbral: "))</text:span></text:p>
          </draw:text-box>
        </draw:frame>
        <draw:frame draw:style-name="gr28" draw:text-style-name="P26" draw:layer="layout" svg:width="4.265cm" svg:height="0.42cm" svg:x="2.786cm" svg:y="13.211cm">
          <draw:text-box>
            <text:p text:style-name="P7"><text:span text:style-name="T88">elif opcion == "7":</text:span></text:p>
          </draw:text-box>
        </draw:frame>
        <draw:frame draw:style-name="gr28" draw:text-style-name="P26" draw:layer="layout" svg:width="11.22cm" svg:height="0.42cm" svg:x="3.675cm" svg:y="13.687cm">
          <draw:text-box>
            <text:p text:style-name="P7"><text:span text:style-name="T88">verificar_alertas(medicamentos, umbral, dias_venc)</text:span></text:p>
          </draw:text-box>
        </draw:frame>
        <draw:frame draw:style-name="gr28" draw:text-style-name="P26" draw:layer="layout" svg:width="4.265cm" svg:height="0.42cm" svg:x="2.786cm" svg:y="14.169cm">
          <draw:text-box>
            <text:p text:style-name="P7"><text:span text:style-name="T88">elif opcion == "9":</text:span></text:p>
          </draw:text-box>
        </draw:frame>
        <draw:frame draw:style-name="gr28" draw:text-style-name="P26" draw:layer="layout" svg:width="7.182cm" svg:height="0.42cm" svg:x="3.675cm" svg:y="14.652cm">
          <draw:text-box>
            <text:p text:style-name="P7"><text:span text:style-name="T88">print("Saliendo del sistema...")</text:span></text:p>
          </draw:text-box>
        </draw:frame>
        <draw:frame draw:style-name="gr28" draw:text-style-name="P26" draw:layer="layout" svg:width="1.124cm" svg:height="0.42cm" svg:x="2.786cm" svg:y="15.125cm">
          <draw:text-box>
            <text:p text:style-name="P7"><text:span text:style-name="T88">else:</text:span></text:p>
          </draw:text-box>
        </draw:frame>
        <draw:frame draw:style-name="gr36" draw:text-style-name="P32" draw:layer="layout" svg:width="3.054cm" svg:height="0.708cm" svg:x="18.687cm" svg:y="5.206cm">
          <draw:text-box>
            <text:p text:style-name="P7"><text:span text:style-name="T91">Conclusión</text:span></text:p>
          </draw:text-box>
        </draw:frame>
        <draw:frame draw:style-name="gr9" draw:text-style-name="P10" draw:layer="layout" svg:width="13.782cm" svg:height="0.441cm" svg:x="18.687cm" svg:y="6.447cm">
          <draw:text-box>
            <text:p text:style-name="P7"><text:span text:style-name="T80">El proyecto demuestra cómo los conceptos básicos de programación pueden</text:span></text:p>
          </draw:text-box>
        </draw:frame>
        <draw:frame draw:style-name="gr9" draw:text-style-name="P10" draw:layer="layout" svg:width="13.811cm" svg:height="0.441cm" svg:x="18.687cm" svg:y="7.082cm">
          <draw:text-box>
            <text:p text:style-name="P7"><text:span text:style-name="T80">resolver un problema concreto y de alto impacto cotidiano: llevar un registro</text:span></text:p>
          </draw:text-box>
        </draw:frame>
        <draw:frame draw:style-name="gr10" draw:text-style-name="P10" draw:layer="layout" svg:width="5.23cm" svg:height="0.441cm" svg:x="18.687cm" svg:y="7.717cm">
          <draw:text-box>
            <text:p text:style-name="P7"><text:span text:style-name="T80">organizado de la medicación.</text:span></text:p>
          </draw:text-box>
        </draw:frame>
        <draw:frame draw:style-name="gr9" draw:text-style-name="P10" draw:layer="layout" svg:width="13.481cm" svg:height="0.441cm" svg:x="18.687cm" svg:y="9.87cm">
          <draw:text-box>
            <text:p text:style-name="P7"><text:span text:style-name="T92">A través de listas, funciones y estructuras de control, el programa gestiona </text:span></text:p>
          </draw:text-box>
        </draw:frame>
        <draw:frame draw:style-name="gr10" draw:text-style-name="P10" draw:layer="layout" svg:width="13.964cm" svg:height="0.441cm" svg:x="18.687cm" svg:y="10.504cm">
          <draw:text-box>
            <text:p text:style-name="P7"><text:span text:style-name="T92">información de manera eficiente, valida los datos ingresados y genera alertas </text:span></text:p>
          </draw:text-box>
        </draw:frame>
        <draw:polygon draw:style-name="gr13" draw:text-style-name="P13" draw:layer="layout" svg:width="13.97cm" svg:height="2.54cm" svg:x="18.677cm" svg:y="14.469cm" svg:viewBox="0 0 13971 2541" draw:points="13768,0 203,0 124,16 60,60 16,124 0,203 0,2338 16,2417 60,2482 124,2525 203,2541 13768,2541 13847,2525 13911,2482 13955,2417 13971,2338 13971,203 13955,124 13911,60 13847,16">
          <text:p/>
        </draw:polygon>
        <draw:frame draw:style-name="gr9" draw:text-style-name="P10" draw:layer="layout" svg:width="14.091cm" svg:height="0.441cm" svg:x="18.687cm" svg:y="11.14cm">
          <draw:text-box>
            <text:p text:style-name="P7"><text:span text:style-name="T92">preventivas que pueden marcar una diferencia real en la salud de los usuarios.</text:span></text:p>
          </draw:text-box>
        </draw:frame>
        <draw:frame draw:style-name="gr19" draw:text-style-name="P19" draw:layer="layout" svg:width="9.358cm" svg:height="0.425cm" svg:x="19.196cm" svg:y="15.576cm">
          <draw:text-box>
            <text:p text:style-name="P7"><text:span text:style-name="T87">Hoy: todo corre 100% en consola, sin interfaz gráfica.</text:span></text:p>
          </draw:text-box>
        </draw:frame>
        <draw:frame draw:style-name="gr24" draw:text-style-name="P23" draw:layer="layout" svg:width="6.585cm" svg:height="0.323cm" svg:x="1.27cm" svg:y="18.254cm">
          <draw:text-box>
            <text:p text:style-name="P7"><text:span text:style-name="T69">MediControl — UADE, Introducción a la Algoritmia</text:span></text:p>
          </draw:text-box>
        </draw:frame>
        <draw:frame draw:style-name="gr24" draw:text-style-name="P23" draw:layer="layout" svg:width="0.332cm" svg:height="0.323cm" svg:x="32.31cm" svg:y="18.254cm">
          <draw:text-box>
            <text:p text:style-name="P7"><text:span text:style-name="T69">10</text:span></text:p>
          </draw:text-box>
        </draw:frame>
      </draw:page>
      <draw:page draw:name="page12" draw:style-name="dp1" draw:master-page-name="master-page3">
        <draw:polygon draw:style-name="gr1" draw:text-style-name="P1" draw:layer="layout" svg:width="33.866cm" svg:height="19.05cm" svg:x="0cm" svg:y="-0.001cm" svg:viewBox="0 0 33867 19051" draw:points="0,19051 33867,19051 33867,0 0,0">
          <text:p/>
        </draw:polygon>
        <draw:polygon draw:style-name="gr2" draw:text-style-name="P2" draw:layer="layout" svg:width="33.866cm" svg:height="19.05cm" svg:x="0cm" svg:y="-0.001cm" svg:viewBox="0 0 33867 19051" draw:points="0,19051 33867,19051 33867,0 0,0">
          <text:p/>
        </draw:polygon>
        <draw:polygon draw:style-name="gr3" draw:text-style-name="P3" draw:layer="layout" svg:width="7.62cm" svg:height="7.62cm" svg:x="0cm" svg:y="0cm" svg:viewBox="0 0 7621 7621" draw:points="7493,0 0,0 0,7493 214,7533 343,7553 473,7571 604,7586 736,7598 868,7608 1001,7615 1135,7619 1270,7621 1404,7619 1538,7615 1671,7608 1803,7598 1935,7586 2066,7571 2196,7553 2325,7533 2454,7510 2581,7485 2707,7457 2833,7426 2958,7394 3081,7358 3204,7321 3325,7280 3445,7238 3565,7193 3683,7146 3800,7097 3916,7045 4031,6991 4144,6935 4256,6876 4366,6816 4475,6753 4583,6689 4690,6622 4795,6553 4898,6483 5000,6410 5101,6335 5200,6259 5297,6180 5393,6100 5488,6018 5580,5934 5671,5848 5761,5761 5848,5671 5934,5580 6018,5488 6100,5393 6180,5297 6259,5200 6335,5101 6410,5000 6483,4898 6553,4795 6622,4690 6689,4583 6753,4475 6816,4366 6876,4256 6935,4144 6991,4031 7045,3916 7097,3800 7146,3683 7193,3565 7238,3445 7280,3325 7321,3203 7358,3081 7394,2958 7426,2833 7457,2707 7485,2581 7510,2453 7533,2325 7553,2196 7571,2066 7586,1935 7598,1804 7608,1671 7615,1538 7619,1404 7621,1270 7619,1135 7615,1001 7608,868 7598,735 7586,604 7571,473 7553,343 7533,214 7510,86">
          <text:p/>
        </draw:polygon>
        <draw:polygon draw:style-name="gr4" draw:text-style-name="P4" draw:layer="layout" svg:width="6.426cm" svg:height="7.619cm" svg:x="27.44cm" svg:y="11.43cm" svg:viewBox="0 0 6427 7620" draw:points="5078,0 4946,1 4813,6 4682,15 4551,27 4422,41 4293,60 4166,81 4040,106 3914,134 3790,165 3667,198 3546,235 3426,275 3307,317 3189,363 3073,411 2959,462 2845,516 2734,572 2624,631 2516,693 2409,757 2304,824 2201,893 2100,965 2000,1039 1903,1115 1807,1194 1713,1275 1622,1358 1532,1444 1444,1531 1358,1621 1275,1713 1194,1806 1115,1902 1039,2000 965,2099 893,2201 824,2304 757,2409 693,2516 631,2624 573,2734 516,2845 462,2959 411,3073 363,3189 317,3307 275,3426 235,3546 199,3668 165,3790 134,3915 107,4040 82,4166 60,4294 42,4422 27,4552 15,4682 7,4814 2,4946 0,5080 2,5213 7,5345 15,5476 27,5607 42,5737 60,5865 82,5993 107,6119 134,6244 165,6368 199,6491 235,6613 275,6733 317,6852 363,6970 411,7086 462,7200 516,7314 573,7425 631,7535 679,7620 6427,7620 6427,181 6367,165 6243,134 6117,106 5991,81 5864,60 5735,41 5606,27 5475,15 5344,6 5211,1">
          <text:p/>
        </draw:polygon>
        <draw:polygon draw:style-name="gr5" draw:text-style-name="P5" draw:layer="layout" svg:width="2.277cm" svg:height="2.464cm" svg:x="15.223cm" svg:y="3.496cm" svg:viewBox="0 0 2278 2465" draw:points="1138,0 1006,8 877,33 754,72 637,125 528,192 426,272 333,362 250,463 177,573 115,691 66,818 30,951 7,1089 0,1233 7,1377 30,1515 66,1648 115,1775 177,1894 250,2004 333,2104 426,2194 528,2273 637,2340 754,2393 877,2433 1006,2457 1138,2465 1271,2457 1399,2433 1523,2393 1639,2340 1749,2273 1851,2194 1944,2104 2028,2004 2101,1894 2162,1775 2212,1648 2248,1515 2270,1377 2278,1233 2270,1089 2248,951 2212,818 2162,691 2101,573 2028,463 1944,362 1851,272 1749,192 1639,125 1523,72 1399,33 1271,8">
          <text:p/>
        </draw:polygon>
        <draw:frame draw:style-name="gr6" draw:text-style-name="P6" draw:layer="layout" svg:width="1.692cm" svg:height="1.802cm" svg:x="15.519cm" svg:y="3.81cm">
          <draw:image xlink:href="Pictures/100002010000003F00000044D18F54BC6E508A01.png" xlink:type="simple" xlink:show="embed" xlink:actuate="onLoad" loext:mime-type="image/png">
            <text:p/>
          </draw:image>
        </draw:frame>
        <draw:frame draw:style-name="gr37" draw:text-style-name="P33" draw:layer="layout" svg:width="14.086cm" svg:height="1.567cm" svg:x="8.036cm" svg:y="6.774cm">
          <draw:text-box>
            <text:p text:style-name="P7"><text:span text:style-name="T93">De la consola al celular</text:span></text:p>
          </draw:text-box>
        </draw:frame>
        <draw:frame draw:style-name="gr29" draw:text-style-name="P27" draw:layer="layout" svg:width="14.603cm" svg:height="0.556cm" svg:x="9.613cm" svg:y="9.552cm">
          <draw:text-box>
            <text:p text:style-name="P7"><text:span text:style-name="T94">Hoy MediControl funciona 100% por código y línea de comandos.</text:span></text:p>
          </draw:text-box>
        </draw:frame>
        <draw:polygon draw:style-name="gr5" draw:text-style-name="P5" draw:layer="layout" svg:width="11.506cm" svg:height="1.397cm" svg:x="11.167cm" svg:y="12.7cm" svg:viewBox="0 0 11507 1398" draw:points="10806,0 701,0 575,11 457,43 347,95 249,164 165,248 96,346 44,454 11,573 0,699 11,825 44,943 96,1051 165,1149 249,1233 347,1302 457,1354 575,1386 701,1398 10806,1398 10932,1386 11051,1354 11160,1302 11258,1233 11342,1149 11412,1051 11463,943 11496,825 11507,699 11496,573 11463,454 11412,346 11342,248 11258,164 11160,95 11051,43 10932,11">
          <text:p/>
        </draw:polygon>
        <draw:frame draw:style-name="gr29" draw:text-style-name="P27" draw:layer="layout" svg:width="16.601cm" svg:height="0.556cm" svg:x="8.623cm" svg:y="10.415cm">
          <draw:text-box>
            <text:p text:style-name="P7"><text:span text:style-name="T94">A continuación, una mirada a cómo podría verse mañana como aplicación.</text:span></text:p>
          </draw:text-box>
        </draw:frame>
        <draw:frame draw:style-name="gr9" draw:text-style-name="P10" draw:layer="layout" svg:width="6.081cm" svg:height="0.441cm" svg:x="12.037cm" svg:y="13.061cm">
          <draw:text-box>
            <text:p text:style-name="P7"><text:span text:style-name="T95">Próximo paso: una interfaz visual</text:span></text:p>
          </draw:text-box>
        </draw:frame>
        <draw:frame draw:style-name="gr24" draw:text-style-name="P23" draw:layer="layout" svg:width="6.585cm" svg:height="0.323cm" svg:x="1.27cm" svg:y="18.254cm">
          <draw:text-box>
            <text:p text:style-name="P7"><text:span text:style-name="T69">MediControl — UADE, Introducción a la Algoritmia</text:span></text:p>
          </draw:text-box>
        </draw:frame>
        <draw:frame draw:style-name="gr24" draw:text-style-name="P23" draw:layer="layout" svg:width="0.332cm" svg:height="0.323cm" svg:x="32.31cm" svg:y="18.254cm">
          <draw:text-box>
            <text:p text:style-name="P7"><text:span text:style-name="T69">11</text:span></text:p>
          </draw:text-box>
        </draw:frame>
      </draw:page>
      <draw:page draw:name="page13" draw:style-name="dp1" draw:master-page-name="master-page3">
        <draw:polygon draw:style-name="gr1" draw:text-style-name="P1" draw:layer="layout" svg:width="33.866cm" svg:height="19.05cm" svg:x="0cm" svg:y="-0.001cm" svg:viewBox="0 0 33867 19051" draw:points="0,19051 33867,19051 33867,0 0,0">
          <text:p/>
        </draw:polygon>
        <draw:polygon draw:style-name="gr12" draw:text-style-name="P12" draw:layer="layout" svg:width="33.866cm" svg:height="19.05cm" svg:x="0cm" svg:y="-0.001cm" svg:viewBox="0 0 33867 19051" draw:points="0,19051 33867,19051 33867,0 0,0">
          <text:p/>
        </draw:polygon>
        <draw:polygon draw:style-name="gr13" draw:text-style-name="P13" draw:layer="layout" svg:width="6.612cm" svg:height="0.931cm" svg:x="1.27cm" svg:y="1.134cm" svg:viewBox="0 0 6613 932" draw:points="6150,0 462,0 339,17 229,64 135,137 63,231 16,343 0,466 16,590 63,702 135,796 229,869 339,916 462,932 6150,932 6273,916 6384,869 6477,796 6550,702 6596,590 6613,466 6596,343 6550,231 6477,137 6384,64 6273,17">
          <text:p/>
        </draw:polygon>
        <draw:frame draw:style-name="gr11" draw:text-style-name="P11" draw:layer="layout" svg:width="1.691cm" svg:height="0.39cm" svg:x="2.535cm" svg:y="1.424cm">
          <draw:text-box>
            <text:p text:style-name="P7"><text:span text:style-name="T63">A FUTURO</text:span></text:p>
          </draw:text-box>
        </draw:frame>
        <draw:frame draw:style-name="gr6" draw:text-style-name="P6" draw:layer="layout" svg:width="17.136cm" svg:height="13.639cm" svg:x="16.137cm" svg:y="4.606cm">
          <draw:image xlink:href="Pictures/10000201000002870000030567F8B85DA05B88A8.png" xlink:type="simple" xlink:show="embed" xlink:actuate="onLoad" loext:mime-type="image/png">
            <text:p/>
          </draw:image>
        </draw:frame>
        <draw:polygon draw:style-name="gr1" draw:text-style-name="P1" draw:layer="layout" svg:width="16.061cm" svg:height="12.564cm" svg:x="16.679cm" svg:y="4.961cm" svg:viewBox="0 0 16062 12565" draw:points="15808,0 253,0 155,20 74,74 20,155 0,254 0,12312 20,12410 74,12491 155,12545 253,12565 15808,12565 15907,12545 15988,12491 16042,12410 16062,12312 16062,254 16042,155 15988,74 15907,20">
          <text:p/>
        </draw:polygon>
        <draw:polygon draw:style-name="gr26" draw:text-style-name="P6" draw:layer="layout" svg:width="16.061cm" svg:height="12.564cm" svg:x="16.679cm" svg:y="4.961cm" svg:viewBox="0 0 16062 12565" draw:points="0,254 20,155 74,74 155,20 253,0 15808,0 15907,20 15988,74 16042,155 16062,254 16062,12312 16042,12410 15988,12491 15907,12545 15808,12565 253,12565 155,12545 74,12491 20,12410 0,12312">
          <text:p/>
        </draw:polygon>
        <draw:frame draw:style-name="gr6" draw:text-style-name="P6" draw:layer="layout" svg:width="15.264cm" svg:height="11.802cm" svg:x="17.069cm" svg:y="5.342cm">
          <draw:image xlink:href="Pictures/100000000000033200000278F0C85AF2ADF5E289.png" xlink:type="simple" xlink:show="embed" xlink:actuate="onLoad" loext:mime-type="image/png">
            <text:p/>
          </draw:image>
        </draw:frame>
        <draw:polygon draw:style-name="gr22" draw:text-style-name="P21" draw:layer="layout" svg:width="1.159cm" svg:height="1.16cm" svg:x="1.27cm" svg:y="6.002cm" svg:viewBox="0 0 1160 1161" draw:points="580,0 446,16 324,59 217,128 127,218 58,325 15,448 0,581 15,714 58,836 127,944 217,1034 324,1102 446,1146 580,1161 713,1146 836,1102 943,1034 1033,944 1101,836 1145,714 1160,581 1145,448 1101,325 1033,218 943,128 836,59 713,16">
          <text:p/>
        </draw:polygon>
        <draw:frame draw:style-name="gr6" draw:text-style-name="P6" draw:layer="layout" svg:width="0.846cm" svg:height="0.871cm" svg:x="1.431cm" svg:y="6.13cm">
          <draw:image xlink:href="Pictures/100002010000001F00000020BE28D0A9BC05BBAE.png" xlink:type="simple" xlink:show="embed" xlink:actuate="onLoad" loext:mime-type="image/png">
            <text:p/>
          </draw:image>
        </draw:frame>
        <draw:frame draw:style-name="gr21" draw:text-style-name="P20" draw:layer="layout" svg:width="13.947cm" svg:height="1.322cm" svg:x="1.27cm" svg:y="2.544cm">
          <draw:text-box>
            <text:p text:style-name="P7"><text:span text:style-name="T64">Mockup: pantalla principal</text:span></text:p>
          </draw:text-box>
        </draw:frame>
        <draw:frame draw:style-name="gr23" draw:text-style-name="P22" draw:layer="layout" svg:width="10.789cm" svg:height="0.492cm" svg:x="1.27cm" svg:y="4.286cm">
          <draw:text-box>
            <text:p text:style-name="P7"><text:span text:style-name="T65">Propuesta de interfaz — el código hoy, la app mañana</text:span></text:p>
          </draw:text-box>
        </draw:frame>
        <draw:frame draw:style-name="gr38" draw:text-style-name="P34" draw:layer="layout" svg:width="2.864cm" svg:height="0.476cm" svg:x="2.795cm" svg:y="5.298cm">
          <draw:text-box>
            <text:p text:style-name="P7"><text:span text:style-name="T96">Panel de inicio</text:span></text:p>
          </draw:text-box>
        </draw:frame>
        <draw:polygon draw:style-name="gr22" draw:text-style-name="P21" draw:layer="layout" svg:width="1.159cm" svg:height="1.168cm" svg:x="1.27cm" svg:y="8.517cm" svg:viewBox="0 0 1160 1169" draw:points="580,0 446,15 324,59 217,128 127,219 58,328 15,451 0,585 15,719 58,842 127,951 217,1041 324,1110 446,1154 580,1169 713,1154 836,1110 943,1041 1033,951 1101,842 1145,719 1160,585 1145,451 1101,328 1033,219 943,128 836,59 713,15">
          <text:p/>
        </draw:polygon>
        <draw:frame draw:style-name="gr6" draw:text-style-name="P6" draw:layer="layout" svg:width="0.846cm" svg:height="0.871cm" svg:x="1.431cm" svg:y="8.653cm">
          <draw:image xlink:href="Pictures/100002010000001F00000020BE28D0A9BC05BBAE.png" xlink:type="simple" xlink:show="embed" xlink:actuate="onLoad" loext:mime-type="image/png">
            <text:p/>
          </draw:image>
        </draw:frame>
        <draw:frame draw:style-name="gr34" draw:text-style-name="P11" draw:layer="layout" svg:width="10.094cm" svg:height="0.39cm" svg:x="2.795cm" svg:y="5.919cm">
          <draw:text-box>
            <text:p text:style-name="P7"><text:span text:style-name="T83">Acceso directo a las 9 opciones del menú, traducidas a botones.</text:span></text:p>
          </draw:text-box>
        </draw:frame>
        <draw:frame draw:style-name="gr38" draw:text-style-name="P34" draw:layer="layout" svg:width="3.816cm" svg:height="0.476cm" svg:x="2.795cm" svg:y="8.491cm">
          <draw:text-box>
            <text:p text:style-name="P7"><text:span text:style-name="T96">Indicadores en vivo</text:span></text:p>
          </draw:text-box>
        </draw:frame>
        <draw:polygon draw:style-name="gr22" draw:text-style-name="P21" draw:layer="layout" svg:width="1.159cm" svg:height="1.168cm" svg:x="1.27cm" svg:y="11.692cm" svg:viewBox="0 0 1160 1169" draw:points="580,0 446,15 324,59 217,128 127,219 58,327 15,450 0,585 15,719 58,842 127,951 217,1041 324,1110 446,1154 580,1169 713,1154 836,1110 943,1041 1033,951 1101,842 1145,719 1160,585 1145,450 1101,327 1033,219 943,128 836,59 713,15">
          <text:p/>
        </draw:polygon>
        <draw:frame draw:style-name="gr6" draw:text-style-name="P6" draw:layer="layout" svg:width="0.846cm" svg:height="0.871cm" svg:x="1.431cm" svg:y="11.828cm">
          <draw:image xlink:href="Pictures/100002010000001F00000020BE28D0A9BC05BBAE.png" xlink:type="simple" xlink:show="embed" xlink:actuate="onLoad" loext:mime-type="image/png">
            <text:p/>
          </draw:image>
        </draw:frame>
        <draw:frame draw:style-name="gr11" draw:text-style-name="P11" draw:layer="layout" svg:width="11.707cm" svg:height="0.39cm" svg:x="2.795cm" svg:y="9.114cm">
          <draw:text-box>
            <text:p text:style-name="P7"><text:span text:style-name="T83">Medicamentos, alertas y tomas del día, igual que hoy devuelve la consola.</text:span></text:p>
          </draw:text-box>
        </draw:frame>
        <draw:frame draw:style-name="gr38" draw:text-style-name="P34" draw:layer="layout" svg:width="3.935cm" svg:height="0.476cm" svg:x="2.795cm" svg:y="11.673cm">
          <draw:text-box>
            <text:p text:style-name="P7"><text:span text:style-name="T96">Alertas importantes</text:span></text:p>
          </draw:text-box>
        </draw:frame>
        <draw:frame draw:style-name="gr11" draw:text-style-name="P11" draw:layer="layout" svg:width="10.831cm" svg:height="0.39cm" svg:x="2.795cm" svg:y="12.295cm">
          <draw:text-box>
            <text:p text:style-name="P7"><text:span text:style-name="T83">El mismo concepto de verificar_alertas(), ahora visible de un vistazo.</text:span></text:p>
          </draw:text-box>
        </draw:frame>
        <draw:frame draw:style-name="gr24" draw:text-style-name="P23" draw:layer="layout" svg:width="6.585cm" svg:height="0.323cm" svg:x="1.27cm" svg:y="18.254cm">
          <draw:text-box>
            <text:p text:style-name="P7"><text:span text:style-name="T69">MediControl — UADE, Introducción a la Algoritmia</text:span></text:p>
          </draw:text-box>
        </draw:frame>
        <draw:frame draw:style-name="gr24" draw:text-style-name="P23" draw:layer="layout" svg:width="0.332cm" svg:height="0.323cm" svg:x="32.31cm" svg:y="18.254cm">
          <draw:text-box>
            <text:p text:style-name="P7"><text:span text:style-name="T69">12</text:span></text:p>
          </draw:text-box>
        </draw:frame>
      </draw:page>
      <draw:page draw:name="page14" draw:style-name="dp1" draw:master-page-name="master-page3">
        <draw:polygon draw:style-name="gr1" draw:text-style-name="P1" draw:layer="layout" svg:width="33.866cm" svg:height="19.05cm" svg:x="0cm" svg:y="-0.001cm" svg:viewBox="0 0 33867 19051" draw:points="0,19051 33867,19051 33867,0 0,0">
          <text:p/>
        </draw:polygon>
        <draw:polygon draw:style-name="gr12" draw:text-style-name="P12" draw:layer="layout" svg:width="33.866cm" svg:height="19.05cm" svg:x="0cm" svg:y="-0.001cm" svg:viewBox="0 0 33867 19051" draw:points="0,19051 33867,19051 33867,0 0,0">
          <text:p/>
        </draw:polygon>
        <draw:polygon draw:style-name="gr13" draw:text-style-name="P13" draw:layer="layout" svg:width="6.612cm" svg:height="0.931cm" svg:x="1.27cm" svg:y="1.134cm" svg:viewBox="0 0 6613 932" draw:points="6150,0 462,0 339,17 229,64 135,137 63,231 16,343 0,466 16,590 63,702 135,796 229,869 339,916 462,932 6150,932 6273,916 6384,869 6477,796 6550,702 6596,590 6613,466 6596,343 6550,231 6477,137 6384,64 6273,17">
          <text:p/>
        </draw:polygon>
        <draw:frame draw:style-name="gr11" draw:text-style-name="P11" draw:layer="layout" svg:width="1.691cm" svg:height="0.39cm" svg:x="2.535cm" svg:y="1.424cm">
          <draw:text-box>
            <text:p text:style-name="P7"><text:span text:style-name="T63">A FUTURO</text:span></text:p>
          </draw:text-box>
        </draw:frame>
        <draw:frame draw:style-name="gr21" draw:text-style-name="P20" draw:layer="layout" svg:width="13.807cm" svg:height="1.322cm" svg:x="1.27cm" svg:y="2.544cm">
          <draw:text-box>
            <text:p text:style-name="P7"><text:span text:style-name="T64">Mockup: alertas e historial</text:span></text:p>
          </draw:text-box>
        </draw:frame>
        <draw:frame draw:style-name="gr6" draw:text-style-name="P6" draw:layer="layout" svg:width="18.897cm" svg:height="13.639cm" svg:x="0.373cm" svg:y="4.606cm">
          <draw:image xlink:href="Pictures/10000201000002CA0000030572AE7A638E58620F.png" xlink:type="simple" xlink:show="embed" xlink:actuate="onLoad" loext:mime-type="image/png">
            <text:p/>
          </draw:image>
        </draw:frame>
        <draw:polygon draw:style-name="gr1" draw:text-style-name="P1" draw:layer="layout" svg:width="17.829cm" svg:height="12.564cm" svg:x="0.914cm" svg:y="4.961cm" svg:viewBox="0 0 17830 12565" draw:points="17576,0 254,0 155,20 74,74 20,155 0,254 0,12312 20,12410 74,12491 155,12545 254,12565 17576,12565 17675,12545 17756,12491 17810,12410 17830,12312 17830,254 17810,155 17756,74 17675,20">
          <text:p/>
        </draw:polygon>
        <draw:polygon draw:style-name="gr26" draw:text-style-name="P6" draw:layer="layout" svg:width="17.829cm" svg:height="12.564cm" svg:x="0.914cm" svg:y="4.961cm" svg:viewBox="0 0 17830 12565" draw:points="0,254 20,155 74,74 155,20 254,0 17576,0 17675,20 17756,74 17810,155 17830,254 17830,12312 17810,12410 17756,12491 17675,12545 17576,12565 254,12565 155,12545 74,12491 20,12410 0,12312">
          <text:p/>
        </draw:polygon>
        <draw:frame draw:style-name="gr6" draw:text-style-name="P6" draw:layer="layout" svg:width="17.068cm" svg:height="11.802cm" svg:x="1.27cm" svg:y="5.342cm">
          <draw:image xlink:href="Pictures/100000000000034C000002485DD6E1A8C4571770.png" xlink:type="simple" xlink:show="embed" xlink:actuate="onLoad" loext:mime-type="image/png">
            <text:p/>
          </draw:image>
        </draw:frame>
        <draw:polygon draw:style-name="gr22" draw:text-style-name="P21" draw:layer="layout" svg:width="1.16cm" svg:height="1.168cm" svg:x="20.108cm" svg:y="5.342cm" svg:viewBox="0 0 1161 1169" draw:points="581,0 448,15 326,59 218,128 127,219 59,327 15,450 0,584 15,718 59,841 127,950 218,1040 326,1110 448,1154 581,1169 714,1154 836,1110 943,1040 1033,950 1102,841 1146,718 1161,584 1146,450 1102,327 1033,219 943,128 836,59 714,15">
          <text:p/>
        </draw:polygon>
        <draw:frame draw:style-name="gr6" draw:text-style-name="P6" draw:layer="layout" svg:width="0.871cm" svg:height="0.871cm" svg:x="20.269cm" svg:y="5.478cm">
          <draw:image xlink:href="Pictures/10000201000000220000002263DF5BD417C4D4AE.png" xlink:type="simple" xlink:show="embed" xlink:actuate="onLoad" loext:mime-type="image/png">
            <text:p/>
          </draw:image>
        </draw:frame>
        <draw:frame draw:style-name="gr23" draw:text-style-name="P22" draw:layer="layout" svg:width="10.7cm" svg:height="0.492cm" svg:x="1.27cm" svg:y="4.286cm">
          <draw:text-box>
            <text:p text:style-name="P7"><text:span text:style-name="T65">El mismo motor de datos, presentado de forma visual</text:span></text:p>
          </draw:text-box>
        </draw:frame>
        <draw:frame draw:style-name="gr38" draw:text-style-name="P34" draw:layer="layout" svg:width="3.935cm" svg:height="0.476cm" svg:x="21.713cm" svg:y="5.311cm">
          <draw:text-box>
            <text:p text:style-name="P7"><text:span text:style-name="T96">Alertas importantes</text:span></text:p>
          </draw:text-box>
        </draw:frame>
        <draw:frame draw:style-name="gr11" draw:text-style-name="P11" draw:layer="layout" svg:width="10.221cm" svg:height="0.39cm" svg:x="21.713cm" svg:y="5.891cm">
          <draw:text-box>
            <text:p text:style-name="P7"><text:span text:style-name="T83">Traduce verificar_alertas() a un estado visual: "Todo en orden" o</text:span></text:p>
          </draw:text-box>
        </draw:frame>
        <draw:polygon draw:style-name="gr22" draw:text-style-name="P21" draw:layer="layout" svg:width="1.16cm" svg:height="1.159cm" svg:x="20.108cm" svg:y="8.89cm" svg:viewBox="0 0 1161 1160" draw:points="581,0 448,15 326,58 218,127 127,217 59,324 15,446 0,579 15,712 59,835 127,942 218,1033 326,1102 448,1145 581,1160 714,1145 836,1102 943,1033 1033,942 1102,835 1146,712 1161,579 1146,446 1102,324 1033,217 943,127 836,58 714,15">
          <text:p/>
        </draw:polygon>
        <draw:frame draw:style-name="gr6" draw:text-style-name="P6" draw:layer="layout" svg:width="0.871cm" svg:height="0.846cm" svg:x="20.269cm" svg:y="9.051cm">
          <draw:image xlink:href="Pictures/10000201000000220000002263DF5BD417C4D4AE.png" xlink:type="simple" xlink:show="embed" xlink:actuate="onLoad" loext:mime-type="image/png">
            <text:p/>
          </draw:image>
        </draw:frame>
        <draw:frame draw:style-name="gr11" draw:text-style-name="P11" draw:layer="layout" svg:width="2.72cm" svg:height="0.39cm" svg:x="21.713cm" svg:y="6.416cm">
          <draw:text-box>
            <text:p text:style-name="P7"><text:span text:style-name="T83">avisos puntuales.</text:span></text:p>
          </draw:text-box>
        </draw:frame>
        <draw:frame draw:style-name="gr38" draw:text-style-name="P34" draw:layer="layout" svg:width="5.141cm" svg:height="0.476cm" svg:x="21.713cm" svg:y="8.872cm">
          <draw:text-box>
            <text:p text:style-name="P7"><text:span text:style-name="T96">Últimas tomas registradas</text:span></text:p>
          </draw:text-box>
        </draw:frame>
        <draw:frame draw:style-name="gr34" draw:text-style-name="P11" draw:layer="layout" svg:width="10.467cm" svg:height="0.39cm" svg:x="21.713cm" svg:y="9.452cm">
          <draw:text-box>
            <text:p text:style-name="P7"><text:span text:style-name="T83">Historial de registrar_toma(), hoy solo impreso por consola línea a</text:span></text:p>
          </draw:text-box>
        </draw:frame>
        <draw:polygon draw:style-name="gr22" draw:text-style-name="P21" draw:layer="layout" svg:width="1.16cm" svg:height="1.185cm" svg:x="20.108cm" svg:y="12.437cm" svg:viewBox="0 0 1161 1186" draw:points="581,0 448,17 326,61 218,131 127,223 59,333 15,458 0,593 15,730 59,854 127,964 218,1056 326,1126 448,1171 581,1186 714,1171 836,1126 943,1056 1033,964 1102,854 1146,730 1161,593 1146,458 1102,333 1033,223 943,131 836,61 714,17">
          <text:p/>
        </draw:polygon>
        <draw:frame draw:style-name="gr6" draw:text-style-name="P6" draw:layer="layout" svg:width="0.871cm" svg:height="0.871cm" svg:x="20.269cm" svg:y="12.59cm">
          <draw:image xlink:href="Pictures/10000201000000220000002263DF5BD417C4D4AE.png" xlink:type="simple" xlink:show="embed" xlink:actuate="onLoad" loext:mime-type="image/png">
            <text:p/>
          </draw:image>
        </draw:frame>
        <draw:frame draw:style-name="gr11" draw:text-style-name="P11" draw:layer="layout" svg:width="0.861cm" svg:height="0.39cm" svg:x="21.713cm" svg:y="9.978cm">
          <draw:text-box>
            <text:p text:style-name="P7"><text:span text:style-name="T83">línea.</text:span></text:p>
          </draw:text-box>
        </draw:frame>
        <draw:frame draw:style-name="gr38" draw:text-style-name="P34" draw:layer="layout" svg:width="4.223cm" svg:height="0.476cm" svg:x="21.713cm" svg:y="12.434cm">
          <draw:text-box>
            <text:p text:style-name="P7"><text:span text:style-name="T96">Próximo paso natural</text:span></text:p>
          </draw:text-box>
        </draw:frame>
        <draw:frame draw:style-name="gr11" draw:text-style-name="P11" draw:layer="layout" svg:width="10.522cm" svg:height="0.39cm" svg:x="21.713cm" svg:y="13.056cm">
          <draw:text-box>
            <text:p text:style-name="P7"><text:span text:style-name="T83">Conectar esta vista con el asistente hablar_con_ia() para consultas</text:span></text:p>
          </draw:text-box>
        </draw:frame>
        <draw:frame draw:style-name="gr34" draw:text-style-name="P11" draw:layer="layout" svg:width="1.255cm" svg:height="0.39cm" svg:x="21.713cm" svg:y="13.589cm">
          <draw:text-box>
            <text:p text:style-name="P7"><text:span text:style-name="T83">rápidas.</text:span></text:p>
          </draw:text-box>
        </draw:frame>
        <draw:frame draw:style-name="gr24" draw:text-style-name="P23" draw:layer="layout" svg:width="6.585cm" svg:height="0.323cm" svg:x="1.27cm" svg:y="18.254cm">
          <draw:text-box>
            <text:p text:style-name="P7"><text:span text:style-name="T69">MediControl — UADE, Introducción a la Algoritmia</text:span></text:p>
          </draw:text-box>
        </draw:frame>
        <draw:frame draw:style-name="gr24" draw:text-style-name="P23" draw:layer="layout" svg:width="0.332cm" svg:height="0.323cm" svg:x="32.31cm" svg:y="18.254cm">
          <draw:text-box>
            <text:p text:style-name="P7"><text:span text:style-name="T69">13</text:span></text:p>
          </draw:text-box>
        </draw:frame>
      </draw:page>
      <draw:page draw:name="page15" draw:style-name="dp1" draw:master-page-name="master-page3">
        <draw:polygon draw:style-name="gr1" draw:text-style-name="P1" draw:layer="layout" svg:width="33.866cm" svg:height="19.05cm" svg:x="0cm" svg:y="-0.001cm" svg:viewBox="0 0 33867 19051" draw:points="0,19051 33867,19051 33867,0 0,0">
          <text:p/>
        </draw:polygon>
        <draw:polygon draw:style-name="gr12" draw:text-style-name="P12" draw:layer="layout" svg:width="33.866cm" svg:height="19.05cm" svg:x="0cm" svg:y="-0.001cm" svg:viewBox="0 0 33867 19051" draw:points="0,19051 33867,19051 33867,0 0,0">
          <text:p/>
        </draw:polygon>
        <draw:polygon draw:style-name="gr13" draw:text-style-name="P13" draw:layer="layout" svg:width="6.612cm" svg:height="0.931cm" svg:x="1.27cm" svg:y="1.134cm" svg:viewBox="0 0 6613 932" draw:points="6150,0 462,0 339,17 229,64 135,137 63,231 16,343 0,466 16,590 63,702 135,796 229,869 339,916 462,932 6150,932 6273,916 6384,869 6477,796 6550,702 6596,590 6613,466 6596,343 6550,231 6477,137 6384,64 6273,17">
          <text:p/>
        </draw:polygon>
        <draw:frame draw:style-name="gr11" draw:text-style-name="P11" draw:layer="layout" svg:width="1.691cm" svg:height="0.39cm" svg:x="2.535cm" svg:y="1.424cm">
          <draw:text-box>
            <text:p text:style-name="P7"><text:span text:style-name="T63">A FUTURO</text:span></text:p>
          </draw:text-box>
        </draw:frame>
        <draw:frame draw:style-name="gr21" draw:text-style-name="P20" draw:layer="layout" svg:width="12.715cm" svg:height="1.322cm" svg:x="1.27cm" svg:y="2.544cm">
          <draw:text-box>
            <text:p text:style-name="P7"><text:span text:style-name="T64">Próximos pasos posibles</text:span></text:p>
          </draw:text-box>
        </draw:frame>
        <draw:frame draw:style-name="gr6" draw:text-style-name="P6" draw:layer="layout" svg:width="7.738cm" svg:height="9.643cm" svg:x="1.033cm" svg:y="5.427cm">
          <draw:image xlink:href="Pictures/100002010000012400000223DBDEDDAEE9503B6F.png" xlink:type="simple" xlink:show="embed" xlink:actuate="onLoad" loext:mime-type="image/png">
            <text:p/>
          </draw:image>
        </draw:frame>
        <draw:polygon draw:style-name="gr13" draw:text-style-name="P13" draw:layer="layout" svg:width="7.246cm" svg:height="9.152cm" svg:x="1.286cm" svg:y="5.596cm" svg:viewBox="0 0 7247 9153" draw:points="6993,0 255,0 156,20 75,74 20,155 0,254 0,8899 20,8998 75,9079 156,9133 255,9153 6993,9153 7092,9133 7173,9079 7227,8998 7247,8899 7247,254 7227,155 7173,74 7092,20">
          <text:p/>
        </draw:polygon>
        <draw:polygon draw:style-name="gr26" draw:text-style-name="P6" draw:layer="layout" svg:width="7.246cm" svg:height="9.152cm" svg:x="1.286cm" svg:y="5.596cm" svg:viewBox="0 0 7247 9153" draw:points="0,254 20,155 75,74 156,20 255,0 6993,0 7092,20 7173,74 7227,155 7247,254 7247,8899 7227,8998 7173,9079 7092,9133 6993,9153 255,9153 156,9133 75,9079 20,8998 0,8899">
          <text:p/>
        </draw:polygon>
        <draw:polygon draw:style-name="gr39" draw:text-style-name="P35" draw:layer="layout" svg:width="1.769cm" svg:height="1.77cm" svg:x="3.996cm" svg:y="6.485cm" svg:viewBox="0 0 1770 1771" draw:points="886,0 755,9 630,37 513,82 403,142 304,217 217,304 142,403 82,512 37,629 9,754 0,884 9,1015 37,1140 82,1258 142,1366 217,1465 304,1554 403,1628 513,1688 630,1733 755,1761 886,1771 1016,1761 1141,1733 1258,1688 1367,1628 1466,1554 1553,1465 1628,1366 1688,1258 1733,1140 1761,1015 1770,884 1761,754 1733,629 1688,512 1628,403 1553,304 1466,217 1367,142 1258,82 1141,37 1016,9">
          <text:p/>
        </draw:polygon>
        <draw:frame draw:style-name="gr6" draw:text-style-name="P6" draw:layer="layout" svg:width="1.32cm" svg:height="1.294cm" svg:x="4.233cm" svg:y="6.723cm">
          <draw:image xlink:href="Pictures/100002010000003100000030799953BA47BC3AEF.png" xlink:type="simple" xlink:show="embed" xlink:actuate="onLoad" loext:mime-type="image/png">
            <text:p/>
          </draw:image>
        </draw:frame>
        <draw:frame draw:style-name="gr23" draw:text-style-name="P22" draw:layer="layout" svg:width="8.312cm" svg:height="0.492cm" svg:x="1.27cm" svg:y="4.286cm">
          <draw:text-box>
            <text:p text:style-name="P7"><text:span text:style-name="T65">De script de consola a producto completo</text:span></text:p>
          </draw:text-box>
        </draw:frame>
        <draw:frame draw:style-name="gr16" draw:text-style-name="P16" draw:layer="layout" svg:width="0.976cm" svg:height="0.628cm" svg:x="4.417cm" svg:y="8.953cm">
          <draw:text-box>
            <text:p text:style-name="P7"><text:span text:style-name="T97">Hoy</text:span></text:p>
          </draw:text-box>
        </draw:frame>
        <draw:frame draw:style-name="gr28" draw:text-style-name="P26" draw:layer="layout" svg:width="5.891cm" svg:height="0.374cm" svg:x="2.062cm" svg:y="9.942cm">
          <draw:text-box>
            <text:p text:style-name="P7"><text:span text:style-name="T74">Programa de consola en Python, 100% </text:span></text:p>
          </draw:text-box>
        </draw:frame>
        <draw:frame draw:style-name="gr28" draw:text-style-name="P26" draw:layer="layout" svg:width="4.345cm" svg:height="0.374cm" svg:x="2.8cm" svg:y="10.477cm">
          <draw:text-box>
            <text:p text:style-name="P7"><text:span text:style-name="T74">funcional, sin interfaz gráfica</text:span></text:p>
          </draw:text-box>
        </draw:frame>
        <draw:frame draw:style-name="gr6" draw:text-style-name="P6" draw:layer="layout" svg:width="7.712cm" svg:height="9.643cm" svg:x="8.915cm" svg:y="5.427cm">
          <draw:image xlink:href="Pictures/1000020100000123000002231A04A91A9D0593C1.png" xlink:type="simple" xlink:show="embed" xlink:actuate="onLoad" loext:mime-type="image/png">
            <text:p/>
          </draw:image>
        </draw:frame>
        <draw:polygon draw:style-name="gr1" draw:text-style-name="P1" draw:layer="layout" svg:width="7.222cm" svg:height="9.152cm" svg:x="9.169cm" svg:y="5.596cm" svg:viewBox="0 0 7223 9153" draw:points="6969,0 253,0 154,20 74,74 20,154 0,253 0,8900 20,8999 74,9079 154,9133 253,9153 6969,9153 7068,9133 7149,9079 7203,8999 7223,8900 7223,253 7203,154 7149,74 7068,20">
          <text:p/>
        </draw:polygon>
        <draw:polygon draw:style-name="gr26" draw:text-style-name="P6" draw:layer="layout" svg:width="7.222cm" svg:height="9.152cm" svg:x="9.169cm" svg:y="5.596cm" svg:viewBox="0 0 7223 9153" draw:points="0,253 20,154 74,74 154,20 253,0 6969,0 7068,20 7149,74 7203,154 7223,253 7223,8900 7203,8999 7149,9079 7068,9133 6969,9153 253,9153 154,9133 74,9079 20,8999 0,8900">
          <text:p/>
        </draw:polygon>
        <draw:polygon draw:style-name="gr22" draw:text-style-name="P21" draw:layer="layout" svg:width="1.77cm" svg:height="1.77cm" svg:x="11.878cm" svg:y="6.485cm" svg:viewBox="0 0 1771 1771" draw:points="885,0 754,9 630,37 512,82 403,142 305,217 217,304 143,403 82,512 38,629 10,754 0,884 10,1015 38,1140 82,1258 143,1366 217,1465 305,1554 403,1628 512,1688 630,1733 754,1761 885,1771 1016,1761 1141,1733 1258,1688 1367,1628 1466,1554 1554,1465 1628,1366 1689,1258 1733,1140 1761,1015 1771,884 1761,754 1733,629 1689,512 1628,403 1554,304 1466,217 1367,142 1258,82 1141,37 1016,9">
          <text:p/>
        </draw:polygon>
        <draw:frame draw:style-name="gr6" draw:text-style-name="P6" draw:layer="layout" svg:width="1.294cm" svg:height="1.294cm" svg:x="12.116cm" svg:y="6.723cm">
          <draw:image xlink:href="Pictures/100002010000003F00000044D18F54BC6E508A01.png" xlink:type="simple" xlink:show="embed" xlink:actuate="onLoad" loext:mime-type="image/png">
            <text:p/>
          </draw:image>
        </draw:frame>
        <draw:frame draw:style-name="gr40" draw:text-style-name="P36" draw:layer="layout" svg:width="0.635cm" svg:height="0.64cm" svg:x="8.676cm" svg:y="9.868cm">
          <draw:text-box>
            <text:p text:style-name="P7"><text:span text:style-name="T98">&gt;</text:span></text:p>
          </draw:text-box>
        </draw:frame>
        <draw:frame draw:style-name="gr16" draw:text-style-name="P16" draw:layer="layout" svg:width="3.528cm" svg:height="0.628cm" svg:x="11.065cm" svg:y="8.953cm">
          <draw:text-box>
            <text:p text:style-name="P7"><text:span text:style-name="T97">Interfaz visual</text:span></text:p>
          </draw:text-box>
        </draw:frame>
        <draw:frame draw:style-name="gr28" draw:text-style-name="P26" draw:layer="layout" svg:width="6.009cm" svg:height="0.374cm" svg:x="9.896cm" svg:y="9.942cm">
          <draw:text-box>
            <text:p text:style-name="P7"><text:span text:style-name="T74">Convertir el front mostrado en una app </text:span></text:p>
          </draw:text-box>
        </draw:frame>
        <draw:frame draw:style-name="gr28" draw:text-style-name="P26" draw:layer="layout" svg:width="2.948cm" svg:height="0.374cm" svg:x="11.362cm" svg:y="10.477cm">
          <draw:text-box>
            <text:p text:style-name="P7"><text:span text:style-name="T74">real (web o mobile)</text:span></text:p>
          </draw:text-box>
        </draw:frame>
        <draw:frame draw:style-name="gr6" draw:text-style-name="P6" draw:layer="layout" svg:width="7.738cm" svg:height="9.643cm" svg:x="16.772cm" svg:y="5.427cm">
          <draw:image xlink:href="Pictures/100002010000012400000223DBDEDDAEE9503B6F.png" xlink:type="simple" xlink:show="embed" xlink:actuate="onLoad" loext:mime-type="image/png">
            <text:p/>
          </draw:image>
        </draw:frame>
        <draw:polygon draw:style-name="gr1" draw:text-style-name="P1" draw:layer="layout" svg:width="7.247cm" svg:height="9.152cm" svg:x="17.026cm" svg:y="5.596cm" svg:viewBox="0 0 7248 9153" draw:points="6994,0 254,0 155,20 74,74 20,155 0,254 0,8899 20,8998 74,9079 155,9133 254,9153 6994,9153 7093,9133 7174,9079 7228,8998 7248,8899 7248,254 7228,155 7174,74 7093,20">
          <text:p/>
        </draw:polygon>
        <draw:polygon draw:style-name="gr26" draw:text-style-name="P6" draw:layer="layout" svg:width="7.247cm" svg:height="9.152cm" svg:x="17.026cm" svg:y="5.596cm" svg:viewBox="0 0 7248 9153" draw:points="0,254 20,155 74,74 155,20 254,0 6994,0 7093,20 7174,74 7228,155 7248,254 7248,8899 7228,8998 7174,9079 7093,9133 6994,9153 254,9153 155,9133 74,9079 20,8998 0,8899">
          <text:p/>
        </draw:polygon>
        <draw:polygon draw:style-name="gr22" draw:text-style-name="P21" draw:layer="layout" svg:width="1.804cm" svg:height="1.77cm" svg:x="19.735cm" svg:y="6.485cm" svg:viewBox="0 0 1805 1771" draw:points="902,0 769,9 642,37 522,82 411,142 310,217 221,304 146,403 84,512 38,629 10,754 0,884 10,1015 38,1140 84,1258 146,1366 221,1465 310,1554 411,1628 522,1688 642,1733 769,1761 902,1771 1036,1761 1163,1733 1283,1688 1394,1628 1495,1554 1584,1465 1659,1366 1721,1258 1767,1140 1795,1015 1805,884 1795,754 1767,629 1721,512 1659,403 1584,304 1495,217 1394,142 1283,82 1163,37 1036,9">
          <text:p/>
        </draw:polygon>
        <draw:frame draw:style-name="gr6" draw:text-style-name="P6" draw:layer="layout" svg:width="1.328cm" svg:height="1.294cm" svg:x="19.973cm" svg:y="6.723cm">
          <draw:image xlink:href="Pictures/1000020100000032000000306ECE15EFA1B21160.png" xlink:type="simple" xlink:show="embed" xlink:actuate="onLoad" loext:mime-type="image/png">
            <text:p/>
          </draw:image>
        </draw:frame>
        <draw:frame draw:style-name="gr40" draw:text-style-name="P36" draw:layer="layout" svg:width="0.635cm" svg:height="0.64cm" svg:x="16.557cm" svg:y="9.868cm">
          <draw:text-box>
            <text:p text:style-name="P7"><text:span text:style-name="T98">&gt;</text:span></text:p>
          </draw:text-box>
        </draw:frame>
        <draw:frame draw:style-name="gr16" draw:text-style-name="P16" draw:layer="layout" svg:width="3.02cm" svg:height="0.628cm" svg:x="19.208cm" svg:y="8.953cm">
          <draw:text-box>
            <text:p text:style-name="P7"><text:span text:style-name="T97">Persistencia</text:span></text:p>
          </draw:text-box>
        </draw:frame>
        <draw:frame draw:style-name="gr28" draw:text-style-name="P26" draw:layer="layout" svg:width="6.183cm" svg:height="0.374cm" svg:x="17.683cm" svg:y="9.942cm">
          <draw:text-box>
            <text:p text:style-name="P7"><text:span text:style-name="T74">Guardar los datos en una base en vez de </text:span></text:p>
          </draw:text-box>
        </draw:frame>
        <draw:frame draw:style-name="gr28" draw:text-style-name="P26" draw:layer="layout" svg:width="2.677cm" svg:height="0.374cm" svg:x="19.386cm" svg:y="10.477cm">
          <draw:text-box>
            <text:p text:style-name="P7"><text:span text:style-name="T74">listas en memoria</text:span></text:p>
          </draw:text-box>
        </draw:frame>
        <draw:frame draw:style-name="gr6" draw:text-style-name="P6" draw:layer="layout" svg:width="7.712cm" svg:height="9.643cm" svg:x="24.655cm" svg:y="5.427cm">
          <draw:image xlink:href="Pictures/1000020100000123000002231A04A91A9D0593C1.png" xlink:type="simple" xlink:show="embed" xlink:actuate="onLoad" loext:mime-type="image/png">
            <text:p/>
          </draw:image>
        </draw:frame>
        <draw:polygon draw:style-name="gr1" draw:text-style-name="P1" draw:layer="layout" svg:width="7.223cm" svg:height="9.152cm" svg:x="24.908cm" svg:y="5.596cm" svg:viewBox="0 0 7224 9153" draw:points="6970,0 254,0 155,20 75,74 20,154 0,253 0,8900 20,8999 75,9079 155,9133 254,9153 6970,9153 7069,9133 7149,9079 7203,8999 7224,8900 7224,253 7203,154 7149,74 7069,20">
          <text:p/>
        </draw:polygon>
        <draw:polygon draw:style-name="gr26" draw:text-style-name="P6" draw:layer="layout" svg:width="7.223cm" svg:height="9.152cm" svg:x="24.908cm" svg:y="5.596cm" svg:viewBox="0 0 7224 9153" draw:points="0,253 20,154 75,74 155,20 254,0 6970,0 7069,20 7149,74 7203,154 7224,253 7224,8900 7203,8999 7149,9079 7069,9133 6970,9153 254,9153 155,9133 75,9079 20,8999 0,8900">
          <text:p/>
        </draw:polygon>
        <draw:polygon draw:style-name="gr22" draw:text-style-name="P21" draw:layer="layout" svg:width="1.77cm" svg:height="1.77cm" svg:x="27.626cm" svg:y="6.485cm" svg:viewBox="0 0 1771 1771" draw:points="885,0 754,9 630,37 512,82 403,142 305,217 217,304 143,403 82,512 38,629 10,754 0,884 10,1015 38,1140 82,1258 143,1366 217,1465 305,1554 403,1628 512,1688 630,1733 754,1761 885,1771 1016,1761 1141,1733 1258,1688 1367,1628 1465,1554 1553,1465 1628,1366 1689,1258 1733,1140 1761,1015 1771,884 1761,754 1733,629 1689,512 1628,403 1553,304 1465,217 1367,142 1258,82 1141,37 1016,9">
          <text:p/>
        </draw:polygon>
        <draw:frame draw:style-name="gr6" draw:text-style-name="P6" draw:layer="layout" svg:width="1.294cm" svg:height="1.294cm" svg:x="27.864cm" svg:y="6.723cm">
          <draw:image xlink:href="Pictures/10000201000000300000003028EB4D4927DA6EC3.png" xlink:type="simple" xlink:show="embed" xlink:actuate="onLoad" loext:mime-type="image/png">
            <text:p/>
          </draw:image>
        </draw:frame>
        <draw:frame draw:style-name="gr40" draw:text-style-name="P36" draw:layer="layout" svg:width="0.635cm" svg:height="0.64cm" svg:x="24.439cm" svg:y="9.868cm">
          <draw:text-box>
            <text:p text:style-name="P7"><text:span text:style-name="T98">&gt;</text:span></text:p>
          </draw:text-box>
        </draw:frame>
        <draw:frame draw:style-name="gr16" draw:text-style-name="P16" draw:layer="layout" svg:width="3.185cm" svg:height="0.628cm" svg:x="26.998cm" svg:y="8.953cm">
          <draw:text-box>
            <text:p text:style-name="P7"><text:span text:style-name="T97">Multiusuario</text:span></text:p>
          </draw:text-box>
        </draw:frame>
        <draw:frame draw:style-name="gr28" draw:text-style-name="P26" draw:layer="layout" svg:width="4.633cm" svg:height="0.374cm" svg:x="26.347cm" svg:y="9.942cm">
          <draw:text-box>
            <text:p text:style-name="P7"><text:span text:style-name="T74">Perfiles por paciente, útil para </text:span></text:p>
          </draw:text-box>
        </draw:frame>
        <draw:frame draw:style-name="gr28" draw:text-style-name="P26" draw:layer="layout" svg:width="3.164cm" svg:height="0.374cm" svg:x="27.032cm" svg:y="10.477cm">
          <draw:text-box>
            <text:p text:style-name="P7"><text:span text:style-name="T74">cuidadores y familias</text:span></text:p>
          </draw:text-box>
        </draw:frame>
        <draw:frame draw:style-name="gr24" draw:text-style-name="P23" draw:layer="layout" svg:width="6.585cm" svg:height="0.323cm" svg:x="1.27cm" svg:y="18.254cm">
          <draw:text-box>
            <text:p text:style-name="P7"><text:span text:style-name="T69">MediControl — UADE, Introducción a la Algoritmia</text:span></text:p>
          </draw:text-box>
        </draw:frame>
        <draw:frame draw:style-name="gr24" draw:text-style-name="P23" draw:layer="layout" svg:width="0.332cm" svg:height="0.323cm" svg:x="32.31cm" svg:y="18.254cm">
          <draw:text-box>
            <text:p text:style-name="P7"><text:span text:style-name="T69">14</text:span></text:p>
          </draw:text-box>
        </draw:frame>
      </draw:page>
      <draw:page draw:name="page16" draw:style-name="dp1" draw:master-page-name="master-page3">
        <draw:polygon draw:style-name="gr1" draw:text-style-name="P1" draw:layer="layout" svg:width="33.866cm" svg:height="19.05cm" svg:x="0cm" svg:y="-0.001cm" svg:viewBox="0 0 33867 19051" draw:points="0,19051 33867,19051 33867,0 0,0">
          <text:p/>
        </draw:polygon>
        <draw:polygon draw:style-name="gr2" draw:text-style-name="P2" draw:layer="layout" svg:width="33.866cm" svg:height="19.05cm" svg:x="0cm" svg:y="-0.001cm" svg:viewBox="0 0 33867 19051" draw:points="0,19051 33867,19051 33867,0 0,0">
          <text:p/>
        </draw:polygon>
        <draw:polygon draw:style-name="gr3" draw:text-style-name="P3" draw:layer="layout" svg:width="9.736cm" svg:height="7.62cm" svg:x="24.13cm" svg:y="0cm" svg:viewBox="0 0 9737 7621" draw:points="9737,0 127,0 110,86 87,214 67,343 49,473 34,604 22,735 12,868 5,1001 1,1135 0,1270 1,1404 5,1538 12,1671 22,1804 34,1935 49,2066 67,2196 87,2325 110,2453 135,2581 163,2707 194,2833 227,2958 263,3081 300,3203 341,3325 383,3445 428,3565 475,3683 524,3800 576,3916 630,4031 686,4144 745,4256 805,4366 868,4475 932,4583 999,4690 1068,4795 1138,4898 1211,5000 1286,5101 1362,5200 1441,5297 1521,5393 1603,5488 1687,5580 1773,5671 1860,5761 1950,5848 2041,5934 2133,6018 2228,6100 2324,6180 2421,6259 2520,6335 2621,6410 2723,6483 2826,6553 2931,6622 3038,6689 3146,6753 3255,6816 3365,6876 3477,6935 3590,6991 3705,7045 3820,7097 3938,7146 4055,7193 4175,7238 4295,7280 4417,7321 4539,7358 4662,7394 4787,7426 4913,7457 5039,7485 5167,7510 5295,7533 5424,7553 5554,7571 5685,7586 5816,7598 5949,7608 6082,7615 6216,7619 6351,7621 6485,7619 6619,7615 6752,7608 6885,7598 7016,7586 7147,7571 7277,7553 7406,7533 7534,7510 7662,7485 7788,7457 7914,7426 8039,7394 8162,7358 8284,7321 8406,7280 8526,7238 8646,7193 8764,7146 8881,7097 8996,7045 9111,6991 9224,6935 9336,6876 9446,6816 9555,6753 9663,6689 9737,6643">
          <text:p/>
        </draw:polygon>
        <draw:polygon draw:style-name="gr4" draw:text-style-name="P4" draw:layer="layout" svg:width="6.35cm" svg:height="8.889cm" svg:x="0cm" svg:y="10.16cm" svg:viewBox="0 0 6351 8890" draw:points="635,0 500,1 365,6 232,14 100,24 0,35 0,8890 5388,8890 5392,8885 5461,8779 5527,8672 5591,8564 5653,8453 5713,8342 5769,8229 5824,8114 5876,7998 5926,7881 5973,7763 6017,7643 6059,7522 6098,7400 6135,7276 6168,7152 6200,7026 6228,6899 6253,6771 6276,6642 6295,6513 6312,6382 6326,6250 6336,6118 6344,5985 6349,5850 6351,5716 6349,5581 6344,5446 6336,5313 6326,5181 6312,5049 6295,4918 6276,4788 6253,4660 6228,4532 6200,4405 6168,4279 6135,4155 6098,4031 6059,3909 6017,3788 5973,3668 5926,3550 5876,3433 5824,3317 5769,3202 5713,3088 5653,2977 5591,2867 5527,2758 5461,2651 5392,2545 5321,2441 5248,2339 5173,2239 5095,2140 5015,2043 4934,1948 4850,1854 4764,1763 4677,1673 4587,1586 4496,1500 4402,1416 4307,1335 4210,1255 4111,1177 4011,1102 3909,1029 3805,958 3699,889 3592,823 3484,759 3373,697 3262,637 3148,581 3033,526 2917,474 2800,424 2682,377 2562,333 2441,291 2319,252 2195,215 2071,182 1945,150 1818,122 1690,97 1561,74 1432,55 1301,38 1169,24 1037,14 904,6 769,1">
          <text:p/>
        </draw:polygon>
        <draw:polygon draw:style-name="gr5" draw:text-style-name="P5" draw:layer="layout" svg:width="2.405cm" svg:height="2.43cm" svg:x="15.053cm" svg:y="3.547cm" svg:viewBox="0 0 2406 2431" draw:points="1204,0 1073,7 946,28 824,62 707,109 597,167 492,236 397,314 310,402 232,498 164,603 107,714 62,832 28,955 7,1084 0,1216 7,1348 28,1477 62,1600 107,1718 164,1829 232,1934 310,2030 397,2118 492,2196 597,2265 707,2323 824,2369 946,2403 1073,2424 1204,2431 1335,2424 1461,2403 1583,2369 1700,2323 1810,2265 1914,2196 2009,2118 2096,2030 2174,1934 2242,1829 2299,1718 2344,1600 2378,1477 2399,1348 2406,1216 2399,1084 2378,955 2344,832 2299,714 2242,603 2174,498 2096,402 2009,314 1914,236 1810,167 1700,109 1583,62 1461,28 1335,7">
          <text:p/>
        </draw:polygon>
        <draw:frame draw:style-name="gr6" draw:text-style-name="P6" draw:layer="layout" svg:width="1.794cm" svg:height="1.802cm" svg:x="15.375cm" svg:y="3.861cm">
          <draw:image xlink:href="Pictures/1000020100000043000000444527CCCDA0542202.png" xlink:type="simple" xlink:show="embed" xlink:actuate="onLoad" loext:mime-type="image/png">
            <text:p/>
          </draw:image>
        </draw:frame>
        <draw:frame draw:style-name="gr41" draw:text-style-name="P37" draw:layer="layout" svg:width="5.497cm" svg:height="1.885cm" svg:x="12.679cm" svg:y="7.087cm">
          <draw:text-box>
            <text:p text:style-name="P7"><text:span text:style-name="T99">Gracias</text:span></text:p>
          </draw:text-box>
        </draw:frame>
        <draw:frame draw:style-name="gr29" draw:text-style-name="P27" draw:layer="layout" svg:width="9.459cm" svg:height="0.556cm" svg:x="12.107cm" svg:y="9.926cm">
          <draw:text-box>
            <text:p text:style-name="P7"><text:span text:style-name="T94">MediControl — Gestión de Medicamentos</text:span></text:p>
          </draw:text-box>
        </draw:frame>
        <draw:frame draw:style-name="gr9" draw:text-style-name="P10" draw:layer="layout" svg:width="3.664cm" svg:height="0.441cm" svg:x="9.376cm" svg:y="14.044cm">
          <draw:text-box>
            <text:p text:style-name="P7"><text:span text:style-name="T4">Cristian Aostri Lopez</text:span></text:p>
          </draw:text-box>
        </draw:frame>
        <draw:frame draw:style-name="gr9" draw:text-style-name="P10" draw:layer="layout" svg:width="0.439cm" svg:height="0.441cm" svg:x="13.416cm" svg:y="14.044cm">
          <draw:text-box>
            <text:p text:style-name="P7"><text:span text:style-name="T4">·</text:span></text:p>
          </draw:text-box>
        </draw:frame>
        <draw:frame draw:style-name="gr9" draw:text-style-name="P10" draw:layer="layout" svg:width="2.694cm" svg:height="0.441cm" svg:x="13.873cm" svg:y="14.044cm">
          <draw:text-box>
            <text:p text:style-name="P7"><text:span text:style-name="T4">David Espinosa</text:span></text:p>
          </draw:text-box>
        </draw:frame>
        <draw:frame draw:style-name="gr9" draw:text-style-name="P10" draw:layer="layout" svg:width="0.439cm" svg:height="0.441cm" svg:x="16.939cm" svg:y="14.044cm">
          <draw:text-box>
            <text:p text:style-name="P7"><text:span text:style-name="T4">·</text:span></text:p>
          </draw:text-box>
        </draw:frame>
        <draw:frame draw:style-name="gr9" draw:text-style-name="P10" draw:layer="layout" svg:width="3.605cm" svg:height="0.441cm" svg:x="17.397cm" svg:y="14.044cm">
          <draw:text-box>
            <text:p text:style-name="P7"><text:span text:style-name="T4">Facundo Balmacena</text:span></text:p>
          </draw:text-box>
        </draw:frame>
        <draw:frame draw:style-name="gr9" draw:text-style-name="P10" draw:layer="layout" svg:width="0.439cm" svg:height="0.441cm" svg:x="21.377cm" svg:y="14.044cm">
          <draw:text-box>
            <text:p text:style-name="P7"><text:span text:style-name="T4">·</text:span></text:p>
          </draw:text-box>
        </draw:frame>
        <draw:frame draw:style-name="gr9" draw:text-style-name="P10" draw:layer="layout" svg:width="2.631cm" svg:height="0.441cm" svg:x="21.825cm" svg:y="14.044cm">
          <draw:text-box>
            <text:p text:style-name="P7"><text:span text:style-name="T4">Patricio Zermo</text:span></text:p>
          </draw:text-box>
        </draw:frame>
        <draw:frame draw:style-name="gr11" draw:text-style-name="P11" draw:layer="layout" svg:width="7.144cm" svg:height="0.39cm" svg:x="13.45cm" svg:y="15.199cm">
          <draw:text-box>
            <text:p text:style-name="P7"><text:span text:style-name="T100">UADE — Introducción a la Algoritmia — 202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mbria1" svg:font-family="Cambria"/>
    <style:font-face style:name="Courier New1" svg:font-family="'Courier New'"/>
    <style:font-face style:name="Calibri" svg:font-family="Calibri" style:font-pitch="variable"/>
    <style:font-face style:name="Cambria" svg:font-family="Cambria" style:font-pitch="variable"/>
    <style:font-face style:name="Courier New" svg:font-family="'Courier New'"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s" fo:country="AR"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3.866cm" fo:page-height="19.0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6-06-22T17:13:14.418000000</dc:date>
    <meta:editing-duration>PT3M43S</meta:editing-duration>
    <meta:editing-cycles>1</meta:editing-cycles>
    <meta:document-statistic meta:object-count="548"/>
    <meta:generator>Trio_Office/6.2.8.2$Windows_x86 LibreOffice_project/</meta:generator>
  </office:meta>
</office:document-meta>
</file>